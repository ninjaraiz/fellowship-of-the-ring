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127.93mm"/>
    </style:style>
    <style:style style:name="co5" style:family="table-column">
      <style:table-column-properties fo:break-before="auto" style:column-width="14.9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143.6mm"/>
    </style:style>
    <style:style style:name="co9" style:family="table-column">
      <style:table-column-properties fo:break-before="auto" style:column-width="23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21"/>
    <style:style style:name="ce3" style:family="table-cell" style:parent-style-name="Default"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mm"/>
      <style:text-properties style:font-name="Liberation Mono"/>
    </style:style>
    <style:style style:name="ce9" style:family="table-cell" style:parent-style-name="Default" style:data-style-name="N121"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Default"/>
        <table:table-row table:style-name="ro1" table:number-rows-repeated="3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PointID</text:p>
          </table:table-cell>
          <table:table-cell table:style-name="ce5" office:value-type="string" calcext:value-type="string">
            <text:p>CoordinateX</text:p>
          </table:table-cell>
          <table:table-cell table:style-name="ce5" office:value-type="string" calcext:value-type="string">
            <text:p>CoordinateY</text:p>
          </table:table-cell>
          <table:table-cell table:style-name="ce5" office:value-type="string" calcext:value-type="string">
            <text:p>CoordinateZ</text:p>
          </table:table-cell>
          <table:table-cell table:style-name="Default"/>
          <table:table-cell office:value-type="string" calcext:value-type="string">
            <text:p>GMSH OUTPU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00000E+00</text:p>
          </table:table-cell>
          <table:table-cell office:value-type="float" office:value="0.00126" calcext:value-type="float">
            <text:p>1.2600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];&quot;) = {&quot;;TEXT([.D5];&quot;0.0000000E+00&quot;);&quot;,&quot;;TEXT([.E5];&quot;0.0000000E+00&quot;);&quot;,&quot;;TEXT([.F5];&quot;0.0000000E+00&quot;);&quot;,&quot;;&quot;lc};&quot;)" office:value-type="string" office:string-value="Point(1) = {1.0000000E+00,1.2600000E-03,0.0000000E+00,lc};" calcext:value-type="string">
            <text:p>Point(1) = {1.0000000E+00,1.2600000E-03,0.0000000E+00,lc};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994161" calcext:value-type="float">
            <text:p>9.9941610E-01</text:p>
          </table:table-cell>
          <table:table-cell office:value-type="float" office:value="0.0013419" calcext:value-type="float">
            <text:p>1.3419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];&quot;) = {&quot;;TEXT([.D6];&quot;0.0000000E+00&quot;);&quot;,&quot;;TEXT([.E6];&quot;0.0000000E+00&quot;);&quot;,&quot;;TEXT([.F6];&quot;0.0000000E+00&quot;);&quot;,&quot;;&quot;lc};&quot;)" office:value-type="string" office:string-value="Point(2) = {9.9941610E-01,1.3419000E-03,0.0000000E+00,lc};" calcext:value-type="string">
            <text:p>Point(2) = {9.9941610E-01,1.3419000E-03,0.0000000E+00,lc};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9976658" calcext:value-type="float">
            <text:p>9.9766580E-01</text:p>
          </table:table-cell>
          <table:table-cell office:value-type="float" office:value="0.001587" calcext:value-type="float">
            <text:p>1.5870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];&quot;) = {&quot;;TEXT([.D7];&quot;0.0000000E+00&quot;);&quot;,&quot;;TEXT([.E7];&quot;0.0000000E+00&quot;);&quot;,&quot;;TEXT([.F7];&quot;0.0000000E+00&quot;);&quot;,&quot;;&quot;lc};&quot;)" office:value-type="string" office:string-value="Point(3) = {9.9766580E-01,1.5870000E-03,0.0000000E+00,lc};" calcext:value-type="string">
            <text:p>Point(3) = {9.9766580E-01,1.5870000E-03,0.0000000E+00,lc};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947532" calcext:value-type="float">
            <text:p>9.9475320E-01</text:p>
          </table:table-cell>
          <table:table-cell office:value-type="float" office:value="0.0019938" calcext:value-type="float">
            <text:p>1.9938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];&quot;) = {&quot;;TEXT([.D8];&quot;0.0000000E+00&quot;);&quot;,&quot;;TEXT([.E8];&quot;0.0000000E+00&quot;);&quot;,&quot;;TEXT([.F8];&quot;0.0000000E+00&quot;);&quot;,&quot;;&quot;lc};&quot;)" office:value-type="string" office:string-value="Point(4) = {9.9475320E-01,1.9938000E-03,0.0000000E+00,lc};" calcext:value-type="string">
            <text:p>Point(4) = {9.9475320E-01,1.9938000E-03,0.0000000E+00,lc};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90685" calcext:value-type="float">
            <text:p>9.9068500E-01</text:p>
          </table:table-cell>
          <table:table-cell office:value-type="float" office:value="0.0025595" calcext:value-type="float">
            <text:p>2.5595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];&quot;) = {&quot;;TEXT([.D9];&quot;0.0000000E+00&quot;);&quot;,&quot;;TEXT([.E9];&quot;0.0000000E+00&quot;);&quot;,&quot;;TEXT([.F9];&quot;0.0000000E+00&quot;);&quot;,&quot;;&quot;lc};&quot;)" office:value-type="string" office:string-value="Point(5) = {9.9068500E-01,2.5595000E-03,0.0000000E+00,lc};" calcext:value-type="string">
            <text:p>Point(5) = {9.9068500E-01,2.5595000E-03,0.0000000E+00,lc};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854709" calcext:value-type="float">
            <text:p>9.8547090E-01</text:p>
          </table:table-cell>
          <table:table-cell office:value-type="float" office:value="0.0032804" calcext:value-type="float">
            <text:p>3.2804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];&quot;) = {&quot;;TEXT([.D10];&quot;0.0000000E+00&quot;);&quot;,&quot;;TEXT([.E10];&quot;0.0000000E+00&quot;);&quot;,&quot;;TEXT([.F10];&quot;0.0000000E+00&quot;);&quot;,&quot;;&quot;lc};&quot;)" office:value-type="string" office:string-value="Point(6) = {9.8547090E-01,3.2804000E-03,0.0000000E+00,lc};" calcext:value-type="string">
            <text:p>Point(6) = {9.8547090E-01,3.2804000E-03,0.0000000E+00,lc};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791229" calcext:value-type="float">
            <text:p>9.7912290E-01</text:p>
          </table:table-cell>
          <table:table-cell office:value-type="float" office:value="0.0041519" calcext:value-type="float">
            <text:p>4.1519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];&quot;) = {&quot;;TEXT([.D11];&quot;0.0000000E+00&quot;);&quot;,&quot;;TEXT([.E11];&quot;0.0000000E+00&quot;);&quot;,&quot;;TEXT([.F11];&quot;0.0000000E+00&quot;);&quot;,&quot;;&quot;lc};&quot;)" office:value-type="string" office:string-value="Point(7) = {9.7912290E-01,4.1519000E-03,0.0000000E+00,lc};" calcext:value-type="string">
            <text:p>Point(7) = {9.7912290E-01,4.1519000E-03,0.0000000E+00,lc};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9716559" calcext:value-type="float">
            <text:p>9.7165590E-01</text:p>
          </table:table-cell>
          <table:table-cell office:value-type="float" office:value="0.0051685" calcext:value-type="float">
            <text:p>5.1685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];&quot;) = {&quot;;TEXT([.D12];&quot;0.0000000E+00&quot;);&quot;,&quot;;TEXT([.E12];&quot;0.0000000E+00&quot;);&quot;,&quot;;TEXT([.F12];&quot;0.0000000E+00&quot;);&quot;,&quot;;&quot;lc};&quot;)" office:value-type="string" office:string-value="Point(8) = {9.7165590E-01,5.1685000E-03,0.0000000E+00,lc};" calcext:value-type="string">
            <text:p>Point(8) = {9.7165590E-01,5.1685000E-03,0.0000000E+00,lc};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630873" calcext:value-type="float">
            <text:p>9.6308730E-01</text:p>
          </table:table-cell>
          <table:table-cell office:value-type="float" office:value="0.0063238" calcext:value-type="float">
            <text:p>6.3238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3];&quot;) = {&quot;;TEXT([.D13];&quot;0.0000000E+00&quot;);&quot;,&quot;;TEXT([.E13];&quot;0.0000000E+00&quot;);&quot;,&quot;;TEXT([.F13];&quot;0.0000000E+00&quot;);&quot;,&quot;;&quot;lc};&quot;)" office:value-type="string" office:string-value="Point(9) = {9.6308730E-01,6.3238000E-03,0.0000000E+00,lc};" calcext:value-type="string">
            <text:p>Point(9) = {9.6308730E-01,6.3238000E-03,0.0000000E+00,lc};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534372" calcext:value-type="float">
            <text:p>9.5343720E-01</text:p>
          </table:table-cell>
          <table:table-cell office:value-type="float" office:value="0.0076108" calcext:value-type="float">
            <text:p>7.6108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4];&quot;) = {&quot;;TEXT([.D14];&quot;0.0000000E+00&quot;);&quot;,&quot;;TEXT([.E14];&quot;0.0000000E+00&quot;);&quot;,&quot;;TEXT([.F14];&quot;0.0000000E+00&quot;);&quot;,&quot;;&quot;lc};&quot;)" office:value-type="string" office:string-value="Point(10) = {9.5343720E-01,7.6108000E-03,0.0000000E+00,lc};" calcext:value-type="string">
            <text:p>Point(10) = {9.5343720E-01,7.6108000E-03,0.0000000E+00,lc};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942728" calcext:value-type="float">
            <text:p>9.4272800E-01</text:p>
          </table:table-cell>
          <table:table-cell office:value-type="float" office:value="0.0090217" calcext:value-type="float">
            <text:p>9.0217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5];&quot;) = {&quot;;TEXT([.D15];&quot;0.0000000E+00&quot;);&quot;,&quot;;TEXT([.E15];&quot;0.0000000E+00&quot;);&quot;,&quot;;TEXT([.F15];&quot;0.0000000E+00&quot;);&quot;,&quot;;&quot;lc};&quot;)" office:value-type="string" office:string-value="Point(11) = {9.4272800E-01,9.0217000E-03,0.0000000E+00,lc};" calcext:value-type="string">
            <text:p>Point(11) = {9.4272800E-01,9.0217000E-03,0.0000000E+00,lc};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309849" calcext:value-type="float">
            <text:p>9.3098490E-01</text:p>
          </table:table-cell>
          <table:table-cell office:value-type="float" office:value="0.0105485" calcext:value-type="float">
            <text:p>1.0548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6];&quot;) = {&quot;;TEXT([.D16];&quot;0.0000000E+00&quot;);&quot;,&quot;;TEXT([.E16];&quot;0.0000000E+00&quot;);&quot;,&quot;;TEXT([.F16];&quot;0.0000000E+00&quot;);&quot;,&quot;;&quot;lc};&quot;)" office:value-type="string" office:string-value="Point(12) = {9.3098490E-01,1.0548500E-02,0.0000000E+00,lc};" calcext:value-type="string">
            <text:p>Point(12) = {9.3098490E-01,1.0548500E-02,0.0000000E+00,lc};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9182351" calcext:value-type="float">
            <text:p>9.1823510E-01</text:p>
          </table:table-cell>
          <table:table-cell office:value-type="float" office:value="0.0121823" calcext:value-type="float">
            <text:p>1.2182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7];&quot;) = {&quot;;TEXT([.D17];&quot;0.0000000E+00&quot;);&quot;,&quot;;TEXT([.E17];&quot;0.0000000E+00&quot;);&quot;,&quot;;TEXT([.F17];&quot;0.0000000E+00&quot;);&quot;,&quot;;&quot;lc};&quot;)" office:value-type="string" office:string-value="Point(13) = {9.1823510E-01,1.2182300E-02,0.0000000E+00,lc};" calcext:value-type="string">
            <text:p>Point(13) = {9.1823510E-01,1.2182300E-02,0.0000000E+00,lc};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045085" calcext:value-type="float">
            <text:p>9.0450850E-01</text:p>
          </table:table-cell>
          <table:table-cell office:value-type="float" office:value="0.0139143" calcext:value-type="float">
            <text:p>1.3914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8];&quot;) = {&quot;;TEXT([.D18];&quot;0.0000000E+00&quot;);&quot;,&quot;;TEXT([.E18];&quot;0.0000000E+00&quot;);&quot;,&quot;;TEXT([.F18];&quot;0.0000000E+00&quot;);&quot;,&quot;;&quot;lc};&quot;)" office:value-type="string" office:string-value="Point(14) = {9.0450850E-01,1.3914300E-02,0.0000000E+00,lc};" calcext:value-type="string">
            <text:p>Point(14) = {9.0450850E-01,1.3914300E-02,0.0000000E+00,lc};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898372" calcext:value-type="float">
            <text:p>8.8983720E-01</text:p>
          </table:table-cell>
          <table:table-cell office:value-type="float" office:value="0.0157351" calcext:value-type="float">
            <text:p>1.5735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9];&quot;) = {&quot;;TEXT([.D19];&quot;0.0000000E+00&quot;);&quot;,&quot;;TEXT([.E19];&quot;0.0000000E+00&quot;);&quot;,&quot;;TEXT([.F19];&quot;0.0000000E+00&quot;);&quot;,&quot;;&quot;lc};&quot;)" office:value-type="string" office:string-value="Point(15) = {8.8983720E-01,1.5735100E-02,0.0000000E+00,lc};" calcext:value-type="string">
            <text:p>Point(15) = {8.8983720E-01,1.5735100E-02,0.0000000E+00,lc};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742554" calcext:value-type="float">
            <text:p>8.7425540E-01</text:p>
          </table:table-cell>
          <table:table-cell office:value-type="float" office:value="0.0176353" calcext:value-type="float">
            <text:p>1.7635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0];&quot;) = {&quot;;TEXT([.D20];&quot;0.0000000E+00&quot;);&quot;,&quot;;TEXT([.E20];&quot;0.0000000E+00&quot;);&quot;,&quot;;TEXT([.F20];&quot;0.0000000E+00&quot;);&quot;,&quot;;&quot;lc};&quot;)" office:value-type="string" office:string-value="Point(16) = {8.7425540E-01,1.7635300E-02,0.0000000E+00,lc};" calcext:value-type="string">
            <text:p>Point(16) = {8.7425540E-01,1.7635300E-02,0.0000000E+00,lc};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577995" calcext:value-type="float">
            <text:p>8.5779950E-01</text:p>
          </table:table-cell>
          <table:table-cell office:value-type="float" office:value="0.0196051" calcext:value-type="float">
            <text:p>1.9605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1];&quot;) = {&quot;;TEXT([.D21];&quot;0.0000000E+00&quot;);&quot;,&quot;;TEXT([.E21];&quot;0.0000000E+00&quot;);&quot;,&quot;;TEXT([.F21];&quot;0.0000000E+00&quot;);&quot;,&quot;;&quot;lc};&quot;)" office:value-type="string" office:string-value="Point(17) = {8.5779950E-01,1.9605100E-02,0.0000000E+00,lc};" calcext:value-type="string">
            <text:p>Point(17) = {8.5779950E-01,1.9605100E-02,0.0000000E+00,lc};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405079" calcext:value-type="float">
            <text:p>8.4050790E-01</text:p>
          </table:table-cell>
          <table:table-cell office:value-type="float" office:value="0.0216347" calcext:value-type="float">
            <text:p>2.1634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2];&quot;) = {&quot;;TEXT([.D22];&quot;0.0000000E+00&quot;);&quot;,&quot;;TEXT([.E22];&quot;0.0000000E+00&quot;);&quot;,&quot;;TEXT([.F22];&quot;0.0000000E+00&quot;);&quot;,&quot;;&quot;lc};&quot;)" office:value-type="string" office:string-value="Point(18) = {8.4050790E-01,2.1634700E-02,0.0000000E+00,lc};" calcext:value-type="string">
            <text:p>Point(18) = {8.4050790E-01,2.1634700E-02,0.0000000E+00,lc};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224211" calcext:value-type="float">
            <text:p>8.2242110E-01</text:p>
          </table:table-cell>
          <table:table-cell office:value-type="float" office:value="0.0237142" calcext:value-type="float">
            <text:p>2.3714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3];&quot;) = {&quot;;TEXT([.D23];&quot;0.0000000E+00&quot;);&quot;,&quot;;TEXT([.E23];&quot;0.0000000E+00&quot;);&quot;,&quot;;TEXT([.F23];&quot;0.0000000E+00&quot;);&quot;,&quot;;&quot;lc};&quot;)" office:value-type="string" office:string-value="Point(19) = {8.2242110E-01,2.3714200E-02,0.0000000E+00,lc};" calcext:value-type="string">
            <text:p>Point(19) = {8.2242110E-01,2.3714200E-02,0.0000000E+00,lc};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035813" calcext:value-type="float">
            <text:p>8.0358130E-01</text:p>
          </table:table-cell>
          <table:table-cell office:value-type="float" office:value="0.0258337" calcext:value-type="float">
            <text:p>2.5833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4];&quot;) = {&quot;;TEXT([.D24];&quot;0.0000000E+00&quot;);&quot;,&quot;;TEXT([.E24];&quot;0.0000000E+00&quot;);&quot;,&quot;;TEXT([.F24];&quot;0.0000000E+00&quot;);&quot;,&quot;;&quot;lc};&quot;)" office:value-type="string" office:string-value="Point(20) = {8.0358130E-01,2.5833700E-02,0.0000000E+00,lc};" calcext:value-type="string">
            <text:p>Point(20) = {8.0358130E-01,2.5833700E-02,0.0000000E+00,lc};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7840324" calcext:value-type="float">
            <text:p>7.8403240E-01</text:p>
          </table:table-cell>
          <table:table-cell office:value-type="float" office:value="0.0279828" calcext:value-type="float">
            <text:p>2.7982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5];&quot;) = {&quot;;TEXT([.D25];&quot;0.0000000E+00&quot;);&quot;,&quot;;TEXT([.E25];&quot;0.0000000E+00&quot;);&quot;,&quot;;TEXT([.F25];&quot;0.0000000E+00&quot;);&quot;,&quot;;&quot;lc};&quot;)" office:value-type="string" office:string-value="Point(21) = {7.8403240E-01,2.7982800E-02,0.0000000E+00,lc};" calcext:value-type="string">
            <text:p>Point(21) = {7.8403240E-01,2.7982800E-02,0.0000000E+00,lc};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7638202" calcext:value-type="float">
            <text:p>7.6382020E-01</text:p>
          </table:table-cell>
          <table:table-cell office:value-type="float" office:value="0.0301515" calcext:value-type="float">
            <text:p>3.0151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6];&quot;) = {&quot;;TEXT([.D26];&quot;0.0000000E+00&quot;);&quot;,&quot;;TEXT([.E26];&quot;0.0000000E+00&quot;);&quot;,&quot;;TEXT([.F26];&quot;0.0000000E+00&quot;);&quot;,&quot;;&quot;lc};&quot;)" office:value-type="string" office:string-value="Point(22) = {7.6382020E-01,3.0151500E-02,0.0000000E+00,lc};" calcext:value-type="string">
            <text:p>Point(22) = {7.6382020E-01,3.0151500E-02,0.0000000E+00,lc};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7429917" calcext:value-type="float">
            <text:p>7.4299170E-01</text:p>
          </table:table-cell>
          <table:table-cell office:value-type="float" office:value="0.0323294" calcext:value-type="float">
            <text:p>3.23294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7];&quot;) = {&quot;;TEXT([.D27];&quot;0.0000000E+00&quot;);&quot;,&quot;;TEXT([.E27];&quot;0.0000000E+00&quot;);&quot;,&quot;;TEXT([.F27];&quot;0.0000000E+00&quot;);&quot;,&quot;;&quot;lc};&quot;)" office:value-type="string" office:string-value="Point(23) = {7.4299170E-01,3.2329400E-02,0.0000000E+00,lc};" calcext:value-type="string">
            <text:p>Point(23) = {7.4299170E-01,3.2329400E-02,0.0000000E+00,lc};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7215958" calcext:value-type="float">
            <text:p>7.2159580E-01</text:p>
          </table:table-cell>
          <table:table-cell office:value-type="float" office:value="0.0345058" calcext:value-type="float">
            <text:p>3.4505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8];&quot;) = {&quot;;TEXT([.D28];&quot;0.0000000E+00&quot;);&quot;,&quot;;TEXT([.E28];&quot;0.0000000E+00&quot;);&quot;,&quot;;TEXT([.F28];&quot;0.0000000E+00&quot;);&quot;,&quot;;&quot;lc};&quot;)" office:value-type="string" office:string-value="Point(24) = {7.2159580E-01,3.4505800E-02,0.0000000E+00,lc};" calcext:value-type="string">
            <text:p>Point(24) = {7.2159580E-01,3.4505800E-02,0.0000000E+00,lc};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6996823" calcext:value-type="float">
            <text:p>6.9968230E-01</text:p>
          </table:table-cell>
          <table:table-cell office:value-type="float" office:value="0.03667" calcext:value-type="float">
            <text:p>3.6670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29];&quot;) = {&quot;;TEXT([.D29];&quot;0.0000000E+00&quot;);&quot;,&quot;;TEXT([.E29];&quot;0.0000000E+00&quot;);&quot;,&quot;;TEXT([.F29];&quot;0.0000000E+00&quot;);&quot;,&quot;;&quot;lc};&quot;)" office:value-type="string" office:string-value="Point(25) = {6.9968230E-01,3.6670000E-02,0.0000000E+00,lc};" calcext:value-type="string">
            <text:p>Point(25) = {6.9968230E-01,3.6670000E-02,0.0000000E+00,lc};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6773025" calcext:value-type="float">
            <text:p>6.7730250E-01</text:p>
          </table:table-cell>
          <table:table-cell office:value-type="float" office:value="0.0388109" calcext:value-type="float">
            <text:p>3.8810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0];&quot;) = {&quot;;TEXT([.D30];&quot;0.0000000E+00&quot;);&quot;,&quot;;TEXT([.E30];&quot;0.0000000E+00&quot;);&quot;,&quot;;TEXT([.F30];&quot;0.0000000E+00&quot;);&quot;,&quot;;&quot;lc};&quot;)" office:value-type="string" office:string-value="Point(26) = {6.7730250E-01,3.8810900E-02,0.0000000E+00,lc};" calcext:value-type="string">
            <text:p>Point(26) = {6.7730250E-01,3.8810900E-02,0.0000000E+00,lc};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6545085" calcext:value-type="float">
            <text:p>6.5450850E-01</text:p>
          </table:table-cell>
          <table:table-cell office:value-type="float" office:value="0.0409174" calcext:value-type="float">
            <text:p>4.09174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1];&quot;) = {&quot;;TEXT([.D31];&quot;0.0000000E+00&quot;);&quot;,&quot;;TEXT([.E31];&quot;0.0000000E+00&quot;);&quot;,&quot;;TEXT([.F31];&quot;0.0000000E+00&quot;);&quot;,&quot;;&quot;lc};&quot;)" office:value-type="string" office:string-value="Point(27) = {6.5450850E-01,4.0917400E-02,0.0000000E+00,lc};" calcext:value-type="string">
            <text:p>Point(27) = {6.5450850E-01,4.0917400E-02,0.0000000E+00,lc};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6313537" calcext:value-type="float">
            <text:p>6.3135370E-01</text:p>
          </table:table-cell>
          <table:table-cell office:value-type="float" office:value="0.0429778" calcext:value-type="float">
            <text:p>4.2977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2];&quot;) = {&quot;;TEXT([.D32];&quot;0.0000000E+00&quot;);&quot;,&quot;;TEXT([.E32];&quot;0.0000000E+00&quot;);&quot;,&quot;;TEXT([.F32];&quot;0.0000000E+00&quot;);&quot;,&quot;;&quot;lc};&quot;)" office:value-type="string" office:string-value="Point(28) = {6.3135370E-01,4.2977800E-02,0.0000000E+00,lc};" calcext:value-type="string">
            <text:p>Point(28) = {6.3135370E-01,4.2977800E-02,0.0000000E+00,lc};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6078921" calcext:value-type="float">
            <text:p>6.0789210E-01</text:p>
          </table:table-cell>
          <table:table-cell office:value-type="float" office:value="0.0449802" calcext:value-type="float">
            <text:p>4.4980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3];&quot;) = {&quot;;TEXT([.D33];&quot;0.0000000E+00&quot;);&quot;,&quot;;TEXT([.E33];&quot;0.0000000E+00&quot;);&quot;,&quot;;TEXT([.F33];&quot;0.0000000E+00&quot;);&quot;,&quot;;&quot;lc};&quot;)" office:value-type="string" office:string-value="Point(29) = {6.0789210E-01,4.4980200E-02,0.0000000E+00,lc};" calcext:value-type="string">
            <text:p>Point(29) = {6.0789210E-01,4.4980200E-02,0.0000000E+00,lc};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841786" calcext:value-type="float">
            <text:p>5.8417860E-01</text:p>
          </table:table-cell>
          <table:table-cell office:value-type="float" office:value="0.0469124" calcext:value-type="float">
            <text:p>4.69124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4];&quot;) = {&quot;;TEXT([.D34];&quot;0.0000000E+00&quot;);&quot;,&quot;;TEXT([.E34];&quot;0.0000000E+00&quot;);&quot;,&quot;;TEXT([.F34];&quot;0.0000000E+00&quot;);&quot;,&quot;;&quot;lc};&quot;)" office:value-type="string" office:string-value="Point(30) = {5.8417860E-01,4.6912400E-02,0.0000000E+00,lc};" calcext:value-type="string">
            <text:p>Point(30) = {5.8417860E-01,4.6912400E-02,0.0000000E+00,lc};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5602683" calcext:value-type="float">
            <text:p>5.6026830E-01</text:p>
          </table:table-cell>
          <table:table-cell office:value-type="float" office:value="0.0487619" calcext:value-type="float">
            <text:p>4.8761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5];&quot;) = {&quot;;TEXT([.D35];&quot;0.0000000E+00&quot;);&quot;,&quot;;TEXT([.E35];&quot;0.0000000E+00&quot;);&quot;,&quot;;TEXT([.F35];&quot;0.0000000E+00&quot;);&quot;,&quot;;&quot;lc};&quot;)" office:value-type="string" office:string-value="Point(31) = {5.6026830E-01,4.8761900E-02,0.0000000E+00,lc};" calcext:value-type="string">
            <text:p>Point(31) = {5.6026830E-01,4.8761900E-02,0.0000000E+00,lc};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5362174" calcext:value-type="float">
            <text:p>5.3621740E-01</text:p>
          </table:table-cell>
          <table:table-cell office:value-type="float" office:value="0.0505161" calcext:value-type="float">
            <text:p>5.0516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6];&quot;) = {&quot;;TEXT([.D36];&quot;0.0000000E+00&quot;);&quot;,&quot;;TEXT([.E36];&quot;0.0000000E+00&quot;);&quot;,&quot;;TEXT([.F36];&quot;0.0000000E+00&quot;);&quot;,&quot;;&quot;lc};&quot;)" office:value-type="string" office:string-value="Point(32) = {5.3621740E-01,5.0516100E-02,0.0000000E+00,lc};" calcext:value-type="string">
            <text:p>Point(32) = {5.3621740E-01,5.0516100E-02,0.0000000E+00,lc};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5120819" calcext:value-type="float">
            <text:p>5.1208190E-01</text:p>
          </table:table-cell>
          <table:table-cell office:value-type="float" office:value="0.052162" calcext:value-type="float">
            <text:p>5.2162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7];&quot;) = {&quot;;TEXT([.D37];&quot;0.0000000E+00&quot;);&quot;,&quot;;TEXT([.E37];&quot;0.0000000E+00&quot;);&quot;,&quot;;TEXT([.F37];&quot;0.0000000E+00&quot;);&quot;,&quot;;&quot;lc};&quot;)" office:value-type="string" office:string-value="Point(33) = {5.1208190E-01,5.2162000E-02,0.0000000E+00,lc};" calcext:value-type="string">
            <text:p>Point(33) = {5.1208190E-01,5.2162000E-02,0.0000000E+00,lc};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4879181" calcext:value-type="float">
            <text:p>4.8791810E-01</text:p>
          </table:table-cell>
          <table:table-cell office:value-type="float" office:value="0.0536866" calcext:value-type="float">
            <text:p>5.36866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8];&quot;) = {&quot;;TEXT([.D38];&quot;0.0000000E+00&quot;);&quot;,&quot;;TEXT([.E38];&quot;0.0000000E+00&quot;);&quot;,&quot;;TEXT([.F38];&quot;0.0000000E+00&quot;);&quot;,&quot;;&quot;lc};&quot;)" office:value-type="string" office:string-value="Point(34) = {4.8791810E-01,5.3686600E-02,0.0000000E+00,lc};" calcext:value-type="string">
            <text:p>Point(34) = {4.8791810E-01,5.3686600E-02,0.0000000E+00,lc};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4637826" calcext:value-type="float">
            <text:p>4.6378260E-01</text:p>
          </table:table-cell>
          <table:table-cell office:value-type="float" office:value="0.0550769" calcext:value-type="float">
            <text:p>5.5076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39];&quot;) = {&quot;;TEXT([.D39];&quot;0.0000000E+00&quot;);&quot;,&quot;;TEXT([.E39];&quot;0.0000000E+00&quot;);&quot;,&quot;;TEXT([.F39];&quot;0.0000000E+00&quot;);&quot;,&quot;;&quot;lc};&quot;)" office:value-type="string" office:string-value="Point(35) = {4.6378260E-01,5.5076900E-02,0.0000000E+00,lc};" calcext:value-type="string">
            <text:p>Point(35) = {4.6378260E-01,5.5076900E-02,0.0000000E+00,lc};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4397317" calcext:value-type="float">
            <text:p>4.3973170E-01</text:p>
          </table:table-cell>
          <table:table-cell office:value-type="float" office:value="0.05632" calcext:value-type="float">
            <text:p>5.6320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0];&quot;) = {&quot;;TEXT([.D40];&quot;0.0000000E+00&quot;);&quot;,&quot;;TEXT([.E40];&quot;0.0000000E+00&quot;);&quot;,&quot;;TEXT([.F40];&quot;0.0000000E+00&quot;);&quot;,&quot;;&quot;lc};&quot;)" office:value-type="string" office:string-value="Point(36) = {4.3973170E-01,5.6320000E-02,0.0000000E+00,lc};" calcext:value-type="string">
            <text:p>Point(36) = {4.3973170E-01,5.6320000E-02,0.0000000E+00,lc};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4158215" calcext:value-type="float">
            <text:p>4.1582150E-01</text:p>
          </table:table-cell>
          <table:table-cell office:value-type="float" office:value="0.0574033" calcext:value-type="float">
            <text:p>5.7403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1];&quot;) = {&quot;;TEXT([.D41];&quot;0.0000000E+00&quot;);&quot;,&quot;;TEXT([.E41];&quot;0.0000000E+00&quot;);&quot;,&quot;;TEXT([.F41];&quot;0.0000000E+00&quot;);&quot;,&quot;;&quot;lc};&quot;)" office:value-type="string" office:string-value="Point(37) = {4.1582150E-01,5.7403300E-02,0.0000000E+00,lc};" calcext:value-type="string">
            <text:p>Point(37) = {4.1582150E-01,5.7403300E-02,0.0000000E+00,lc};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3921079" calcext:value-type="float">
            <text:p>3.9210790E-01</text:p>
          </table:table-cell>
          <table:table-cell office:value-type="float" office:value="0.0583145" calcext:value-type="float">
            <text:p>5.8314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2];&quot;) = {&quot;;TEXT([.D42];&quot;0.0000000E+00&quot;);&quot;,&quot;;TEXT([.E42];&quot;0.0000000E+00&quot;);&quot;,&quot;;TEXT([.F42];&quot;0.0000000E+00&quot;);&quot;,&quot;;&quot;lc};&quot;)" office:value-type="string" office:string-value="Point(38) = {3.9210790E-01,5.8314500E-02,0.0000000E+00,lc};" calcext:value-type="string">
            <text:p>Point(38) = {3.9210790E-01,5.8314500E-02,0.0000000E+00,lc};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3686463" calcext:value-type="float">
            <text:p>3.6864630E-01</text:p>
          </table:table-cell>
          <table:table-cell office:value-type="float" office:value="0.0590419" calcext:value-type="float">
            <text:p>5.9041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3];&quot;) = {&quot;;TEXT([.D43];&quot;0.0000000E+00&quot;);&quot;,&quot;;TEXT([.E43];&quot;0.0000000E+00&quot;);&quot;,&quot;;TEXT([.F43];&quot;0.0000000E+00&quot;);&quot;,&quot;;&quot;lc};&quot;)" office:value-type="string" office:string-value="Point(39) = {3.6864630E-01,5.9041900E-02,0.0000000E+00,lc};" calcext:value-type="string">
            <text:p>Point(39) = {3.6864630E-01,5.9041900E-02,0.0000000E+00,lc};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3454915" calcext:value-type="float">
            <text:p>3.4549150E-01</text:p>
          </table:table-cell>
          <table:table-cell office:value-type="float" office:value="0.0595747" calcext:value-type="float">
            <text:p>5.9574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4];&quot;) = {&quot;;TEXT([.D44];&quot;0.0000000E+00&quot;);&quot;,&quot;;TEXT([.E44];&quot;0.0000000E+00&quot;);&quot;,&quot;;TEXT([.F44];&quot;0.0000000E+00&quot;);&quot;,&quot;;&quot;lc};&quot;)" office:value-type="string" office:string-value="Point(40) = {3.4549150E-01,5.9574700E-02,0.0000000E+00,lc};" calcext:value-type="string">
            <text:p>Point(40) = {3.4549150E-01,5.9574700E-02,0.0000000E+00,lc};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3226976" calcext:value-type="float">
            <text:p>3.2269760E-01</text:p>
          </table:table-cell>
          <table:table-cell office:value-type="float" office:value="0.0599028" calcext:value-type="float">
            <text:p>5.9902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5];&quot;) = {&quot;;TEXT([.D45];&quot;0.0000000E+00&quot;);&quot;,&quot;;TEXT([.E45];&quot;0.0000000E+00&quot;);&quot;,&quot;;TEXT([.F45];&quot;0.0000000E+00&quot;);&quot;,&quot;;&quot;lc};&quot;)" office:value-type="string" office:string-value="Point(41) = {3.2269760E-01,5.9902800E-02,0.0000000E+00,lc};" calcext:value-type="string">
            <text:p>Point(41) = {3.2269760E-01,5.9902800E-02,0.0000000E+00,lc};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3003177" calcext:value-type="float">
            <text:p>3.0031770E-01</text:p>
          </table:table-cell>
          <table:table-cell office:value-type="float" office:value="0.0600172" calcext:value-type="float">
            <text:p>6.0017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6];&quot;) = {&quot;;TEXT([.D46];&quot;0.0000000E+00&quot;);&quot;,&quot;;TEXT([.E46];&quot;0.0000000E+00&quot;);&quot;,&quot;;TEXT([.F46];&quot;0.0000000E+00&quot;);&quot;,&quot;;&quot;lc};&quot;)" office:value-type="string" office:string-value="Point(42) = {3.0031770E-01,6.0017200E-02,0.0000000E+00,lc};" calcext:value-type="string">
            <text:p>Point(42) = {3.0031770E-01,6.0017200E-02,0.0000000E+00,lc};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2784042" calcext:value-type="float">
            <text:p>2.7840420E-01</text:p>
          </table:table-cell>
          <table:table-cell office:value-type="float" office:value="0.0599102" calcext:value-type="float">
            <text:p>5.9910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7];&quot;) = {&quot;;TEXT([.D47];&quot;0.0000000E+00&quot;);&quot;,&quot;;TEXT([.E47];&quot;0.0000000E+00&quot;);&quot;,&quot;;TEXT([.F47];&quot;0.0000000E+00&quot;);&quot;,&quot;;&quot;lc};&quot;)" office:value-type="string" office:string-value="Point(43) = {2.7840420E-01,5.9910200E-02,0.0000000E+00,lc};" calcext:value-type="string">
            <text:p>Point(43) = {2.7840420E-01,5.9910200E-02,0.0000000E+00,lc};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2570083" calcext:value-type="float">
            <text:p>2.5700830E-01</text:p>
          </table:table-cell>
          <table:table-cell office:value-type="float" office:value="0.0595755" calcext:value-type="float">
            <text:p>5.9575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8];&quot;) = {&quot;;TEXT([.D48];&quot;0.0000000E+00&quot;);&quot;,&quot;;TEXT([.E48];&quot;0.0000000E+00&quot;);&quot;,&quot;;TEXT([.F48];&quot;0.0000000E+00&quot;);&quot;,&quot;;&quot;lc};&quot;)" office:value-type="string" office:string-value="Point(44) = {2.5700830E-01,5.9575500E-02,0.0000000E+00,lc};" calcext:value-type="string">
            <text:p>Point(44) = {2.5700830E-01,5.9575500E-02,0.0000000E+00,lc};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2361799" calcext:value-type="float">
            <text:p>2.3617990E-01</text:p>
          </table:table-cell>
          <table:table-cell office:value-type="float" office:value="0.0590081" calcext:value-type="float">
            <text:p>5.9008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49];&quot;) = {&quot;;TEXT([.D49];&quot;0.0000000E+00&quot;);&quot;,&quot;;TEXT([.E49];&quot;0.0000000E+00&quot;);&quot;,&quot;;TEXT([.F49];&quot;0.0000000E+00&quot;);&quot;,&quot;;&quot;lc};&quot;)" office:value-type="string" office:string-value="Point(45) = {2.3617990E-01,5.9008100E-02,0.0000000E+00,lc};" calcext:value-type="string">
            <text:p>Point(45) = {2.3617990E-01,5.9008100E-02,0.0000000E+00,lc};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2159676" calcext:value-type="float">
            <text:p>2.1596760E-01</text:p>
          </table:table-cell>
          <table:table-cell office:value-type="float" office:value="0.0582048" calcext:value-type="float">
            <text:p>5.8204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0];&quot;) = {&quot;;TEXT([.D50];&quot;0.0000000E+00&quot;);&quot;,&quot;;TEXT([.E50];&quot;0.0000000E+00&quot;);&quot;,&quot;;TEXT([.F50];&quot;0.0000000E+00&quot;);&quot;,&quot;;&quot;lc};&quot;)" office:value-type="string" office:string-value="Point(46) = {2.1596760E-01,5.8204800E-02,0.0000000E+00,lc};" calcext:value-type="string">
            <text:p>Point(46) = {2.1596760E-01,5.8204800E-02,0.0000000E+00,lc};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1964187" calcext:value-type="float">
            <text:p>1.9641870E-01</text:p>
          </table:table-cell>
          <table:table-cell office:value-type="float" office:value="0.057164" calcext:value-type="float">
            <text:p>5.7164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1];&quot;) = {&quot;;TEXT([.D51];&quot;0.0000000E+00&quot;);&quot;,&quot;;TEXT([.E51];&quot;0.0000000E+00&quot;);&quot;,&quot;;TEXT([.F51];&quot;0.0000000E+00&quot;);&quot;,&quot;;&quot;lc};&quot;)" office:value-type="string" office:string-value="Point(47) = {1.9641870E-01,5.7164000E-02,0.0000000E+00,lc};" calcext:value-type="string">
            <text:p>Point(47) = {1.9641870E-01,5.7164000E-02,0.0000000E+00,lc};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1775789" calcext:value-type="float">
            <text:p>1.7757890E-01</text:p>
          </table:table-cell>
          <table:table-cell office:value-type="float" office:value="0.0558856" calcext:value-type="float">
            <text:p>5.58856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2];&quot;) = {&quot;;TEXT([.D52];&quot;0.0000000E+00&quot;);&quot;,&quot;;TEXT([.E52];&quot;0.0000000E+00&quot;);&quot;,&quot;;TEXT([.F52];&quot;0.0000000E+00&quot;);&quot;,&quot;;&quot;lc};&quot;)" office:value-type="string" office:string-value="Point(48) = {1.7757890E-01,5.5885600E-02,0.0000000E+00,lc};" calcext:value-type="string">
            <text:p>Point(48) = {1.7757890E-01,5.5885600E-02,0.0000000E+00,lc};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1594921" calcext:value-type="float">
            <text:p>1.5949210E-01</text:p>
          </table:table-cell>
          <table:table-cell office:value-type="float" office:value="0.0543715" calcext:value-type="float">
            <text:p>5.4371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3];&quot;) = {&quot;;TEXT([.D53];&quot;0.0000000E+00&quot;);&quot;,&quot;;TEXT([.E53];&quot;0.0000000E+00&quot;);&quot;,&quot;;TEXT([.F53];&quot;0.0000000E+00&quot;);&quot;,&quot;;&quot;lc};&quot;)" office:value-type="string" office:string-value="Point(49) = {1.5949210E-01,5.4371500E-02,0.0000000E+00,lc};" calcext:value-type="string">
            <text:p>Point(49) = {1.5949210E-01,5.4371500E-02,0.0000000E+00,lc}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1422005" calcext:value-type="float">
            <text:p>1.4220050E-01</text:p>
          </table:table-cell>
          <table:table-cell office:value-type="float" office:value="0.0526251" calcext:value-type="float">
            <text:p>5.2625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4];&quot;) = {&quot;;TEXT([.D54];&quot;0.0000000E+00&quot;);&quot;,&quot;;TEXT([.E54];&quot;0.0000000E+00&quot;);&quot;,&quot;;TEXT([.F54];&quot;0.0000000E+00&quot;);&quot;,&quot;;&quot;lc};&quot;)" office:value-type="string" office:string-value="Point(50) = {1.4220050E-01,5.2625100E-02,0.0000000E+00,lc};" calcext:value-type="string">
            <text:p>Point(50) = {1.4220050E-01,5.2625100E-02,0.0000000E+00,lc};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1257446" calcext:value-type="float">
            <text:p>1.2574460E-01</text:p>
          </table:table-cell>
          <table:table-cell office:value-type="float" office:value="0.0506513" calcext:value-type="float">
            <text:p>5.0651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5];&quot;) = {&quot;;TEXT([.D55];&quot;0.0000000E+00&quot;);&quot;,&quot;;TEXT([.E55];&quot;0.0000000E+00&quot;);&quot;,&quot;;TEXT([.F55];&quot;0.0000000E+00&quot;);&quot;,&quot;;&quot;lc};&quot;)" office:value-type="string" office:string-value="Point(51) = {1.2574460E-01,5.0651300E-02,0.0000000E+00,lc};" calcext:value-type="string">
            <text:p>Point(51) = {1.2574460E-01,5.0651300E-02,0.0000000E+00,lc};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1101628" calcext:value-type="float">
            <text:p>1.1016280E-01</text:p>
          </table:table-cell>
          <table:table-cell office:value-type="float" office:value="0.0484567" calcext:value-type="float">
            <text:p>4.8456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6];&quot;) = {&quot;;TEXT([.D56];&quot;0.0000000E+00&quot;);&quot;,&quot;;TEXT([.E56];&quot;0.0000000E+00&quot;);&quot;,&quot;;TEXT([.F56];&quot;0.0000000E+00&quot;);&quot;,&quot;;&quot;lc};&quot;)" office:value-type="string" office:string-value="Point(52) = {1.1016280E-01,4.8456700E-02,0.0000000E+00,lc};" calcext:value-type="string">
            <text:p>Point(52) = {1.1016280E-01,4.8456700E-02,0.0000000E+00,lc};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0954915" calcext:value-type="float">
            <text:p>9.5491500E-02</text:p>
          </table:table-cell>
          <table:table-cell office:value-type="float" office:value="0.0460489" calcext:value-type="float">
            <text:p>4.6048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7];&quot;) = {&quot;;TEXT([.D57];&quot;0.0000000E+00&quot;);&quot;,&quot;;TEXT([.E57];&quot;0.0000000E+00&quot;);&quot;,&quot;;TEXT([.F57];&quot;0.0000000E+00&quot;);&quot;,&quot;;&quot;lc};&quot;)" office:value-type="string" office:string-value="Point(53) = {9.5491500E-02,4.6048900E-02,0.0000000E+00,lc};" calcext:value-type="string">
            <text:p>Point(53) = {9.5491500E-02,4.6048900E-02,0.0000000E+00,lc};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817649" calcext:value-type="float">
            <text:p>8.1764900E-02</text:p>
          </table:table-cell>
          <table:table-cell office:value-type="float" office:value="0.0434371" calcext:value-type="float">
            <text:p>4.3437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8];&quot;) = {&quot;;TEXT([.D58];&quot;0.0000000E+00&quot;);&quot;,&quot;;TEXT([.E58];&quot;0.0000000E+00&quot;);&quot;,&quot;;TEXT([.F58];&quot;0.0000000E+00&quot;);&quot;,&quot;;&quot;lc};&quot;)" office:value-type="string" office:string-value="Point(54) = {8.1764900E-02,4.3437100E-02,0.0000000E+00,lc};" calcext:value-type="string">
            <text:p>Point(54) = {8.1764900E-02,4.3437100E-02,0.0000000E+00,lc};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0690152" calcext:value-type="float">
            <text:p>6.9015200E-02</text:p>
          </table:table-cell>
          <table:table-cell office:value-type="float" office:value="0.040631" calcext:value-type="float">
            <text:p>4.0631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59];&quot;) = {&quot;;TEXT([.D59];&quot;0.0000000E+00&quot;);&quot;,&quot;;TEXT([.E59];&quot;0.0000000E+00&quot;);&quot;,&quot;;TEXT([.F59];&quot;0.0000000E+00&quot;);&quot;,&quot;;&quot;lc};&quot;)" office:value-type="string" office:string-value="Point(55) = {6.9015200E-02,4.0631000E-02,0.0000000E+00,lc};" calcext:value-type="string">
            <text:p>Point(55) = {6.9015200E-02,4.0631000E-02,0.0000000E+00,lc};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057272" calcext:value-type="float">
            <text:p>5.7272000E-02</text:p>
          </table:table-cell>
          <table:table-cell office:value-type="float" office:value="0.0376414" calcext:value-type="float">
            <text:p>3.76414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0];&quot;) = {&quot;;TEXT([.D60];&quot;0.0000000E+00&quot;);&quot;,&quot;;TEXT([.E60];&quot;0.0000000E+00&quot;);&quot;,&quot;;TEXT([.F60];&quot;0.0000000E+00&quot;);&quot;,&quot;;&quot;lc};&quot;)" office:value-type="string" office:string-value="Point(56) = {5.7272000E-02,3.7641400E-02,0.0000000E+00,lc};" calcext:value-type="string">
            <text:p>Point(56) = {5.7272000E-02,3.7641400E-02,0.0000000E+00,lc};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0465628" calcext:value-type="float">
            <text:p>4.6562800E-02</text:p>
          </table:table-cell>
          <table:table-cell office:value-type="float" office:value="0.0344792" calcext:value-type="float">
            <text:p>3.4479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1];&quot;) = {&quot;;TEXT([.D61];&quot;0.0000000E+00&quot;);&quot;,&quot;;TEXT([.E61];&quot;0.0000000E+00&quot;);&quot;,&quot;;TEXT([.F61];&quot;0.0000000E+00&quot;);&quot;,&quot;;&quot;lc};&quot;)" office:value-type="string" office:string-value="Point(57) = {4.6562800E-02,3.4479200E-02,0.0000000E+00,lc};" calcext:value-type="string">
            <text:p>Point(57) = {4.6562800E-02,3.4479200E-02,0.0000000E+00,lc};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0369127" calcext:value-type="float">
            <text:p>3.6912700E-02</text:p>
          </table:table-cell>
          <table:table-cell office:value-type="float" office:value="0.0311559" calcext:value-type="float">
            <text:p>3.1155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2];&quot;) = {&quot;;TEXT([.D62];&quot;0.0000000E+00&quot;);&quot;,&quot;;TEXT([.E62];&quot;0.0000000E+00&quot;);&quot;,&quot;;TEXT([.F62];&quot;0.0000000E+00&quot;);&quot;,&quot;;&quot;lc};&quot;)" office:value-type="string" office:string-value="Point(58) = {3.6912700E-02,3.1155900E-02,0.0000000E+00,lc};" calcext:value-type="string">
            <text:p>Point(58) = {3.6912700E-02,3.1155900E-02,0.0000000E+00,lc};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0283441" calcext:value-type="float">
            <text:p>2.8344100E-02</text:p>
          </table:table-cell>
          <table:table-cell office:value-type="float" office:value="0.0276827" calcext:value-type="float">
            <text:p>2.7682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3];&quot;) = {&quot;;TEXT([.D63];&quot;0.0000000E+00&quot;);&quot;,&quot;;TEXT([.E63];&quot;0.0000000E+00&quot;);&quot;,&quot;;TEXT([.F63];&quot;0.0000000E+00&quot;);&quot;,&quot;;&quot;lc};&quot;)" office:value-type="string" office:string-value="Point(59) = {2.8344100E-02,2.7682700E-02,0.0000000E+00,lc};" calcext:value-type="string">
            <text:p>Point(59) = {2.8344100E-02,2.7682700E-02,0.0000000E+00,lc};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208771" calcext:value-type="float">
            <text:p>2.0877100E-02</text:p>
          </table:table-cell>
          <table:table-cell office:value-type="float" office:value="0.0240706" calcext:value-type="float">
            <text:p>2.40706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4];&quot;) = {&quot;;TEXT([.D64];&quot;0.0000000E+00&quot;);&quot;,&quot;;TEXT([.E64];&quot;0.0000000E+00&quot;);&quot;,&quot;;TEXT([.F64];&quot;0.0000000E+00&quot;);&quot;,&quot;;&quot;lc};&quot;)" office:value-type="string" office:string-value="Point(60) = {2.0877100E-02,2.4070600E-02,0.0000000E+00,lc};" calcext:value-type="string">
            <text:p>Point(60) = {2.0877100E-02,2.4070600E-02,0.0000000E+00,lc};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0145291" calcext:value-type="float">
            <text:p>1.4529100E-02</text:p>
          </table:table-cell>
          <table:table-cell office:value-type="float" office:value="0.02033" calcext:value-type="float">
            <text:p>2.0330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5];&quot;) = {&quot;;TEXT([.D65];&quot;0.0000000E+00&quot;);&quot;,&quot;;TEXT([.E65];&quot;0.0000000E+00&quot;);&quot;,&quot;;TEXT([.F65];&quot;0.0000000E+00&quot;);&quot;,&quot;;&quot;lc};&quot;)" office:value-type="string" office:string-value="Point(61) = {1.4529100E-02,2.0330000E-02,0.0000000E+00,lc};" calcext:value-type="string">
            <text:p>Point(61) = {1.4529100E-02,2.0330000E-02,0.0000000E+00,lc};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0093149" calcext:value-type="float">
            <text:p>9.3149000E-03</text:p>
          </table:table-cell>
          <table:table-cell office:value-type="float" office:value="0.0164706" calcext:value-type="float">
            <text:p>1.64706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6];&quot;) = {&quot;;TEXT([.D66];&quot;0.0000000E+00&quot;);&quot;,&quot;;TEXT([.E66];&quot;0.0000000E+00&quot;);&quot;,&quot;;TEXT([.F66];&quot;0.0000000E+00&quot;);&quot;,&quot;;&quot;lc};&quot;)" office:value-type="string" office:string-value="Point(62) = {9.3149000E-03,1.6470600E-02,0.0000000E+00,lc};" calcext:value-type="string">
            <text:p>Point(62) = {9.3149000E-03,1.6470600E-02,0.0000000E+00,lc};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0052468" calcext:value-type="float">
            <text:p>5.2468000E-03</text:p>
          </table:table-cell>
          <table:table-cell office:value-type="float" office:value="0.0125011" calcext:value-type="float">
            <text:p>1.2501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7];&quot;) = {&quot;;TEXT([.D67];&quot;0.0000000E+00&quot;);&quot;,&quot;;TEXT([.E67];&quot;0.0000000E+00&quot;);&quot;,&quot;;TEXT([.F67];&quot;0.0000000E+00&quot;);&quot;,&quot;;&quot;lc};&quot;)" office:value-type="string" office:string-value="Point(63) = {5.2468000E-03,1.2501100E-02,0.0000000E+00,lc};" calcext:value-type="string">
            <text:p>Point(63) = {5.2468000E-03,1.2501100E-02,0.0000000E+00,lc};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23342" calcext:value-type="float">
            <text:p>2.3342000E-03</text:p>
          </table:table-cell>
          <table:table-cell office:value-type="float" office:value="0.0084289" calcext:value-type="float">
            <text:p>8.4289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8];&quot;) = {&quot;;TEXT([.D68];&quot;0.0000000E+00&quot;);&quot;,&quot;;TEXT([.E68];&quot;0.0000000E+00&quot;);&quot;,&quot;;TEXT([.F68];&quot;0.0000000E+00&quot;);&quot;,&quot;;&quot;lc};&quot;)" office:value-type="string" office:string-value="Point(64) = {2.3342000E-03,8.4289000E-03,0.0000000E+00,lc};" calcext:value-type="string">
            <text:p>Point(64) = {2.3342000E-03,8.4289000E-03,0.0000000E+00,lc};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0005839" calcext:value-type="float">
            <text:p>5.8390000E-04</text:p>
          </table:table-cell>
          <table:table-cell office:value-type="float" office:value="0.0042603" calcext:value-type="float">
            <text:p>4.2603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69];&quot;) = {&quot;;TEXT([.D69];&quot;0.0000000E+00&quot;);&quot;,&quot;;TEXT([.E69];&quot;0.0000000E+00&quot;);&quot;,&quot;;TEXT([.F69];&quot;0.0000000E+00&quot;);&quot;,&quot;;&quot;lc};&quot;)" office:value-type="string" office:string-value="Point(65) = {5.8390000E-04,4.2603000E-03,0.0000000E+00,lc};" calcext:value-type="string">
            <text:p>Point(65) = {5.8390000E-04,4.2603000E-03,0.0000000E+00,lc};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.0000000E+00</text:p>
          </table:table-cell>
          <table:table-cell/>
          <table:table-cell table:formula="of:=CONCATENATE(&quot;Point(&quot;;[.C70];&quot;) = {&quot;;TEXT([.D70];&quot;0.0000000E+00&quot;);&quot;,&quot;;TEXT([.E70];&quot;0.0000000E+00&quot;);&quot;,&quot;;TEXT([.F70];&quot;0.0000000E+00&quot;);&quot;,&quot;;&quot;lc};&quot;)" office:value-type="string" office:string-value="Point(66) = {0.0000000E+00,0.0000000E+00,0.0000000E+00,lc};" calcext:value-type="string">
            <text:p>Point(66) = {0.0000000E+00,0.0000000E+00,0.0000000E+00,lc};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0005839" calcext:value-type="float">
            <text:p>5.8390000E-04</text:p>
          </table:table-cell>
          <table:table-cell office:value-type="float" office:value="-0.0042603" calcext:value-type="float">
            <text:p>-4.2603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1];&quot;) = {&quot;;TEXT([.D71];&quot;0.0000000E+00&quot;);&quot;,&quot;;TEXT([.E71];&quot;0.0000000E+00&quot;);&quot;,&quot;;TEXT([.F71];&quot;0.0000000E+00&quot;);&quot;,&quot;;&quot;lc};&quot;)" office:value-type="string" office:string-value="Point(67) = {5.8390000E-04,-4.2603000E-03,0.0000000E+00,lc};" calcext:value-type="string">
            <text:p>Point(67) = {5.8390000E-04,-4.2603000E-03,0.0000000E+00,lc};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0023342" calcext:value-type="float">
            <text:p>2.3342000E-03</text:p>
          </table:table-cell>
          <table:table-cell office:value-type="float" office:value="-0.0084289" calcext:value-type="float">
            <text:p>-8.4289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2];&quot;) = {&quot;;TEXT([.D72];&quot;0.0000000E+00&quot;);&quot;,&quot;;TEXT([.E72];&quot;0.0000000E+00&quot;);&quot;,&quot;;TEXT([.F72];&quot;0.0000000E+00&quot;);&quot;,&quot;;&quot;lc};&quot;)" office:value-type="string" office:string-value="Point(68) = {2.3342000E-03,-8.4289000E-03,0.0000000E+00,lc};" calcext:value-type="string">
            <text:p>Point(68) = {2.3342000E-03,-8.4289000E-03,0.0000000E+00,lc};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0052468" calcext:value-type="float">
            <text:p>5.2468000E-03</text:p>
          </table:table-cell>
          <table:table-cell office:value-type="float" office:value="-0.0125011" calcext:value-type="float">
            <text:p>-1.2501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3];&quot;) = {&quot;;TEXT([.D73];&quot;0.0000000E+00&quot;);&quot;,&quot;;TEXT([.E73];&quot;0.0000000E+00&quot;);&quot;,&quot;;TEXT([.F73];&quot;0.0000000E+00&quot;);&quot;,&quot;;&quot;lc};&quot;)" office:value-type="string" office:string-value="Point(69) = {5.2468000E-03,-1.2501100E-02,0.0000000E+00,lc};" calcext:value-type="string">
            <text:p>Point(69) = {5.2468000E-03,-1.2501100E-02,0.0000000E+00,lc};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0093149" calcext:value-type="float">
            <text:p>9.3149000E-03</text:p>
          </table:table-cell>
          <table:table-cell office:value-type="float" office:value="-0.0164706" calcext:value-type="float">
            <text:p>-1.64706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4];&quot;) = {&quot;;TEXT([.D74];&quot;0.0000000E+00&quot;);&quot;,&quot;;TEXT([.E74];&quot;0.0000000E+00&quot;);&quot;,&quot;;TEXT([.F74];&quot;0.0000000E+00&quot;);&quot;,&quot;;&quot;lc};&quot;)" office:value-type="string" office:string-value="Point(70) = {9.3149000E-03,-1.6470600E-02,0.0000000E+00,lc};" calcext:value-type="string">
            <text:p>Point(70) = {9.3149000E-03,-1.6470600E-02,0.0000000E+00,lc};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0145291" calcext:value-type="float">
            <text:p>1.4529100E-02</text:p>
          </table:table-cell>
          <table:table-cell office:value-type="float" office:value="-0.02033" calcext:value-type="float">
            <text:p>-2.0330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5];&quot;) = {&quot;;TEXT([.D75];&quot;0.0000000E+00&quot;);&quot;,&quot;;TEXT([.E75];&quot;0.0000000E+00&quot;);&quot;,&quot;;TEXT([.F75];&quot;0.0000000E+00&quot;);&quot;,&quot;;&quot;lc};&quot;)" office:value-type="string" office:string-value="Point(71) = {1.4529100E-02,-2.0330000E-02,0.0000000E+00,lc};" calcext:value-type="string">
            <text:p>Point(71) = {1.4529100E-02,-2.0330000E-02,0.0000000E+00,lc};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0208771" calcext:value-type="float">
            <text:p>2.0877100E-02</text:p>
          </table:table-cell>
          <table:table-cell office:value-type="float" office:value="-0.0240706" calcext:value-type="float">
            <text:p>-2.40706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6];&quot;) = {&quot;;TEXT([.D76];&quot;0.0000000E+00&quot;);&quot;,&quot;;TEXT([.E76];&quot;0.0000000E+00&quot;);&quot;,&quot;;TEXT([.F76];&quot;0.0000000E+00&quot;);&quot;,&quot;;&quot;lc};&quot;)" office:value-type="string" office:string-value="Point(72) = {2.0877100E-02,-2.4070600E-02,0.0000000E+00,lc};" calcext:value-type="string">
            <text:p>Point(72) = {2.0877100E-02,-2.4070600E-02,0.0000000E+00,lc};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0283441" calcext:value-type="float">
            <text:p>2.8344100E-02</text:p>
          </table:table-cell>
          <table:table-cell office:value-type="float" office:value="-0.0276827" calcext:value-type="float">
            <text:p>-2.7682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7];&quot;) = {&quot;;TEXT([.D77];&quot;0.0000000E+00&quot;);&quot;,&quot;;TEXT([.E77];&quot;0.0000000E+00&quot;);&quot;,&quot;;TEXT([.F77];&quot;0.0000000E+00&quot;);&quot;,&quot;;&quot;lc};&quot;)" office:value-type="string" office:string-value="Point(73) = {2.8344100E-02,-2.7682700E-02,0.0000000E+00,lc};" calcext:value-type="string">
            <text:p>Point(73) = {2.8344100E-02,-2.7682700E-02,0.0000000E+00,lc};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0369127" calcext:value-type="float">
            <text:p>3.6912700E-02</text:p>
          </table:table-cell>
          <table:table-cell office:value-type="float" office:value="-0.0311559" calcext:value-type="float">
            <text:p>-3.1155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8];&quot;) = {&quot;;TEXT([.D78];&quot;0.0000000E+00&quot;);&quot;,&quot;;TEXT([.E78];&quot;0.0000000E+00&quot;);&quot;,&quot;;TEXT([.F78];&quot;0.0000000E+00&quot;);&quot;,&quot;;&quot;lc};&quot;)" office:value-type="string" office:string-value="Point(74) = {3.6912700E-02,-3.1155900E-02,0.0000000E+00,lc};" calcext:value-type="string">
            <text:p>Point(74) = {3.6912700E-02,-3.1155900E-02,0.0000000E+00,lc};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0465628" calcext:value-type="float">
            <text:p>4.6562800E-02</text:p>
          </table:table-cell>
          <table:table-cell office:value-type="float" office:value="-0.0344792" calcext:value-type="float">
            <text:p>-3.4479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79];&quot;) = {&quot;;TEXT([.D79];&quot;0.0000000E+00&quot;);&quot;,&quot;;TEXT([.E79];&quot;0.0000000E+00&quot;);&quot;,&quot;;TEXT([.F79];&quot;0.0000000E+00&quot;);&quot;,&quot;;&quot;lc};&quot;)" office:value-type="string" office:string-value="Point(75) = {4.6562800E-02,-3.4479200E-02,0.0000000E+00,lc};" calcext:value-type="string">
            <text:p>Point(75) = {4.6562800E-02,-3.4479200E-02,0.0000000E+00,lc};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057272" calcext:value-type="float">
            <text:p>5.7272000E-02</text:p>
          </table:table-cell>
          <table:table-cell office:value-type="float" office:value="-0.0376414" calcext:value-type="float">
            <text:p>-3.76414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0];&quot;) = {&quot;;TEXT([.D80];&quot;0.0000000E+00&quot;);&quot;,&quot;;TEXT([.E80];&quot;0.0000000E+00&quot;);&quot;,&quot;;TEXT([.F80];&quot;0.0000000E+00&quot;);&quot;,&quot;;&quot;lc};&quot;)" office:value-type="string" office:string-value="Point(76) = {5.7272000E-02,-3.7641400E-02,0.0000000E+00,lc};" calcext:value-type="string">
            <text:p>Point(76) = {5.7272000E-02,-3.7641400E-02,0.0000000E+00,lc};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0690152" calcext:value-type="float">
            <text:p>6.9015200E-02</text:p>
          </table:table-cell>
          <table:table-cell office:value-type="float" office:value="-0.040631" calcext:value-type="float">
            <text:p>-4.0631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1];&quot;) = {&quot;;TEXT([.D81];&quot;0.0000000E+00&quot;);&quot;,&quot;;TEXT([.E81];&quot;0.0000000E+00&quot;);&quot;,&quot;;TEXT([.F81];&quot;0.0000000E+00&quot;);&quot;,&quot;;&quot;lc};&quot;)" office:value-type="string" office:string-value="Point(77) = {6.9015200E-02,-4.0631000E-02,0.0000000E+00,lc};" calcext:value-type="string">
            <text:p>Point(77) = {6.9015200E-02,-4.0631000E-02,0.0000000E+00,lc};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0817649" calcext:value-type="float">
            <text:p>8.1764900E-02</text:p>
          </table:table-cell>
          <table:table-cell office:value-type="float" office:value="-0.0434371" calcext:value-type="float">
            <text:p>-4.3437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2];&quot;) = {&quot;;TEXT([.D82];&quot;0.0000000E+00&quot;);&quot;,&quot;;TEXT([.E82];&quot;0.0000000E+00&quot;);&quot;,&quot;;TEXT([.F82];&quot;0.0000000E+00&quot;);&quot;,&quot;;&quot;lc};&quot;)" office:value-type="string" office:string-value="Point(78) = {8.1764900E-02,-4.3437100E-02,0.0000000E+00,lc};" calcext:value-type="string">
            <text:p>Point(78) = {8.1764900E-02,-4.3437100E-02,0.0000000E+00,lc};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0954915" calcext:value-type="float">
            <text:p>9.5491500E-02</text:p>
          </table:table-cell>
          <table:table-cell office:value-type="float" office:value="-0.0460489" calcext:value-type="float">
            <text:p>-4.6048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3];&quot;) = {&quot;;TEXT([.D83];&quot;0.0000000E+00&quot;);&quot;,&quot;;TEXT([.E83];&quot;0.0000000E+00&quot;);&quot;,&quot;;TEXT([.F83];&quot;0.0000000E+00&quot;);&quot;,&quot;;&quot;lc};&quot;)" office:value-type="string" office:string-value="Point(79) = {9.5491500E-02,-4.6048900E-02,0.0000000E+00,lc};" calcext:value-type="string">
            <text:p>Point(79) = {9.5491500E-02,-4.6048900E-02,0.0000000E+00,lc};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1101628" calcext:value-type="float">
            <text:p>1.1016280E-01</text:p>
          </table:table-cell>
          <table:table-cell office:value-type="float" office:value="-0.0484567" calcext:value-type="float">
            <text:p>-4.8456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4];&quot;) = {&quot;;TEXT([.D84];&quot;0.0000000E+00&quot;);&quot;,&quot;;TEXT([.E84];&quot;0.0000000E+00&quot;);&quot;,&quot;;TEXT([.F84];&quot;0.0000000E+00&quot;);&quot;,&quot;;&quot;lc};&quot;)" office:value-type="string" office:string-value="Point(80) = {1.1016280E-01,-4.8456700E-02,0.0000000E+00,lc};" calcext:value-type="string">
            <text:p>Point(80) = {1.1016280E-01,-4.8456700E-02,0.0000000E+00,lc};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1257446" calcext:value-type="float">
            <text:p>1.2574460E-01</text:p>
          </table:table-cell>
          <table:table-cell office:value-type="float" office:value="-0.0506513" calcext:value-type="float">
            <text:p>-5.0651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5];&quot;) = {&quot;;TEXT([.D85];&quot;0.0000000E+00&quot;);&quot;,&quot;;TEXT([.E85];&quot;0.0000000E+00&quot;);&quot;,&quot;;TEXT([.F85];&quot;0.0000000E+00&quot;);&quot;,&quot;;&quot;lc};&quot;)" office:value-type="string" office:string-value="Point(81) = {1.2574460E-01,-5.0651300E-02,0.0000000E+00,lc};" calcext:value-type="string">
            <text:p>Point(81) = {1.2574460E-01,-5.0651300E-02,0.0000000E+00,lc};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1422005" calcext:value-type="float">
            <text:p>1.4220050E-01</text:p>
          </table:table-cell>
          <table:table-cell office:value-type="float" office:value="-0.0526251" calcext:value-type="float">
            <text:p>-5.2625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6];&quot;) = {&quot;;TEXT([.D86];&quot;0.0000000E+00&quot;);&quot;,&quot;;TEXT([.E86];&quot;0.0000000E+00&quot;);&quot;,&quot;;TEXT([.F86];&quot;0.0000000E+00&quot;);&quot;,&quot;;&quot;lc};&quot;)" office:value-type="string" office:string-value="Point(82) = {1.4220050E-01,-5.2625100E-02,0.0000000E+00,lc};" calcext:value-type="string">
            <text:p>Point(82) = {1.4220050E-01,-5.2625100E-02,0.0000000E+00,lc};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1594921" calcext:value-type="float">
            <text:p>1.5949210E-01</text:p>
          </table:table-cell>
          <table:table-cell office:value-type="float" office:value="-0.0543715" calcext:value-type="float">
            <text:p>-5.4371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7];&quot;) = {&quot;;TEXT([.D87];&quot;0.0000000E+00&quot;);&quot;,&quot;;TEXT([.E87];&quot;0.0000000E+00&quot;);&quot;,&quot;;TEXT([.F87];&quot;0.0000000E+00&quot;);&quot;,&quot;;&quot;lc};&quot;)" office:value-type="string" office:string-value="Point(83) = {1.5949210E-01,-5.4371500E-02,0.0000000E+00,lc};" calcext:value-type="string">
            <text:p>Point(83) = {1.5949210E-01,-5.4371500E-02,0.0000000E+00,lc};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1775789" calcext:value-type="float">
            <text:p>1.7757890E-01</text:p>
          </table:table-cell>
          <table:table-cell office:value-type="float" office:value="-0.0558856" calcext:value-type="float">
            <text:p>-5.58856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8];&quot;) = {&quot;;TEXT([.D88];&quot;0.0000000E+00&quot;);&quot;,&quot;;TEXT([.E88];&quot;0.0000000E+00&quot;);&quot;,&quot;;TEXT([.F88];&quot;0.0000000E+00&quot;);&quot;,&quot;;&quot;lc};&quot;)" office:value-type="string" office:string-value="Point(84) = {1.7757890E-01,-5.5885600E-02,0.0000000E+00,lc};" calcext:value-type="string">
            <text:p>Point(84) = {1.7757890E-01,-5.5885600E-02,0.0000000E+00,lc};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1964187" calcext:value-type="float">
            <text:p>1.9641870E-01</text:p>
          </table:table-cell>
          <table:table-cell office:value-type="float" office:value="-0.057164" calcext:value-type="float">
            <text:p>-5.7164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89];&quot;) = {&quot;;TEXT([.D89];&quot;0.0000000E+00&quot;);&quot;,&quot;;TEXT([.E89];&quot;0.0000000E+00&quot;);&quot;,&quot;;TEXT([.F89];&quot;0.0000000E+00&quot;);&quot;,&quot;;&quot;lc};&quot;)" office:value-type="string" office:string-value="Point(85) = {1.9641870E-01,-5.7164000E-02,0.0000000E+00,lc};" calcext:value-type="string">
            <text:p>Point(85) = {1.9641870E-01,-5.7164000E-02,0.0000000E+00,lc};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2159676" calcext:value-type="float">
            <text:p>2.1596760E-01</text:p>
          </table:table-cell>
          <table:table-cell office:value-type="float" office:value="-0.0582048" calcext:value-type="float">
            <text:p>-5.8204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0];&quot;) = {&quot;;TEXT([.D90];&quot;0.0000000E+00&quot;);&quot;,&quot;;TEXT([.E90];&quot;0.0000000E+00&quot;);&quot;,&quot;;TEXT([.F90];&quot;0.0000000E+00&quot;);&quot;,&quot;;&quot;lc};&quot;)" office:value-type="string" office:string-value="Point(86) = {2.1596760E-01,-5.8204800E-02,0.0000000E+00,lc};" calcext:value-type="string">
            <text:p>Point(86) = {2.1596760E-01,-5.8204800E-02,0.0000000E+00,lc};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2361799" calcext:value-type="float">
            <text:p>2.3617990E-01</text:p>
          </table:table-cell>
          <table:table-cell office:value-type="float" office:value="-0.0590081" calcext:value-type="float">
            <text:p>-5.9008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1];&quot;) = {&quot;;TEXT([.D91];&quot;0.0000000E+00&quot;);&quot;,&quot;;TEXT([.E91];&quot;0.0000000E+00&quot;);&quot;,&quot;;TEXT([.F91];&quot;0.0000000E+00&quot;);&quot;,&quot;;&quot;lc};&quot;)" office:value-type="string" office:string-value="Point(87) = {2.3617990E-01,-5.9008100E-02,0.0000000E+00,lc};" calcext:value-type="string">
            <text:p>Point(87) = {2.3617990E-01,-5.9008100E-02,0.0000000E+00,lc};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2570083" calcext:value-type="float">
            <text:p>2.5700830E-01</text:p>
          </table:table-cell>
          <table:table-cell office:value-type="float" office:value="-0.0595755" calcext:value-type="float">
            <text:p>-5.9575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2];&quot;) = {&quot;;TEXT([.D92];&quot;0.0000000E+00&quot;);&quot;,&quot;;TEXT([.E92];&quot;0.0000000E+00&quot;);&quot;,&quot;;TEXT([.F92];&quot;0.0000000E+00&quot;);&quot;,&quot;;&quot;lc};&quot;)" office:value-type="string" office:string-value="Point(88) = {2.5700830E-01,-5.9575500E-02,0.0000000E+00,lc};" calcext:value-type="string">
            <text:p>Point(88) = {2.5700830E-01,-5.9575500E-02,0.0000000E+00,lc};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2784042" calcext:value-type="float">
            <text:p>2.7840420E-01</text:p>
          </table:table-cell>
          <table:table-cell office:value-type="float" office:value="-0.0599102" calcext:value-type="float">
            <text:p>-5.9910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3];&quot;) = {&quot;;TEXT([.D93];&quot;0.0000000E+00&quot;);&quot;,&quot;;TEXT([.E93];&quot;0.0000000E+00&quot;);&quot;,&quot;;TEXT([.F93];&quot;0.0000000E+00&quot;);&quot;,&quot;;&quot;lc};&quot;)" office:value-type="string" office:string-value="Point(89) = {2.7840420E-01,-5.9910200E-02,0.0000000E+00,lc};" calcext:value-type="string">
            <text:p>Point(89) = {2.7840420E-01,-5.9910200E-02,0.0000000E+00,lc};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3003177" calcext:value-type="float">
            <text:p>3.0031770E-01</text:p>
          </table:table-cell>
          <table:table-cell office:value-type="float" office:value="-0.0600172" calcext:value-type="float">
            <text:p>-6.0017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4];&quot;) = {&quot;;TEXT([.D94];&quot;0.0000000E+00&quot;);&quot;,&quot;;TEXT([.E94];&quot;0.0000000E+00&quot;);&quot;,&quot;;TEXT([.F94];&quot;0.0000000E+00&quot;);&quot;,&quot;;&quot;lc};&quot;)" office:value-type="string" office:string-value="Point(90) = {3.0031770E-01,-6.0017200E-02,0.0000000E+00,lc};" calcext:value-type="string">
            <text:p>Point(90) = {3.0031770E-01,-6.0017200E-02,0.0000000E+00,lc};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3226976" calcext:value-type="float">
            <text:p>3.2269760E-01</text:p>
          </table:table-cell>
          <table:table-cell office:value-type="float" office:value="-0.0599028" calcext:value-type="float">
            <text:p>-5.9902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5];&quot;) = {&quot;;TEXT([.D95];&quot;0.0000000E+00&quot;);&quot;,&quot;;TEXT([.E95];&quot;0.0000000E+00&quot;);&quot;,&quot;;TEXT([.F95];&quot;0.0000000E+00&quot;);&quot;,&quot;;&quot;lc};&quot;)" office:value-type="string" office:string-value="Point(91) = {3.2269760E-01,-5.9902800E-02,0.0000000E+00,lc};" calcext:value-type="string">
            <text:p>Point(91) = {3.2269760E-01,-5.9902800E-02,0.0000000E+00,lc};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3454915" calcext:value-type="float">
            <text:p>3.4549150E-01</text:p>
          </table:table-cell>
          <table:table-cell office:value-type="float" office:value="-0.0595747" calcext:value-type="float">
            <text:p>-5.9574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6];&quot;) = {&quot;;TEXT([.D96];&quot;0.0000000E+00&quot;);&quot;,&quot;;TEXT([.E96];&quot;0.0000000E+00&quot;);&quot;,&quot;;TEXT([.F96];&quot;0.0000000E+00&quot;);&quot;,&quot;;&quot;lc};&quot;)" office:value-type="string" office:string-value="Point(92) = {3.4549150E-01,-5.9574700E-02,0.0000000E+00,lc};" calcext:value-type="string">
            <text:p>Point(92) = {3.4549150E-01,-5.9574700E-02,0.0000000E+00,lc};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3686463" calcext:value-type="float">
            <text:p>3.6864630E-01</text:p>
          </table:table-cell>
          <table:table-cell office:value-type="float" office:value="-0.0590419" calcext:value-type="float">
            <text:p>-5.9041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7];&quot;) = {&quot;;TEXT([.D97];&quot;0.0000000E+00&quot;);&quot;,&quot;;TEXT([.E97];&quot;0.0000000E+00&quot;);&quot;,&quot;;TEXT([.F97];&quot;0.0000000E+00&quot;);&quot;,&quot;;&quot;lc};&quot;)" office:value-type="string" office:string-value="Point(93) = {3.6864630E-01,-5.9041900E-02,0.0000000E+00,lc};" calcext:value-type="string">
            <text:p>Point(93) = {3.6864630E-01,-5.9041900E-02,0.0000000E+00,lc};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3921079" calcext:value-type="float">
            <text:p>3.9210790E-01</text:p>
          </table:table-cell>
          <table:table-cell office:value-type="float" office:value="-0.0583145" calcext:value-type="float">
            <text:p>-5.8314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8];&quot;) = {&quot;;TEXT([.D98];&quot;0.0000000E+00&quot;);&quot;,&quot;;TEXT([.E98];&quot;0.0000000E+00&quot;);&quot;,&quot;;TEXT([.F98];&quot;0.0000000E+00&quot;);&quot;,&quot;;&quot;lc};&quot;)" office:value-type="string" office:string-value="Point(94) = {3.9210790E-01,-5.8314500E-02,0.0000000E+00,lc};" calcext:value-type="string">
            <text:p>Point(94) = {3.9210790E-01,-5.8314500E-02,0.0000000E+00,lc}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4158215" calcext:value-type="float">
            <text:p>4.1582150E-01</text:p>
          </table:table-cell>
          <table:table-cell office:value-type="float" office:value="-0.0574033" calcext:value-type="float">
            <text:p>-5.7403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99];&quot;) = {&quot;;TEXT([.D99];&quot;0.0000000E+00&quot;);&quot;,&quot;;TEXT([.E99];&quot;0.0000000E+00&quot;);&quot;,&quot;;TEXT([.F99];&quot;0.0000000E+00&quot;);&quot;,&quot;;&quot;lc};&quot;)" office:value-type="string" office:string-value="Point(95) = {4.1582150E-01,-5.7403300E-02,0.0000000E+00,lc};" calcext:value-type="string">
            <text:p>Point(95) = {4.1582150E-01,-5.7403300E-02,0.0000000E+00,lc};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4397317" calcext:value-type="float">
            <text:p>4.3973170E-01</text:p>
          </table:table-cell>
          <table:table-cell office:value-type="float" office:value="-0.05632" calcext:value-type="float">
            <text:p>-5.6320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0];&quot;) = {&quot;;TEXT([.D100];&quot;0.0000000E+00&quot;);&quot;,&quot;;TEXT([.E100];&quot;0.0000000E+00&quot;);&quot;,&quot;;TEXT([.F100];&quot;0.0000000E+00&quot;);&quot;,&quot;;&quot;lc};&quot;)" office:value-type="string" office:string-value="Point(96) = {4.3973170E-01,-5.6320000E-02,0.0000000E+00,lc};" calcext:value-type="string">
            <text:p>Point(96) = {4.3973170E-01,-5.6320000E-02,0.0000000E+00,lc};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4637826" calcext:value-type="float">
            <text:p>4.6378260E-01</text:p>
          </table:table-cell>
          <table:table-cell office:value-type="float" office:value="-0.0550769" calcext:value-type="float">
            <text:p>-5.5076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1];&quot;) = {&quot;;TEXT([.D101];&quot;0.0000000E+00&quot;);&quot;,&quot;;TEXT([.E101];&quot;0.0000000E+00&quot;);&quot;,&quot;;TEXT([.F101];&quot;0.0000000E+00&quot;);&quot;,&quot;;&quot;lc};&quot;)" office:value-type="string" office:string-value="Point(97) = {4.6378260E-01,-5.5076900E-02,0.0000000E+00,lc};" calcext:value-type="string">
            <text:p>Point(97) = {4.6378260E-01,-5.5076900E-02,0.0000000E+00,lc};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4879181" calcext:value-type="float">
            <text:p>4.8791810E-01</text:p>
          </table:table-cell>
          <table:table-cell office:value-type="float" office:value="-0.0536866" calcext:value-type="float">
            <text:p>-5.36866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2];&quot;) = {&quot;;TEXT([.D102];&quot;0.0000000E+00&quot;);&quot;,&quot;;TEXT([.E102];&quot;0.0000000E+00&quot;);&quot;,&quot;;TEXT([.F102];&quot;0.0000000E+00&quot;);&quot;,&quot;;&quot;lc};&quot;)" office:value-type="string" office:string-value="Point(98) = {4.8791810E-01,-5.3686600E-02,0.0000000E+00,lc};" calcext:value-type="string">
            <text:p>Point(98) = {4.8791810E-01,-5.3686600E-02,0.0000000E+00,lc};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5120819" calcext:value-type="float">
            <text:p>5.1208190E-01</text:p>
          </table:table-cell>
          <table:table-cell office:value-type="float" office:value="-0.052162" calcext:value-type="float">
            <text:p>-5.2162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3];&quot;) = {&quot;;TEXT([.D103];&quot;0.0000000E+00&quot;);&quot;,&quot;;TEXT([.E103];&quot;0.0000000E+00&quot;);&quot;,&quot;;TEXT([.F103];&quot;0.0000000E+00&quot;);&quot;,&quot;;&quot;lc};&quot;)" office:value-type="string" office:string-value="Point(99) = {5.1208190E-01,-5.2162000E-02,0.0000000E+00,lc};" calcext:value-type="string">
            <text:p>Point(99) = {5.1208190E-01,-5.2162000E-02,0.0000000E+00,lc};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5362174" calcext:value-type="float">
            <text:p>5.3621740E-01</text:p>
          </table:table-cell>
          <table:table-cell office:value-type="float" office:value="-0.0505161" calcext:value-type="float">
            <text:p>-5.0516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4];&quot;) = {&quot;;TEXT([.D104];&quot;0.0000000E+00&quot;);&quot;,&quot;;TEXT([.E104];&quot;0.0000000E+00&quot;);&quot;,&quot;;TEXT([.F104];&quot;0.0000000E+00&quot;);&quot;,&quot;;&quot;lc};&quot;)" office:value-type="string" office:string-value="Point(100) = {5.3621740E-01,-5.0516100E-02,0.0000000E+00,lc};" calcext:value-type="string">
            <text:p>Point(100) = {5.3621740E-01,-5.0516100E-02,0.0000000E+00,lc};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5602683" calcext:value-type="float">
            <text:p>5.6026830E-01</text:p>
          </table:table-cell>
          <table:table-cell office:value-type="float" office:value="-0.0487619" calcext:value-type="float">
            <text:p>-4.8761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5];&quot;) = {&quot;;TEXT([.D105];&quot;0.0000000E+00&quot;);&quot;,&quot;;TEXT([.E105];&quot;0.0000000E+00&quot;);&quot;,&quot;;TEXT([.F105];&quot;0.0000000E+00&quot;);&quot;,&quot;;&quot;lc};&quot;)" office:value-type="string" office:string-value="Point(101) = {5.6026830E-01,-4.8761900E-02,0.0000000E+00,lc};" calcext:value-type="string">
            <text:p>Point(101) = {5.6026830E-01,-4.8761900E-02,0.0000000E+00,lc};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5841786" calcext:value-type="float">
            <text:p>5.8417860E-01</text:p>
          </table:table-cell>
          <table:table-cell office:value-type="float" office:value="-0.0469124" calcext:value-type="float">
            <text:p>-4.69124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6];&quot;) = {&quot;;TEXT([.D106];&quot;0.0000000E+00&quot;);&quot;,&quot;;TEXT([.E106];&quot;0.0000000E+00&quot;);&quot;,&quot;;TEXT([.F106];&quot;0.0000000E+00&quot;);&quot;,&quot;;&quot;lc};&quot;)" office:value-type="string" office:string-value="Point(102) = {5.8417860E-01,-4.6912400E-02,0.0000000E+00,lc};" calcext:value-type="string">
            <text:p>Point(102) = {5.8417860E-01,-4.6912400E-02,0.0000000E+00,lc};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6078921" calcext:value-type="float">
            <text:p>6.0789210E-01</text:p>
          </table:table-cell>
          <table:table-cell office:value-type="float" office:value="-0.0449802" calcext:value-type="float">
            <text:p>-4.4980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7];&quot;) = {&quot;;TEXT([.D107];&quot;0.0000000E+00&quot;);&quot;,&quot;;TEXT([.E107];&quot;0.0000000E+00&quot;);&quot;,&quot;;TEXT([.F107];&quot;0.0000000E+00&quot;);&quot;,&quot;;&quot;lc};&quot;)" office:value-type="string" office:string-value="Point(103) = {6.0789210E-01,-4.4980200E-02,0.0000000E+00,lc};" calcext:value-type="string">
            <text:p>Point(103) = {6.0789210E-01,-4.4980200E-02,0.0000000E+00,lc};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6313537" calcext:value-type="float">
            <text:p>6.3135370E-01</text:p>
          </table:table-cell>
          <table:table-cell office:value-type="float" office:value="-0.0429778" calcext:value-type="float">
            <text:p>-4.2977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8];&quot;) = {&quot;;TEXT([.D108];&quot;0.0000000E+00&quot;);&quot;,&quot;;TEXT([.E108];&quot;0.0000000E+00&quot;);&quot;,&quot;;TEXT([.F108];&quot;0.0000000E+00&quot;);&quot;,&quot;;&quot;lc};&quot;)" office:value-type="string" office:string-value="Point(104) = {6.3135370E-01,-4.2977800E-02,0.0000000E+00,lc};" calcext:value-type="string">
            <text:p>Point(104) = {6.3135370E-01,-4.2977800E-02,0.0000000E+00,lc}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6545085" calcext:value-type="float">
            <text:p>6.5450850E-01</text:p>
          </table:table-cell>
          <table:table-cell office:value-type="float" office:value="-0.0409174" calcext:value-type="float">
            <text:p>-4.09174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09];&quot;) = {&quot;;TEXT([.D109];&quot;0.0000000E+00&quot;);&quot;,&quot;;TEXT([.E109];&quot;0.0000000E+00&quot;);&quot;,&quot;;TEXT([.F109];&quot;0.0000000E+00&quot;);&quot;,&quot;;&quot;lc};&quot;)" office:value-type="string" office:string-value="Point(105) = {6.5450850E-01,-4.0917400E-02,0.0000000E+00,lc};" calcext:value-type="string">
            <text:p>Point(105) = {6.5450850E-01,-4.0917400E-02,0.0000000E+00,lc};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6773025" calcext:value-type="float">
            <text:p>6.7730250E-01</text:p>
          </table:table-cell>
          <table:table-cell office:value-type="float" office:value="-0.0388109" calcext:value-type="float">
            <text:p>-3.88109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0];&quot;) = {&quot;;TEXT([.D110];&quot;0.0000000E+00&quot;);&quot;,&quot;;TEXT([.E110];&quot;0.0000000E+00&quot;);&quot;,&quot;;TEXT([.F110];&quot;0.0000000E+00&quot;);&quot;,&quot;;&quot;lc};&quot;)" office:value-type="string" office:string-value="Point(106) = {6.7730250E-01,-3.8810900E-02,0.0000000E+00,lc};" calcext:value-type="string">
            <text:p>Point(106) = {6.7730250E-01,-3.8810900E-02,0.0000000E+00,lc};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0.6996823" calcext:value-type="float">
            <text:p>6.9968230E-01</text:p>
          </table:table-cell>
          <table:table-cell office:value-type="float" office:value="-0.03667" calcext:value-type="float">
            <text:p>-3.66700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1];&quot;) = {&quot;;TEXT([.D111];&quot;0.0000000E+00&quot;);&quot;,&quot;;TEXT([.E111];&quot;0.0000000E+00&quot;);&quot;,&quot;;TEXT([.F111];&quot;0.0000000E+00&quot;);&quot;,&quot;;&quot;lc};&quot;)" office:value-type="string" office:string-value="Point(107) = {6.9968230E-01,-3.6670000E-02,0.0000000E+00,lc};" calcext:value-type="string">
            <text:p>Point(107) = {6.9968230E-01,-3.6670000E-02,0.0000000E+00,lc};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7215958" calcext:value-type="float">
            <text:p>7.2159580E-01</text:p>
          </table:table-cell>
          <table:table-cell office:value-type="float" office:value="-0.0345058" calcext:value-type="float">
            <text:p>-3.4505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2];&quot;) = {&quot;;TEXT([.D112];&quot;0.0000000E+00&quot;);&quot;,&quot;;TEXT([.E112];&quot;0.0000000E+00&quot;);&quot;,&quot;;TEXT([.F112];&quot;0.0000000E+00&quot;);&quot;,&quot;;&quot;lc};&quot;)" office:value-type="string" office:string-value="Point(108) = {7.2159580E-01,-3.4505800E-02,0.0000000E+00,lc};" calcext:value-type="string">
            <text:p>Point(108) = {7.2159580E-01,-3.4505800E-02,0.0000000E+00,lc};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0.7429917" calcext:value-type="float">
            <text:p>7.4299170E-01</text:p>
          </table:table-cell>
          <table:table-cell office:value-type="float" office:value="-0.0323294" calcext:value-type="float">
            <text:p>-3.23294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3];&quot;) = {&quot;;TEXT([.D113];&quot;0.0000000E+00&quot;);&quot;,&quot;;TEXT([.E113];&quot;0.0000000E+00&quot;);&quot;,&quot;;TEXT([.F113];&quot;0.0000000E+00&quot;);&quot;,&quot;;&quot;lc};&quot;)" office:value-type="string" office:string-value="Point(109) = {7.4299170E-01,-3.2329400E-02,0.0000000E+00,lc};" calcext:value-type="string">
            <text:p>Point(109) = {7.4299170E-01,-3.2329400E-02,0.0000000E+00,lc};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7638202" calcext:value-type="float">
            <text:p>7.6382020E-01</text:p>
          </table:table-cell>
          <table:table-cell office:value-type="float" office:value="-0.0301515" calcext:value-type="float">
            <text:p>-3.0151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4];&quot;) = {&quot;;TEXT([.D114];&quot;0.0000000E+00&quot;);&quot;,&quot;;TEXT([.E114];&quot;0.0000000E+00&quot;);&quot;,&quot;;TEXT([.F114];&quot;0.0000000E+00&quot;);&quot;,&quot;;&quot;lc};&quot;)" office:value-type="string" office:string-value="Point(110) = {7.6382020E-01,-3.0151500E-02,0.0000000E+00,lc};" calcext:value-type="string">
            <text:p>Point(110) = {7.6382020E-01,-3.0151500E-02,0.0000000E+00,lc};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7840324" calcext:value-type="float">
            <text:p>7.8403240E-01</text:p>
          </table:table-cell>
          <table:table-cell office:value-type="float" office:value="-0.0279828" calcext:value-type="float">
            <text:p>-2.79828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5];&quot;) = {&quot;;TEXT([.D115];&quot;0.0000000E+00&quot;);&quot;,&quot;;TEXT([.E115];&quot;0.0000000E+00&quot;);&quot;,&quot;;TEXT([.F115];&quot;0.0000000E+00&quot;);&quot;,&quot;;&quot;lc};&quot;)" office:value-type="string" office:string-value="Point(111) = {7.8403240E-01,-2.7982800E-02,0.0000000E+00,lc};" calcext:value-type="string">
            <text:p>Point(111) = {7.8403240E-01,-2.7982800E-02,0.0000000E+00,lc};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8035813" calcext:value-type="float">
            <text:p>8.0358130E-01</text:p>
          </table:table-cell>
          <table:table-cell office:value-type="float" office:value="-0.0258337" calcext:value-type="float">
            <text:p>-2.5833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6];&quot;) = {&quot;;TEXT([.D116];&quot;0.0000000E+00&quot;);&quot;,&quot;;TEXT([.E116];&quot;0.0000000E+00&quot;);&quot;,&quot;;TEXT([.F116];&quot;0.0000000E+00&quot;);&quot;,&quot;;&quot;lc};&quot;)" office:value-type="string" office:string-value="Point(112) = {8.0358130E-01,-2.5833700E-02,0.0000000E+00,lc};" calcext:value-type="string">
            <text:p>Point(112) = {8.0358130E-01,-2.5833700E-02,0.0000000E+00,lc};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8224211" calcext:value-type="float">
            <text:p>8.2242110E-01</text:p>
          </table:table-cell>
          <table:table-cell office:value-type="float" office:value="-0.0237142" calcext:value-type="float">
            <text:p>-2.37142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7];&quot;) = {&quot;;TEXT([.D117];&quot;0.0000000E+00&quot;);&quot;,&quot;;TEXT([.E117];&quot;0.0000000E+00&quot;);&quot;,&quot;;TEXT([.F117];&quot;0.0000000E+00&quot;);&quot;,&quot;;&quot;lc};&quot;)" office:value-type="string" office:string-value="Point(113) = {8.2242110E-01,-2.3714200E-02,0.0000000E+00,lc};" calcext:value-type="string">
            <text:p>Point(113) = {8.2242110E-01,-2.3714200E-02,0.0000000E+00,lc};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8405079" calcext:value-type="float">
            <text:p>8.4050790E-01</text:p>
          </table:table-cell>
          <table:table-cell office:value-type="float" office:value="-0.0216347" calcext:value-type="float">
            <text:p>-2.16347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8];&quot;) = {&quot;;TEXT([.D118];&quot;0.0000000E+00&quot;);&quot;,&quot;;TEXT([.E118];&quot;0.0000000E+00&quot;);&quot;,&quot;;TEXT([.F118];&quot;0.0000000E+00&quot;);&quot;,&quot;;&quot;lc};&quot;)" office:value-type="string" office:string-value="Point(114) = {8.4050790E-01,-2.1634700E-02,0.0000000E+00,lc};" calcext:value-type="string">
            <text:p>Point(114) = {8.4050790E-01,-2.1634700E-02,0.0000000E+00,lc};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8577995" calcext:value-type="float">
            <text:p>8.5779950E-01</text:p>
          </table:table-cell>
          <table:table-cell office:value-type="float" office:value="-0.0196051" calcext:value-type="float">
            <text:p>-1.9605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19];&quot;) = {&quot;;TEXT([.D119];&quot;0.0000000E+00&quot;);&quot;,&quot;;TEXT([.E119];&quot;0.0000000E+00&quot;);&quot;,&quot;;TEXT([.F119];&quot;0.0000000E+00&quot;);&quot;,&quot;;&quot;lc};&quot;)" office:value-type="string" office:string-value="Point(115) = {8.5779950E-01,-1.9605100E-02,0.0000000E+00,lc};" calcext:value-type="string">
            <text:p>Point(115) = {8.5779950E-01,-1.9605100E-02,0.0000000E+00,lc};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8742554" calcext:value-type="float">
            <text:p>8.7425540E-01</text:p>
          </table:table-cell>
          <table:table-cell office:value-type="float" office:value="-0.0176353" calcext:value-type="float">
            <text:p>-1.7635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0];&quot;) = {&quot;;TEXT([.D120];&quot;0.0000000E+00&quot;);&quot;,&quot;;TEXT([.E120];&quot;0.0000000E+00&quot;);&quot;,&quot;;TEXT([.F120];&quot;0.0000000E+00&quot;);&quot;,&quot;;&quot;lc};&quot;)" office:value-type="string" office:string-value="Point(116) = {8.7425540E-01,-1.7635300E-02,0.0000000E+00,lc};" calcext:value-type="string">
            <text:p>Point(116) = {8.7425540E-01,-1.7635300E-02,0.0000000E+00,lc};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.8898372" calcext:value-type="float">
            <text:p>8.8983720E-01</text:p>
          </table:table-cell>
          <table:table-cell office:value-type="float" office:value="-0.0157351" calcext:value-type="float">
            <text:p>-1.57351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1];&quot;) = {&quot;;TEXT([.D121];&quot;0.0000000E+00&quot;);&quot;,&quot;;TEXT([.E121];&quot;0.0000000E+00&quot;);&quot;,&quot;;TEXT([.F121];&quot;0.0000000E+00&quot;);&quot;,&quot;;&quot;lc};&quot;)" office:value-type="string" office:string-value="Point(117) = {8.8983720E-01,-1.5735100E-02,0.0000000E+00,lc};" calcext:value-type="string">
            <text:p>Point(117) = {8.8983720E-01,-1.5735100E-02,0.0000000E+00,lc};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.9045085" calcext:value-type="float">
            <text:p>9.0450850E-01</text:p>
          </table:table-cell>
          <table:table-cell office:value-type="float" office:value="-0.0139143" calcext:value-type="float">
            <text:p>-1.3914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2];&quot;) = {&quot;;TEXT([.D122];&quot;0.0000000E+00&quot;);&quot;,&quot;;TEXT([.E122];&quot;0.0000000E+00&quot;);&quot;,&quot;;TEXT([.F122];&quot;0.0000000E+00&quot;);&quot;,&quot;;&quot;lc};&quot;)" office:value-type="string" office:string-value="Point(118) = {9.0450850E-01,-1.3914300E-02,0.0000000E+00,lc};" calcext:value-type="string">
            <text:p>Point(118) = {9.0450850E-01,-1.3914300E-02,0.0000000E+00,lc};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0.9182351" calcext:value-type="float">
            <text:p>9.1823510E-01</text:p>
          </table:table-cell>
          <table:table-cell office:value-type="float" office:value="-0.0121823" calcext:value-type="float">
            <text:p>-1.21823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3];&quot;) = {&quot;;TEXT([.D123];&quot;0.0000000E+00&quot;);&quot;,&quot;;TEXT([.E123];&quot;0.0000000E+00&quot;);&quot;,&quot;;TEXT([.F123];&quot;0.0000000E+00&quot;);&quot;,&quot;;&quot;lc};&quot;)" office:value-type="string" office:string-value="Point(119) = {9.1823510E-01,-1.2182300E-02,0.0000000E+00,lc};" calcext:value-type="string">
            <text:p>Point(119) = {9.1823510E-01,-1.2182300E-02,0.0000000E+00,lc};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9309849" calcext:value-type="float">
            <text:p>9.3098490E-01</text:p>
          </table:table-cell>
          <table:table-cell office:value-type="float" office:value="-0.0105485" calcext:value-type="float">
            <text:p>-1.0548500E-02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4];&quot;) = {&quot;;TEXT([.D124];&quot;0.0000000E+00&quot;);&quot;,&quot;;TEXT([.E124];&quot;0.0000000E+00&quot;);&quot;,&quot;;TEXT([.F124];&quot;0.0000000E+00&quot;);&quot;,&quot;;&quot;lc};&quot;)" office:value-type="string" office:string-value="Point(120) = {9.3098490E-01,-1.0548500E-02,0.0000000E+00,lc};" calcext:value-type="string">
            <text:p>Point(120) = {9.3098490E-01,-1.0548500E-02,0.0000000E+00,lc};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942728" calcext:value-type="float">
            <text:p>9.4272800E-01</text:p>
          </table:table-cell>
          <table:table-cell office:value-type="float" office:value="-0.0090217" calcext:value-type="float">
            <text:p>-9.0217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5];&quot;) = {&quot;;TEXT([.D125];&quot;0.0000000E+00&quot;);&quot;,&quot;;TEXT([.E125];&quot;0.0000000E+00&quot;);&quot;,&quot;;TEXT([.F125];&quot;0.0000000E+00&quot;);&quot;,&quot;;&quot;lc};&quot;)" office:value-type="string" office:string-value="Point(121) = {9.4272800E-01,-9.0217000E-03,0.0000000E+00,lc};" calcext:value-type="string">
            <text:p>Point(121) = {9.4272800E-01,-9.0217000E-03,0.0000000E+00,lc};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0.9534372" calcext:value-type="float">
            <text:p>9.5343720E-01</text:p>
          </table:table-cell>
          <table:table-cell office:value-type="float" office:value="-0.0076108" calcext:value-type="float">
            <text:p>-7.6108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6];&quot;) = {&quot;;TEXT([.D126];&quot;0.0000000E+00&quot;);&quot;,&quot;;TEXT([.E126];&quot;0.0000000E+00&quot;);&quot;,&quot;;TEXT([.F126];&quot;0.0000000E+00&quot;);&quot;,&quot;;&quot;lc};&quot;)" office:value-type="string" office:string-value="Point(122) = {9.5343720E-01,-7.6108000E-03,0.0000000E+00,lc};" calcext:value-type="string">
            <text:p>Point(122) = {9.5343720E-01,-7.6108000E-03,0.0000000E+00,lc};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9630873" calcext:value-type="float">
            <text:p>9.6308730E-01</text:p>
          </table:table-cell>
          <table:table-cell office:value-type="float" office:value="-0.0063238" calcext:value-type="float">
            <text:p>-6.3238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7];&quot;) = {&quot;;TEXT([.D127];&quot;0.0000000E+00&quot;);&quot;,&quot;;TEXT([.E127];&quot;0.0000000E+00&quot;);&quot;,&quot;;TEXT([.F127];&quot;0.0000000E+00&quot;);&quot;,&quot;;&quot;lc};&quot;)" office:value-type="string" office:string-value="Point(123) = {9.6308730E-01,-6.3238000E-03,0.0000000E+00,lc};" calcext:value-type="string">
            <text:p>Point(123) = {9.6308730E-01,-6.3238000E-03,0.0000000E+00,lc};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9716559" calcext:value-type="float">
            <text:p>9.7165590E-01</text:p>
          </table:table-cell>
          <table:table-cell office:value-type="float" office:value="-0.0051685" calcext:value-type="float">
            <text:p>-5.1685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8];&quot;) = {&quot;;TEXT([.D128];&quot;0.0000000E+00&quot;);&quot;,&quot;;TEXT([.E128];&quot;0.0000000E+00&quot;);&quot;,&quot;;TEXT([.F128];&quot;0.0000000E+00&quot;);&quot;,&quot;;&quot;lc};&quot;)" office:value-type="string" office:string-value="Point(124) = {9.7165590E-01,-5.1685000E-03,0.0000000E+00,lc};" calcext:value-type="string">
            <text:p>Point(124) = {9.7165590E-01,-5.1685000E-03,0.0000000E+00,lc};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9791229" calcext:value-type="float">
            <text:p>9.7912290E-01</text:p>
          </table:table-cell>
          <table:table-cell office:value-type="float" office:value="-0.0041519" calcext:value-type="float">
            <text:p>-4.1519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29];&quot;) = {&quot;;TEXT([.D129];&quot;0.0000000E+00&quot;);&quot;,&quot;;TEXT([.E129];&quot;0.0000000E+00&quot;);&quot;,&quot;;TEXT([.F129];&quot;0.0000000E+00&quot;);&quot;,&quot;;&quot;lc};&quot;)" office:value-type="string" office:string-value="Point(125) = {9.7912290E-01,-4.1519000E-03,0.0000000E+00,lc};" calcext:value-type="string">
            <text:p>Point(125) = {9.7912290E-01,-4.1519000E-03,0.0000000E+00,lc};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0.9854709" calcext:value-type="float">
            <text:p>9.8547090E-01</text:p>
          </table:table-cell>
          <table:table-cell office:value-type="float" office:value="-0.0032804" calcext:value-type="float">
            <text:p>-3.2804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30];&quot;) = {&quot;;TEXT([.D130];&quot;0.0000000E+00&quot;);&quot;,&quot;;TEXT([.E130];&quot;0.0000000E+00&quot;);&quot;,&quot;;TEXT([.F130];&quot;0.0000000E+00&quot;);&quot;,&quot;;&quot;lc};&quot;)" office:value-type="string" office:string-value="Point(126) = {9.8547090E-01,-3.2804000E-03,0.0000000E+00,lc};" calcext:value-type="string">
            <text:p>Point(126) = {9.8547090E-01,-3.2804000E-03,0.0000000E+00,lc};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990685" calcext:value-type="float">
            <text:p>9.9068500E-01</text:p>
          </table:table-cell>
          <table:table-cell office:value-type="float" office:value="-0.0025595" calcext:value-type="float">
            <text:p>-2.5595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31];&quot;) = {&quot;;TEXT([.D131];&quot;0.0000000E+00&quot;);&quot;,&quot;;TEXT([.E131];&quot;0.0000000E+00&quot;);&quot;,&quot;;TEXT([.F131];&quot;0.0000000E+00&quot;);&quot;,&quot;;&quot;lc};&quot;)" office:value-type="string" office:string-value="Point(127) = {9.9068500E-01,-2.5595000E-03,0.0000000E+00,lc};" calcext:value-type="string">
            <text:p>Point(127) = {9.9068500E-01,-2.5595000E-03,0.0000000E+00,lc};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9947532" calcext:value-type="float">
            <text:p>9.9475320E-01</text:p>
          </table:table-cell>
          <table:table-cell office:value-type="float" office:value="-0.0019938" calcext:value-type="float">
            <text:p>-1.9938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32];&quot;) = {&quot;;TEXT([.D132];&quot;0.0000000E+00&quot;);&quot;,&quot;;TEXT([.E132];&quot;0.0000000E+00&quot;);&quot;,&quot;;TEXT([.F132];&quot;0.0000000E+00&quot;);&quot;,&quot;;&quot;lc};&quot;)" office:value-type="string" office:string-value="Point(128) = {9.9475320E-01,-1.9938000E-03,0.0000000E+00,lc};" calcext:value-type="string">
            <text:p>Point(128) = {9.9475320E-01,-1.9938000E-03,0.0000000E+00,lc};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9976658" calcext:value-type="float">
            <text:p>9.9766580E-01</text:p>
          </table:table-cell>
          <table:table-cell office:value-type="float" office:value="-0.001587" calcext:value-type="float">
            <text:p>-1.5870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33];&quot;) = {&quot;;TEXT([.D133];&quot;0.0000000E+00&quot;);&quot;,&quot;;TEXT([.E133];&quot;0.0000000E+00&quot;);&quot;,&quot;;TEXT([.F133];&quot;0.0000000E+00&quot;);&quot;,&quot;;&quot;lc};&quot;)" office:value-type="string" office:string-value="Point(129) = {9.9766580E-01,-1.5870000E-03,0.0000000E+00,lc};" calcext:value-type="string">
            <text:p>Point(129) = {9.9766580E-01,-1.5870000E-03,0.0000000E+00,lc};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9994161" calcext:value-type="float">
            <text:p>9.9941610E-01</text:p>
          </table:table-cell>
          <table:table-cell office:value-type="float" office:value="-0.0013419" calcext:value-type="float">
            <text:p>-1.3419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34];&quot;) = {&quot;;TEXT([.D134];&quot;0.0000000E+00&quot;);&quot;,&quot;;TEXT([.E134];&quot;0.0000000E+00&quot;);&quot;,&quot;;TEXT([.F134];&quot;0.0000000E+00&quot;);&quot;,&quot;;&quot;lc};&quot;)" office:value-type="string" office:string-value="Point(130) = {9.9941610E-01,-1.3419000E-03,0.0000000E+00,lc};" calcext:value-type="string">
            <text:p>Point(130) = {9.9941610E-01,-1.3419000E-03,0.0000000E+00,lc};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.0000000E+00</text:p>
          </table:table-cell>
          <table:table-cell office:value-type="float" office:value="-0.00126" calcext:value-type="float">
            <text:p>-1.2600000E-03</text:p>
          </table:table-cell>
          <table:table-cell office:value-type="float" office:value="0" calcext:value-type="float">
            <text:p>0.0000000E+00</text:p>
          </table:table-cell>
          <table:table-cell/>
          <table:table-cell table:formula="of:=CONCATENATE(&quot;Point(&quot;;[.C135];&quot;) = {&quot;;TEXT([.D135];&quot;0.0000000E+00&quot;);&quot;,&quot;;TEXT([.E135];&quot;0.0000000E+00&quot;);&quot;,&quot;;TEXT([.F135];&quot;0.0000000E+00&quot;);&quot;,&quot;;&quot;lc};&quot;)" office:value-type="string" office:string-value="Point(131) = {1.0000000E+00,-1.2600000E-03,0.0000000E+00,lc};" calcext:value-type="string">
            <text:p>Point(131) = {1.0000000E+00,-1.2600000E-03,0.0000000E+00,lc};</text:p>
          </table:table-cell>
        </table:table-row>
      </table:table>
      <table:table table:name="NACA0012-XY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2" table:default-cell-style-name="ce4"/>
        <table:table-column table:style-name="co1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PointID</text:p>
          </table:table-cell>
          <table:table-cell office:value-type="string" calcext:value-type="string">
            <text:p>CoordinateX</text:p>
          </table:table-cell>
          <table:table-cell office:value-type="string" calcext:value-type="string">
            <text:p>CoordinateY</text:p>
          </table:table-cell>
          <table:table-cell office:value-type="string" calcext:value-type="string">
            <text:p>CoordinateZ</text:p>
          </table:table-cell>
          <table:table-cell/>
          <table:table-cell office:value-type="string" calcext:value-type="string">
            <text:p>GMSH OUTPUT</text:p>
          </table:table-cell>
        </table:table-row>
        <table:table-row table:style-name="ro1">
          <table:table-cell table:number-columns-repeated="2"/>
          <table:table-cell table:style-name="ce3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.0000000E+00</text:p>
          </table:table-cell>
          <table:table-cell table:style-name="ce7" office:value-type="float" office:value="0" calcext:value-type="float">
            <text:p>0.0000000E+00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];&quot;) = {&quot;;TEXT([.D5];&quot;0.0000000E+00&quot;);&quot;,&quot;;TEXT([.E5];&quot;0.0000000E+00&quot;);&quot;,&quot;;TEXT([.F5];&quot;0.0000000E+00&quot;);&quot;,&quot;;&quot;lc};&quot;)" office:value-type="string" office:string-value="Point(101) = {1.0000000E+00,0.0000000E+00,z0,lc};" calcext:value-type="string">
            <text:p>Point(101) = {1.0000000E+00,0.0000000E+00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02" calcext:value-type="float">
            <text:p>102</text:p>
          </table:table-cell>
          <table:table-cell table:style-name="ce7" office:value-type="float" office:value="0.999828662487779" calcext:value-type="float">
            <text:p>9.9982866E-01</text:p>
          </table:table-cell>
          <table:table-cell table:style-name="ce7" office:value-type="float" office:value="0.0000249011350858169" calcext:value-type="float">
            <text:p>2.4901135E-05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];&quot;) = {&quot;;TEXT([.D6];&quot;0.0000000E+00&quot;);&quot;,&quot;;TEXT([.E6];&quot;0.0000000E+00&quot;);&quot;,&quot;;TEXT([.F6];&quot;0.0000000E+00&quot;);&quot;,&quot;;&quot;lc};&quot;)" office:value-type="string" office:string-value="Point(102) = {9.9982866E-01,2.4901135E-05,z0,lc};" calcext:value-type="string">
            <text:p>Point(102) = {9.9982866E-01,2.4901135E-05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03" calcext:value-type="float">
            <text:p>103</text:p>
          </table:table-cell>
          <table:table-cell table:style-name="ce7" office:value-type="float" office:value="0.999314767377287" calcext:value-type="float">
            <text:p>9.9931477E-01</text:p>
          </table:table-cell>
          <table:table-cell table:style-name="ce7" office:value-type="float" office:value="0.0000995542359963547" calcext:value-type="float">
            <text:p>9.9554236E-05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];&quot;) = {&quot;;TEXT([.D7];&quot;0.0000000E+00&quot;);&quot;,&quot;;TEXT([.E7];&quot;0.0000000E+00&quot;);&quot;,&quot;;TEXT([.F7];&quot;0.0000000E+00&quot;);&quot;,&quot;;&quot;lc};&quot;)" office:value-type="string" office:string-value="Point(103) = {9.9931477E-01,9.9554236E-05,z0,lc};" calcext:value-type="string">
            <text:p>Point(103) = {9.9931477E-01,9.9554236E-05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04" calcext:value-type="float">
            <text:p>104</text:p>
          </table:table-cell>
          <table:table-cell table:style-name="ce7" office:value-type="float" office:value="0.998458666866564" calcext:value-type="float">
            <text:p>9.9845867E-01</text:p>
          </table:table-cell>
          <table:table-cell table:style-name="ce7" office:value-type="float" office:value="0.000223808635957323" calcext:value-type="float">
            <text:p>2.2380864E-04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];&quot;) = {&quot;;TEXT([.D8];&quot;0.0000000E+00&quot;);&quot;,&quot;;TEXT([.E8];&quot;0.0000000E+00&quot;);&quot;,&quot;;TEXT([.F8];&quot;0.0000000E+00&quot;);&quot;,&quot;;&quot;lc};&quot;)" office:value-type="string" office:string-value="Point(104) = {9.9845867E-01,2.2380864E-04,z0,lc};" calcext:value-type="string">
            <text:p>Point(104) = {9.9845867E-01,2.2380864E-04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05" calcext:value-type="float">
            <text:p>105</text:p>
          </table:table-cell>
          <table:table-cell table:style-name="ce7" office:value-type="float" office:value="0.997260947684137" calcext:value-type="float">
            <text:p>9.9726095E-01</text:p>
          </table:table-cell>
          <table:table-cell table:style-name="ce7" office:value-type="float" office:value="0.000397414041878869" calcext:value-type="float">
            <text:p>3.9741404E-04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];&quot;) = {&quot;;TEXT([.D9];&quot;0.0000000E+00&quot;);&quot;,&quot;;TEXT([.E9];&quot;0.0000000E+00&quot;);&quot;,&quot;;TEXT([.F9];&quot;0.0000000E+00&quot;);&quot;,&quot;;&quot;lc};&quot;)" office:value-type="string" office:string-value="Point(105) = {9.9726095E-01,3.9741404E-04,z0,lc};" calcext:value-type="string">
            <text:p>Point(105) = {9.9726095E-01,3.9741404E-04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06" calcext:value-type="float">
            <text:p>106</text:p>
          </table:table-cell>
          <table:table-cell table:style-name="ce7" office:value-type="float" office:value="0.995722430686905" calcext:value-type="float">
            <text:p>9.9572243E-01</text:p>
          </table:table-cell>
          <table:table-cell table:style-name="ce7" office:value-type="float" office:value="0.000620021752274463" calcext:value-type="float">
            <text:p>6.2002175E-04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];&quot;) = {&quot;;TEXT([.D10];&quot;0.0000000E+00&quot;);&quot;,&quot;;TEXT([.E10];&quot;0.0000000E+00&quot;);&quot;,&quot;;TEXT([.F10];&quot;0.0000000E+00&quot;);&quot;,&quot;;&quot;lc};&quot;)" office:value-type="string" office:string-value="Point(106) = {9.9572243E-01,6.2002175E-04,z0,lc};" calcext:value-type="string">
            <text:p>Point(106) = {9.9572243E-01,6.2002175E-04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0.993844170297569" calcext:value-type="float">
            <text:p>9.9384417E-01</text:p>
          </table:table-cell>
          <table:table-cell table:style-name="ce7" office:value-type="float" office:value="0.000891186343702668" calcext:value-type="float">
            <text:p>8.9118634E-04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];&quot;) = {&quot;;TEXT([.D11];&quot;0.0000000E+00&quot;);&quot;,&quot;;TEXT([.E11];&quot;0.0000000E+00&quot;);&quot;,&quot;;TEXT([.F11];&quot;0.0000000E+00&quot;);&quot;,&quot;;&quot;lc};&quot;)" office:value-type="string" office:string-value="Point(107) = {9.9384417E-01,8.9118634E-04,z0,lc};" calcext:value-type="string">
            <text:p>Point(107) = {9.9384417E-01,8.9118634E-04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08" calcext:value-type="float">
            <text:p>108</text:p>
          </table:table-cell>
          <table:table-cell table:style-name="ce7" office:value-type="float" office:value="0.991627453781977" calcext:value-type="float">
            <text:p>9.9162745E-01</text:p>
          </table:table-cell>
          <table:table-cell table:style-name="ce7" office:value-type="float" office:value="0.00121036780735655" calcext:value-type="float">
            <text:p>1.2103678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];&quot;) = {&quot;;TEXT([.D12];&quot;0.0000000E+00&quot;);&quot;,&quot;;TEXT([.E12];&quot;0.0000000E+00&quot;);&quot;,&quot;;TEXT([.F12];&quot;0.0000000E+00&quot;);&quot;,&quot;;&quot;lc};&quot;)" office:value-type="string" office:string-value="Point(108) = {9.9162745E-01,1.2103678E-03,z0,lc};" calcext:value-type="string">
            <text:p>Point(108) = {9.9162745E-01,1.2103678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09" calcext:value-type="float">
            <text:p>109</text:p>
          </table:table-cell>
          <table:table-cell table:style-name="ce7" office:value-type="float" office:value="0.989073800366903" calcext:value-type="float">
            <text:p>9.8907380E-01</text:p>
          </table:table-cell>
          <table:table-cell table:style-name="ce7" office:value-type="float" office:value="0.00157693411255947" calcext:value-type="float">
            <text:p>1.5769341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3];&quot;) = {&quot;;TEXT([.D13];&quot;0.0000000E+00&quot;);&quot;,&quot;;TEXT([.E13];&quot;0.0000000E+00&quot;);&quot;,&quot;;TEXT([.F13];&quot;0.0000000E+00&quot;);&quot;,&quot;;&quot;lc};&quot;)" office:value-type="string" office:string-value="Point(109) = {9.8907380E-01,1.5769341E-03,z0,lc};" calcext:value-type="string">
            <text:p>Point(109) = {9.8907380E-01,1.5769341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0" calcext:value-type="float">
            <text:p>110</text:p>
          </table:table-cell>
          <table:table-cell table:style-name="ce7" office:value-type="float" office:value="0.986184960198838" calcext:value-type="float">
            <text:p>9.8618496E-01</text:p>
          </table:table-cell>
          <table:table-cell table:style-name="ce7" office:value-type="float" office:value="0.00199016416934176" calcext:value-type="float">
            <text:p>1.9901642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4];&quot;) = {&quot;;TEXT([.D14];&quot;0.0000000E+00&quot;);&quot;,&quot;;TEXT([.E14];&quot;0.0000000E+00&quot;);&quot;,&quot;;TEXT([.F14];&quot;0.0000000E+00&quot;);&quot;,&quot;;&quot;lc};&quot;)" office:value-type="string" office:string-value="Point(110) = {9.8618496E-01,1.9901642E-03,z0,lc};" calcext:value-type="string">
            <text:p>Point(110) = {9.8618496E-01,1.990164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1" calcext:value-type="float">
            <text:p>111</text:p>
          </table:table-cell>
          <table:table-cell table:style-name="ce7" office:value-type="float" office:value="0.982962913144534" calcext:value-type="float">
            <text:p>9.8296291E-01</text:p>
          </table:table-cell>
          <table:table-cell table:style-name="ce7" office:value-type="float" office:value="0.0024492511580229" calcext:value-type="float">
            <text:p>2.4492512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5];&quot;) = {&quot;;TEXT([.D15];&quot;0.0000000E+00&quot;);&quot;,&quot;;TEXT([.E15];&quot;0.0000000E+00&quot;);&quot;,&quot;;TEXT([.F15];&quot;0.0000000E+00&quot;);&quot;,&quot;;&quot;lc};&quot;)" office:value-type="string" office:string-value="Point(111) = {9.8296291E-01,2.4492512E-03,z0,lc};" calcext:value-type="string">
            <text:p>Point(111) = {9.8296291E-01,2.449251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2" calcext:value-type="float">
            <text:p>112</text:p>
          </table:table-cell>
          <table:table-cell table:style-name="ce7" office:value-type="float" office:value="0.979409867434097" calcext:value-type="float">
            <text:p>9.7940987E-01</text:p>
          </table:table-cell>
          <table:table-cell table:style-name="ce7" office:value-type="float" office:value="0.00295330618986665" calcext:value-type="float">
            <text:p>2.9533062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6];&quot;) = {&quot;;TEXT([.D16];&quot;0.0000000E+00&quot;);&quot;,&quot;;TEXT([.E16];&quot;0.0000000E+00&quot;);&quot;,&quot;;TEXT([.F16];&quot;0.0000000E+00&quot;);&quot;,&quot;;&quot;lc};&quot;)" office:value-type="string" office:string-value="Point(112) = {9.7940987E-01,2.9533062E-03,z0,lc};" calcext:value-type="string">
            <text:p>Point(112) = {9.7940987E-01,2.953306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3" calcext:value-type="float">
            <text:p>113</text:p>
          </table:table-cell>
          <table:table-cell table:style-name="ce7" office:value-type="float" office:value="0.975528258147577" calcext:value-type="float">
            <text:p>9.7552826E-01</text:p>
          </table:table-cell>
          <table:table-cell table:style-name="ce7" office:value-type="float" office:value="0.00350136225945033" calcext:value-type="float">
            <text:p>3.5013623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7];&quot;) = {&quot;;TEXT([.D17];&quot;0.0000000E+00&quot;);&quot;,&quot;;TEXT([.E17];&quot;0.0000000E+00&quot;);&quot;,&quot;;TEXT([.F17];&quot;0.0000000E+00&quot;);&quot;,&quot;;&quot;lc};&quot;)" office:value-type="string" office:string-value="Point(113) = {9.7552826E-01,3.5013623E-03,z0,lc};" calcext:value-type="string">
            <text:p>Point(113) = {9.7552826E-01,3.5013623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7" office:value-type="float" office:value="0.971320745546089" calcext:value-type="float">
            <text:p>9.7132075E-01</text:p>
          </table:table-cell>
          <table:table-cell table:style-name="ce7" office:value-type="float" office:value="0.00409237844644753" calcext:value-type="float">
            <text:p>4.0923784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8];&quot;) = {&quot;;TEXT([.D18];&quot;0.0000000E+00&quot;);&quot;,&quot;;TEXT([.E18];&quot;0.0000000E+00&quot;);&quot;,&quot;;TEXT([.F18];&quot;0.0000000E+00&quot;);&quot;,&quot;;&quot;lc};&quot;)" office:value-type="string" office:string-value="Point(114) = {9.7132075E-01,4.0923784E-03,z0,lc};" calcext:value-type="string">
            <text:p>Point(114) = {9.7132075E-01,4.0923784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5" calcext:value-type="float">
            <text:p>115</text:p>
          </table:table-cell>
          <table:table-cell table:style-name="ce7" office:value-type="float" office:value="0.966790213248601" calcext:value-type="float">
            <text:p>9.6679021E-01</text:p>
          </table:table-cell>
          <table:table-cell table:style-name="ce7" office:value-type="float" office:value="0.00472524432208854" calcext:value-type="float">
            <text:p>4.7252443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9];&quot;) = {&quot;;TEXT([.D19];&quot;0.0000000E+00&quot;);&quot;,&quot;;TEXT([.E19];&quot;0.0000000E+00&quot;);&quot;,&quot;;TEXT([.F19];&quot;0.0000000E+00&quot;);&quot;,&quot;;&quot;lc};&quot;)" office:value-type="string" office:string-value="Point(115) = {9.6679021E-01,4.7252443E-03,z0,lc};" calcext:value-type="string">
            <text:p>Point(115) = {9.6679021E-01,4.7252443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6" calcext:value-type="float">
            <text:p>116</text:p>
          </table:table-cell>
          <table:table-cell table:style-name="ce7" office:value-type="float" office:value="0.961939766255643" calcext:value-type="float">
            <text:p>9.6193977E-01</text:p>
          </table:table-cell>
          <table:table-cell table:style-name="ce7" office:value-type="float" office:value="0.00539878451367922" calcext:value-type="float">
            <text:p>5.3987845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0];&quot;) = {&quot;;TEXT([.D20];&quot;0.0000000E+00&quot;);&quot;,&quot;;TEXT([.E20];&quot;0.0000000E+00&quot;);&quot;,&quot;;TEXT([.F20];&quot;0.0000000E+00&quot;);&quot;,&quot;;&quot;lc};&quot;)" office:value-type="string" office:string-value="Point(116) = {9.6193977E-01,5.3987845E-03,z0,lc};" calcext:value-type="string">
            <text:p>Point(116) = {9.6193977E-01,5.3987845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7" calcext:value-type="float">
            <text:p>117</text:p>
          </table:table-cell>
          <table:table-cell table:style-name="ce7" office:value-type="float" office:value="0.956772728821301" calcext:value-type="float">
            <text:p>9.5677273E-01</text:p>
          </table:table-cell>
          <table:table-cell table:style-name="ce7" office:value-type="float" office:value="0.00611176337923921" calcext:value-type="float">
            <text:p>6.1117634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1];&quot;) = {&quot;;TEXT([.D21];&quot;0.0000000E+00&quot;);&quot;,&quot;;TEXT([.E21];&quot;0.0000000E+00&quot;);&quot;,&quot;;TEXT([.F21];&quot;0.0000000E+00&quot;);&quot;,&quot;;&quot;lc};&quot;)" office:value-type="string" office:string-value="Point(117) = {9.5677273E-01,6.1117634E-03,z0,lc};" calcext:value-type="string">
            <text:p>Point(117) = {9.5677273E-01,6.1117634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8" calcext:value-type="float">
            <text:p>118</text:p>
          </table:table-cell>
          <table:table-cell table:style-name="ce7" office:value-type="float" office:value="0.95129264217493" calcext:value-type="float">
            <text:p>9.5129264E-01</text:p>
          </table:table-cell>
          <table:table-cell table:style-name="ce7" office:value-type="float" office:value="0.00686288974358955" calcext:value-type="float">
            <text:p>6.8628897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2];&quot;) = {&quot;;TEXT([.D22];&quot;0.0000000E+00&quot;);&quot;,&quot;;TEXT([.E22];&quot;0.0000000E+00&quot;);&quot;,&quot;;TEXT([.F22];&quot;0.0000000E+00&quot;);&quot;,&quot;;&quot;lc};&quot;)" office:value-type="string" office:string-value="Point(118) = {9.5129264E-01,6.8628897E-03,z0,lc};" calcext:value-type="string">
            <text:p>Point(118) = {9.5129264E-01,6.8628897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19" calcext:value-type="float">
            <text:p>119</text:p>
          </table:table-cell>
          <table:table-cell table:style-name="ce7" office:value-type="float" office:value="0.945503262094184" calcext:value-type="float">
            <text:p>9.4550326E-01</text:p>
          </table:table-cell>
          <table:table-cell table:style-name="ce7" office:value-type="float" office:value="0.00765082164708146" calcext:value-type="float">
            <text:p>7.6508216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3];&quot;) = {&quot;;TEXT([.D23];&quot;0.0000000E+00&quot;);&quot;,&quot;;TEXT([.E23];&quot;0.0000000E+00&quot;);&quot;,&quot;;TEXT([.F23];&quot;0.0000000E+00&quot;);&quot;,&quot;;&quot;lc};&quot;)" office:value-type="string" office:string-value="Point(119) = {9.4550326E-01,7.6508216E-03,z0,lc};" calcext:value-type="string">
            <text:p>Point(119) = {9.4550326E-01,7.6508216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style-name="ce7" office:value-type="float" office:value="0.939408556330983" calcext:value-type="float">
            <text:p>9.3940856E-01</text:p>
          </table:table-cell>
          <table:table-cell table:style-name="ce7" office:value-type="float" office:value="0.00847417105862204" calcext:value-type="float">
            <text:p>8.4741711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4];&quot;) = {&quot;;TEXT([.D24];&quot;0.0000000E+00&quot;);&quot;,&quot;;TEXT([.E24];&quot;0.0000000E+00&quot;);&quot;,&quot;;TEXT([.F24];&quot;0.0000000E+00&quot;);&quot;,&quot;;&quot;lc};&quot;)" office:value-type="string" office:string-value="Point(120) = {9.3940856E-01,8.4741711E-03,z0,lc};" calcext:value-type="string">
            <text:p>Point(120) = {9.3940856E-01,8.4741711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1" calcext:value-type="float">
            <text:p>121</text:p>
          </table:table-cell>
          <table:table-cell table:style-name="ce7" office:value-type="float" office:value="0.933012701892219" calcext:value-type="float">
            <text:p>9.3301270E-01</text:p>
          </table:table-cell>
          <table:table-cell table:style-name="ce7" office:value-type="float" office:value="0.00933150850570876" calcext:value-type="float">
            <text:p>9.3315085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5];&quot;) = {&quot;;TEXT([.D25];&quot;0.0000000E+00&quot;);&quot;,&quot;;TEXT([.E25];&quot;0.0000000E+00&quot;);&quot;,&quot;;TEXT([.F25];&quot;0.0000000E+00&quot;);&quot;,&quot;;&quot;lc};&quot;)" office:value-type="string" office:string-value="Point(121) = {9.3301270E-01,9.3315085E-03,z0,lc};" calcext:value-type="string">
            <text:p>Point(121) = {9.3301270E-01,9.3315085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2" calcext:value-type="float">
            <text:p>122</text:p>
          </table:table-cell>
          <table:table-cell table:style-name="ce7" office:value-type="float" office:value="0.926320082177046" calcext:value-type="float">
            <text:p>9.2632008E-01</text:p>
          </table:table-cell>
          <table:table-cell table:style-name="ce7" office:value-type="float" office:value="0.0102213675758267" calcext:value-type="float">
            <text:p>1.022136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6];&quot;) = {&quot;;TEXT([.D26];&quot;0.0000000E+00&quot;);&quot;,&quot;;TEXT([.E26];&quot;0.0000000E+00&quot;);&quot;,&quot;;TEXT([.F26];&quot;0.0000000E+00&quot;);&quot;,&quot;;&quot;lc};&quot;)" office:value-type="string" office:string-value="Point(122) = {9.2632008E-01,1.0221368E-02,z0,lc};" calcext:value-type="string">
            <text:p>Point(122) = {9.2632008E-01,1.022136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3" calcext:value-type="float">
            <text:p>123</text:p>
          </table:table-cell>
          <table:table-cell table:style-name="ce7" office:value-type="float" office:value="0.919335283972712" calcext:value-type="float">
            <text:p>9.1933528E-01</text:p>
          </table:table-cell>
          <table:table-cell table:style-name="ce7" office:value-type="float" office:value="0.0111422492457677" calcext:value-type="float">
            <text:p>1.1142249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7];&quot;) = {&quot;;TEXT([.D27];&quot;0.0000000E+00&quot;);&quot;,&quot;;TEXT([.E27];&quot;0.0000000E+00&quot;);&quot;,&quot;;TEXT([.F27];&quot;0.0000000E+00&quot;);&quot;,&quot;;&quot;lc};&quot;)" office:value-type="string" office:string-value="Point(123) = {9.1933528E-01,1.1142249E-02,z0,lc};" calcext:value-type="string">
            <text:p>Point(123) = {9.1933528E-01,1.114224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4" calcext:value-type="float">
            <text:p>124</text:p>
          </table:table-cell>
          <table:table-cell table:style-name="ce7" office:value-type="float" office:value="0.912063094311008" calcext:value-type="float">
            <text:p>9.1206309E-01</text:p>
          </table:table-cell>
          <table:table-cell table:style-name="ce7" office:value-type="float" office:value="0.0120926259981795" calcext:value-type="float">
            <text:p>1.209262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8];&quot;) = {&quot;;TEXT([.D28];&quot;0.0000000E+00&quot;);&quot;,&quot;;TEXT([.E28];&quot;0.0000000E+00&quot;);&quot;,&quot;;TEXT([.F28];&quot;0.0000000E+00&quot;);&quot;,&quot;;&quot;lc};&quot;)" office:value-type="string" office:string-value="Point(124) = {9.1206309E-01,1.2092626E-02,z0,lc};" calcext:value-type="string">
            <text:p>Point(124) = {9.1206309E-01,1.209262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0.904508497187474" calcext:value-type="float">
            <text:p>9.0450850E-01</text:p>
          </table:table-cell>
          <table:table-cell table:style-name="ce7" office:value-type="float" office:value="0.0130709456879079" calcext:value-type="float">
            <text:p>1.307094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29];&quot;) = {&quot;;TEXT([.D29];&quot;0.0000000E+00&quot;);&quot;,&quot;;TEXT([.E29];&quot;0.0000000E+00&quot;);&quot;,&quot;;TEXT([.F29];&quot;0.0000000E+00&quot;);&quot;,&quot;;&quot;lc};&quot;)" office:value-type="string" office:string-value="Point(125) = {9.0450850E-01,1.3070946E-02,z0,lc};" calcext:value-type="string">
            <text:p>Point(125) = {9.0450850E-01,1.307094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6" calcext:value-type="float">
            <text:p>126</text:p>
          </table:table-cell>
          <table:table-cell table:style-name="ce7" office:value-type="float" office:value="0.896676670145618" calcext:value-type="float">
            <text:p>8.9667667E-01</text:p>
          </table:table-cell>
          <table:table-cell table:style-name="ce7" office:value-type="float" office:value="0.014075635124422" calcext:value-type="float">
            <text:p>1.407563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0];&quot;) = {&quot;;TEXT([.D30];&quot;0.0000000E+00&quot;);&quot;,&quot;;TEXT([.E30];&quot;0.0000000E+00&quot;);&quot;,&quot;;TEXT([.F30];&quot;0.0000000E+00&quot;);&quot;,&quot;;&quot;lc};&quot;)" office:value-type="string" office:string-value="Point(126) = {8.9667667E-01,1.4075635E-02,z0,lc};" calcext:value-type="string">
            <text:p>Point(126) = {8.9667667E-01,1.407563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7" calcext:value-type="float">
            <text:p>127</text:p>
          </table:table-cell>
          <table:table-cell table:style-name="ce7" office:value-type="float" office:value="0.888572980728486" calcext:value-type="float">
            <text:p>8.8857298E-01</text:p>
          </table:table-cell>
          <table:table-cell table:style-name="ce7" office:value-type="float" office:value="0.0151051033407724" calcext:value-type="float">
            <text:p>1.510510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1];&quot;) = {&quot;;TEXT([.D31];&quot;0.0000000E+00&quot;);&quot;,&quot;;TEXT([.E31];&quot;0.0000000E+00&quot;);&quot;,&quot;;TEXT([.F31];&quot;0.0000000E+00&quot;);&quot;,&quot;;&quot;lc};&quot;)" office:value-type="string" office:string-value="Point(127) = {8.8857298E-01,1.5105103E-02,z0,lc};" calcext:value-type="string">
            <text:p>Point(127) = {8.8857298E-01,1.510510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0.880202982800016" calcext:value-type="float">
            <text:p>8.8020298E-01</text:p>
          </table:table-cell>
          <table:table-cell table:style-name="ce7" office:value-type="float" office:value="0.0161577445240594" calcext:value-type="float">
            <text:p>1.615774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2];&quot;) = {&quot;;TEXT([.D32];&quot;0.0000000E+00&quot;);&quot;,&quot;;TEXT([.E32];&quot;0.0000000E+00&quot;);&quot;,&quot;;TEXT([.F32];&quot;0.0000000E+00&quot;);&quot;,&quot;;&quot;lc};&quot;)" office:value-type="string" office:string-value="Point(128) = {8.8020298E-01,1.6157745E-02,z0,lc};" calcext:value-type="string">
            <text:p>Point(128) = {8.8020298E-01,1.615774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29" calcext:value-type="float">
            <text:p>129</text:p>
          </table:table-cell>
          <table:table-cell table:style-name="ce7" office:value-type="float" office:value="0.871572412738697" calcext:value-type="float">
            <text:p>8.7157241E-01</text:p>
          </table:table-cell>
          <table:table-cell table:style-name="ce7" office:value-type="float" office:value="0.0172319405872572" calcext:value-type="float">
            <text:p>1.7231941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3];&quot;) = {&quot;;TEXT([.D33];&quot;0.0000000E+00&quot;);&quot;,&quot;;TEXT([.E33];&quot;0.0000000E+00&quot;);&quot;,&quot;;TEXT([.F33];&quot;0.0000000E+00&quot;);&quot;,&quot;;&quot;lc};&quot;)" office:value-type="string" office:string-value="Point(129) = {8.7157241E-01,1.7231941E-02,z0,lc};" calcext:value-type="string">
            <text:p>Point(129) = {8.7157241E-01,1.723194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0" calcext:value-type="float">
            <text:p>130</text:p>
          </table:table-cell>
          <table:table-cell table:style-name="ce7" office:value-type="float" office:value="0.862687185506144" calcext:value-type="float">
            <text:p>8.6268719E-01</text:p>
          </table:table-cell>
          <table:table-cell table:style-name="ce7" office:value-type="float" office:value="0.0183260633673618" calcext:value-type="float">
            <text:p>1.832606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4];&quot;) = {&quot;;TEXT([.D34];&quot;0.0000000E+00&quot;);&quot;,&quot;;TEXT([.E34];&quot;0.0000000E+00&quot;);&quot;,&quot;;TEXT([.F34];&quot;0.0000000E+00&quot;);&quot;,&quot;;&quot;lc};&quot;)" office:value-type="string" office:string-value="Point(130) = {8.6268719E-01,1.8326063E-02,z0,lc};" calcext:value-type="string">
            <text:p>Point(130) = {8.6268719E-01,1.832606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1" calcext:value-type="float">
            <text:p>131</text:p>
          </table:table-cell>
          <table:table-cell table:style-name="ce7" office:value-type="float" office:value="0.853553390593274" calcext:value-type="float">
            <text:p>8.5355339E-01</text:p>
          </table:table-cell>
          <table:table-cell table:style-name="ce7" office:value-type="float" office:value="0.0194384764401692" calcext:value-type="float">
            <text:p>1.943847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5];&quot;) = {&quot;;TEXT([.D35];&quot;0.0000000E+00&quot;);&quot;,&quot;;TEXT([.E35];&quot;0.0000000E+00&quot;);&quot;,&quot;;TEXT([.F35];&quot;0.0000000E+00&quot;);&quot;,&quot;;&quot;lc};&quot;)" office:value-type="string" office:string-value="Point(131) = {8.5355339E-01,1.9438476E-02,z0,lc};" calcext:value-type="string">
            <text:p>Point(131) = {8.5355339E-01,1.943847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2" calcext:value-type="float">
            <text:p>132</text:p>
          </table:table-cell>
          <table:table-cell table:style-name="ce7" office:value-type="float" office:value="0.844177287846877" calcext:value-type="float">
            <text:p>8.4417729E-01</text:p>
          </table:table-cell>
          <table:table-cell table:style-name="ce7" office:value-type="float" office:value="0.0205675365474671" calcext:value-type="float">
            <text:p>2.056753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6];&quot;) = {&quot;;TEXT([.D36];&quot;0.0000000E+00&quot;);&quot;,&quot;;TEXT([.E36];&quot;0.0000000E+00&quot;);&quot;,&quot;;TEXT([.F36];&quot;0.0000000E+00&quot;);&quot;,&quot;;&quot;lc};&quot;)" office:value-type="string" office:string-value="Point(132) = {8.4417729E-01,2.0567537E-02,z0,lc};" calcext:value-type="string">
            <text:p>Point(132) = {8.4417729E-01,2.056753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3" calcext:value-type="float">
            <text:p>133</text:p>
          </table:table-cell>
          <table:table-cell table:style-name="ce7" office:value-type="float" office:value="0.834565303179429" calcext:value-type="float">
            <text:p>8.3456530E-01</text:p>
          </table:table-cell>
          <table:table-cell table:style-name="ce7" office:value-type="float" office:value="0.0217115946379781" calcext:value-type="float">
            <text:p>2.171159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7];&quot;) = {&quot;;TEXT([.D37];&quot;0.0000000E+00&quot;);&quot;,&quot;;TEXT([.E37];&quot;0.0000000E+00&quot;);&quot;,&quot;;TEXT([.F37];&quot;0.0000000E+00&quot;);&quot;,&quot;;&quot;lc};&quot;)" office:value-type="string" office:string-value="Point(133) = {8.3456530E-01,2.1711595E-02,z0,lc};" calcext:value-type="string">
            <text:p>Point(133) = {8.3456530E-01,2.171159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4" calcext:value-type="float">
            <text:p>134</text:p>
          </table:table-cell>
          <table:table-cell table:style-name="ce7" office:value-type="float" office:value="0.824724024165092" calcext:value-type="float">
            <text:p>8.2472402E-01</text:p>
          </table:table-cell>
          <table:table-cell table:style-name="ce7" office:value-type="float" office:value="0.0228689965289596" calcext:value-type="float">
            <text:p>2.286899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8];&quot;) = {&quot;;TEXT([.D38];&quot;0.0000000E+00&quot;);&quot;,&quot;;TEXT([.E38];&quot;0.0000000E+00&quot;);&quot;,&quot;;TEXT([.F38];&quot;0.0000000E+00&quot;);&quot;,&quot;;&quot;lc};&quot;)" office:value-type="string" office:string-value="Point(134) = {8.2472402E-01,2.2868997E-02,z0,lc};" calcext:value-type="string">
            <text:p>Point(134) = {8.2472402E-01,2.286899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5" calcext:value-type="float">
            <text:p>135</text:p>
          </table:table-cell>
          <table:table-cell table:style-name="ce7" office:value-type="float" office:value="0.814660195524919" calcext:value-type="float">
            <text:p>8.1466020E-01</text:p>
          </table:table-cell>
          <table:table-cell table:style-name="ce7" office:value-type="float" office:value="0.0240380832008678" calcext:value-type="float">
            <text:p>2.403808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39];&quot;) = {&quot;;TEXT([.D39];&quot;0.0000000E+00&quot;);&quot;,&quot;;TEXT([.E39];&quot;0.0000000E+00&quot;);&quot;,&quot;;TEXT([.F39];&quot;0.0000000E+00&quot;);&quot;,&quot;;&quot;lc};&quot;)" office:value-type="string" office:string-value="Point(135) = {8.1466020E-01,2.4038083E-02,z0,lc};" calcext:value-type="string">
            <text:p>Point(135) = {8.1466020E-01,2.403808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6" calcext:value-type="float">
            <text:p>136</text:p>
          </table:table-cell>
          <table:table-cell table:style-name="ce7" office:value-type="float" office:value="0.80438071450436" calcext:value-type="float">
            <text:p>8.0438071E-01</text:p>
          </table:table-cell>
          <table:table-cell table:style-name="ce7" office:value-type="float" office:value="0.025217190742879" calcext:value-type="float">
            <text:p>2.5217191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0];&quot;) = {&quot;;TEXT([.D40];&quot;0.0000000E+00&quot;);&quot;,&quot;;TEXT([.E40];&quot;0.0000000E+00&quot;);&quot;,&quot;;TEXT([.F40];&quot;0.0000000E+00&quot;);&quot;,&quot;;&quot;lc};&quot;)" office:value-type="string" office:string-value="Point(136) = {8.0438071E-01,2.5217191E-02,z0,lc};" calcext:value-type="string">
            <text:p>Point(136) = {8.0438071E-01,2.521719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7" calcext:value-type="float">
            <text:p>137</text:p>
          </table:table-cell>
          <table:table-cell table:style-name="ce7" office:value-type="float" office:value="0.793892626146237" calcext:value-type="float">
            <text:p>7.9389263E-01</text:p>
          </table:table-cell>
          <table:table-cell table:style-name="ce7" office:value-type="float" office:value="0.0264046499722451" calcext:value-type="float">
            <text:p>2.640465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1];&quot;) = {&quot;;TEXT([.D41];&quot;0.0000000E+00&quot;);&quot;,&quot;;TEXT([.E41];&quot;0.0000000E+00&quot;);&quot;,&quot;;TEXT([.F41];&quot;0.0000000E+00&quot;);&quot;,&quot;;&quot;lc};&quot;)" office:value-type="string" office:string-value="Point(137) = {7.9389263E-01,2.6404650E-02,z0,lc};" calcext:value-type="string">
            <text:p>Point(137) = {7.9389263E-01,2.640465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8" calcext:value-type="float">
            <text:p>138</text:p>
          </table:table-cell>
          <table:table-cell table:style-name="ce7" office:value-type="float" office:value="0.783203118462417" calcext:value-type="float">
            <text:p>7.8320312E-01</text:p>
          </table:table-cell>
          <table:table-cell table:style-name="ce7" office:value-type="float" office:value="0.0275987857553968" calcext:value-type="float">
            <text:p>2.759878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2];&quot;) = {&quot;;TEXT([.D42];&quot;0.0000000E+00&quot;);&quot;,&quot;;TEXT([.E42];&quot;0.0000000E+00&quot;);&quot;,&quot;;TEXT([.F42];&quot;0.0000000E+00&quot;);&quot;,&quot;;&quot;lc};&quot;)" office:value-type="string" office:string-value="Point(138) = {7.8320312E-01,2.7598786E-02,z0,lc};" calcext:value-type="string">
            <text:p>Point(138) = {7.8320312E-01,2.759878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39" calcext:value-type="float">
            <text:p>139</text:p>
          </table:table-cell>
          <table:table-cell table:style-name="ce7" office:value-type="float" office:value="0.772319517507513" calcext:value-type="float">
            <text:p>7.7231952E-01</text:p>
          </table:table-cell>
          <table:table-cell table:style-name="ce7" office:value-type="float" office:value="0.0287979160633171" calcext:value-type="float">
            <text:p>2.879791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3];&quot;) = {&quot;;TEXT([.D43];&quot;0.0000000E+00&quot;);&quot;,&quot;;TEXT([.E43];&quot;0.0000000E+00&quot;);&quot;,&quot;;TEXT([.F43];&quot;0.0000000E+00&quot;);&quot;,&quot;;&quot;lc};&quot;)" office:value-type="string" office:string-value="Point(139) = {7.7231952E-01,2.8797916E-02,z0,lc};" calcext:value-type="string">
            <text:p>Point(139) = {7.7231952E-01,2.879791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0" calcext:value-type="float">
            <text:p>140</text:p>
          </table:table-cell>
          <table:table-cell table:style-name="ce7" office:value-type="float" office:value="0.761249282357974" calcext:value-type="float">
            <text:p>7.6124928E-01</text:p>
          </table:table-cell>
          <table:table-cell table:style-name="ce7" office:value-type="float" office:value="0.0300003507979432" calcext:value-type="float">
            <text:p>3.0000351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4];&quot;) = {&quot;;TEXT([.D44];&quot;0.0000000E+00&quot;);&quot;,&quot;;TEXT([.E44];&quot;0.0000000E+00&quot;);&quot;,&quot;;TEXT([.F44];&quot;0.0000000E+00&quot;);&quot;,&quot;;&quot;lc};&quot;)" office:value-type="string" office:string-value="Point(140) = {7.6124928E-01,3.0000351E-02,z0,lc};" calcext:value-type="string">
            <text:p>Point(140) = {7.6124928E-01,3.000035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1" calcext:value-type="float">
            <text:p>141</text:p>
          </table:table-cell>
          <table:table-cell table:style-name="ce7" office:value-type="float" office:value="0.75" calcext:value-type="float">
            <text:p>7.5000000E-01</text:p>
          </table:table-cell>
          <table:table-cell table:style-name="ce7" office:value-type="float" office:value="0.0312043904301599" calcext:value-type="float">
            <text:p>3.120439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5];&quot;) = {&quot;;TEXT([.D45];&quot;0.0000000E+00&quot;);&quot;,&quot;;TEXT([.E45];&quot;0.0000000E+00&quot;);&quot;,&quot;;TEXT([.F45];&quot;0.0000000E+00&quot;);&quot;,&quot;;&quot;lc};&quot;)" office:value-type="string" office:string-value="Point(141) = {7.5000000E-01,3.1204390E-02,z0,lc};" calcext:value-type="string">
            <text:p>Point(141) = {7.5000000E-01,3.120439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2" calcext:value-type="float">
            <text:p>142</text:p>
          </table:table-cell>
          <table:table-cell table:style-name="ce7" office:value-type="float" office:value="0.738579380129804" calcext:value-type="float">
            <text:p>7.3857938E-01</text:p>
          </table:table-cell>
          <table:table-cell table:style-name="ce7" office:value-type="float" office:value="0.0324083244932621" calcext:value-type="float">
            <text:p>3.2408324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6];&quot;) = {&quot;;TEXT([.D46];&quot;0.0000000E+00&quot;);&quot;,&quot;;TEXT([.E46];&quot;0.0000000E+00&quot;);&quot;,&quot;;TEXT([.F46];&quot;0.0000000E+00&quot;);&quot;,&quot;;&quot;lc};&quot;)" office:value-type="string" office:string-value="Point(142) = {7.3857938E-01,3.2408324E-02,z0,lc};" calcext:value-type="string">
            <text:p>Point(142) = {7.3857938E-01,3.2408324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3" calcext:value-type="float">
            <text:p>143</text:p>
          </table:table-cell>
          <table:table-cell table:style-name="ce7" office:value-type="float" office:value="0.726995249869773" calcext:value-type="float">
            <text:p>7.2699525E-01</text:p>
          </table:table-cell>
          <table:table-cell table:style-name="ce7" office:value-type="float" office:value="0.0336104299785611" calcext:value-type="float">
            <text:p>3.361043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7];&quot;) = {&quot;;TEXT([.D47];&quot;0.0000000E+00&quot;);&quot;,&quot;;TEXT([.E47];&quot;0.0000000E+00&quot;);&quot;,&quot;;TEXT([.F47];&quot;0.0000000E+00&quot;);&quot;,&quot;;&quot;lc};&quot;)" office:value-type="string" office:string-value="Point(143) = {7.2699525E-01,3.3610430E-02,z0,lc};" calcext:value-type="string">
            <text:p>Point(143) = {7.2699525E-01,3.361043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0.715255548404147" calcext:value-type="float">
            <text:p>7.1525555E-01</text:p>
          </table:table-cell>
          <table:table-cell table:style-name="ce7" office:value-type="float" office:value="0.0348089696820301" calcext:value-type="float">
            <text:p>3.480897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8];&quot;) = {&quot;;TEXT([.D48];&quot;0.0000000E+00&quot;);&quot;,&quot;;TEXT([.E48];&quot;0.0000000E+00&quot;);&quot;,&quot;;TEXT([.F48];&quot;0.0000000E+00&quot;);&quot;,&quot;;&quot;lc};&quot;)" office:value-type="string" office:string-value="Point(144) = {7.1525555E-01,3.4808970E-02,z0,lc};" calcext:value-type="string">
            <text:p>Point(144) = {7.1525555E-01,3.480897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5" calcext:value-type="float">
            <text:p>145</text:p>
          </table:table-cell>
          <table:table-cell table:style-name="ce7" office:value-type="float" office:value="0.7033683215379" calcext:value-type="float">
            <text:p>7.0336832E-01</text:p>
          </table:table-cell>
          <table:table-cell table:style-name="ce7" office:value-type="float" office:value="0.0360021905525126" calcext:value-type="float">
            <text:p>3.6002191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49];&quot;) = {&quot;;TEXT([.D49];&quot;0.0000000E+00&quot;);&quot;,&quot;;TEXT([.E49];&quot;0.0000000E+00&quot;);&quot;,&quot;;TEXT([.F49];&quot;0.0000000E+00&quot;);&quot;,&quot;;&quot;lc};&quot;)" office:value-type="string" office:string-value="Point(145) = {7.0336832E-01,3.6002191E-02,z0,lc};" calcext:value-type="string">
            <text:p>Point(145) = {7.0336832E-01,3.600219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6" calcext:value-type="float">
            <text:p>146</text:p>
          </table:table-cell>
          <table:table-cell table:style-name="ce7" office:value-type="float" office:value="0.691341716182545" calcext:value-type="float">
            <text:p>6.9134172E-01</text:p>
          </table:table-cell>
          <table:table-cell table:style-name="ce7" office:value-type="float" office:value="0.0371883220930156" calcext:value-type="float">
            <text:p>3.718832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0];&quot;) = {&quot;;TEXT([.D50];&quot;0.0000000E+00&quot;);&quot;,&quot;;TEXT([.E50];&quot;0.0000000E+00&quot;);&quot;,&quot;;TEXT([.F50];&quot;0.0000000E+00&quot;);&quot;,&quot;;&quot;lc};&quot;)" office:value-type="string" office:string-value="Point(146) = {6.9134172E-01,3.7188322E-02,z0,lc};" calcext:value-type="string">
            <text:p>Point(146) = {6.9134172E-01,3.718832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0.67918397477265" calcext:value-type="float">
            <text:p>6.7918397E-01</text:p>
          </table:table-cell>
          <table:table-cell table:style-name="ce7" office:value-type="float" office:value="0.0383655748669655" calcext:value-type="float">
            <text:p>3.836557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1];&quot;) = {&quot;;TEXT([.D51];&quot;0.0000000E+00&quot;);&quot;,&quot;;TEXT([.E51];&quot;0.0000000E+00&quot;);&quot;,&quot;;TEXT([.F51];&quot;0.0000000E+00&quot;);&quot;,&quot;;&quot;lc};&quot;)" office:value-type="string" office:string-value="Point(147) = {6.7918397E-01,3.8365575E-02,z0,lc};" calcext:value-type="string">
            <text:p>Point(147) = {6.7918397E-01,3.836557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8" calcext:value-type="float">
            <text:p>148</text:p>
          </table:table-cell>
          <table:table-cell table:style-name="ce7" office:value-type="float" office:value="0.666903429616885" calcext:value-type="float">
            <text:p>6.6690343E-01</text:p>
          </table:table-cell>
          <table:table-cell table:style-name="ce7" office:value-type="float" office:value="0.039532139161004" calcext:value-type="float">
            <text:p>3.9532139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2];&quot;) = {&quot;;TEXT([.D52];&quot;0.0000000E+00&quot;);&quot;,&quot;;TEXT([.E52];&quot;0.0000000E+00&quot;);&quot;,&quot;;TEXT([.F52];&quot;0.0000000E+00&quot;);&quot;,&quot;;&quot;lc};&quot;)" office:value-type="string" office:string-value="Point(148) = {6.6690343E-01,3.9532139E-02,z0,lc};" calcext:value-type="string">
            <text:p>Point(148) = {6.6690343E-01,3.953213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49" calcext:value-type="float">
            <text:p>149</text:p>
          </table:table-cell>
          <table:table-cell table:style-name="ce7" office:value-type="float" office:value="0.654508497187474" calcext:value-type="float">
            <text:p>6.5450850E-01</text:p>
          </table:table-cell>
          <table:table-cell table:style-name="ce7" office:value-type="float" office:value="0.0406861838549376" calcext:value-type="float">
            <text:p>4.0686184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3];&quot;) = {&quot;;TEXT([.D53];&quot;0.0000000E+00&quot;);&quot;,&quot;;TEXT([.E53];&quot;0.0000000E+00&quot;);&quot;,&quot;;TEXT([.F53];&quot;0.0000000E+00&quot;);&quot;,&quot;;&quot;lc};&quot;)" office:value-type="string" office:string-value="Point(149) = {6.5450850E-01,4.0686184E-02,z0,lc};" calcext:value-type="string">
            <text:p>Point(149) = {6.5450850E-01,4.0686184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0" calcext:value-type="float">
            <text:p>150</text:p>
          </table:table-cell>
          <table:table-cell table:style-name="ce7" office:value-type="float" office:value="0.642007672351961" calcext:value-type="float">
            <text:p>6.4200767E-01</text:p>
          </table:table-cell>
          <table:table-cell table:style-name="ce7" office:value-type="float" office:value="0.0418258555478396" calcext:value-type="float">
            <text:p>4.182585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4];&quot;) = {&quot;;TEXT([.D54];&quot;0.0000000E+00&quot;);&quot;,&quot;;TEXT([.E54];&quot;0.0000000E+00&quot;);&quot;,&quot;;TEXT([.F54];&quot;0.0000000E+00&quot;);&quot;,&quot;;&quot;lc};&quot;)" office:value-type="string" office:string-value="Point(150) = {6.4200767E-01,4.1825856E-02,z0,lc};" calcext:value-type="string">
            <text:p>Point(150) = {6.4200767E-01,4.182585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1" calcext:value-type="float">
            <text:p>151</text:p>
          </table:table-cell>
          <table:table-cell table:style-name="ce7" office:value-type="float" office:value="0.62940952255126" calcext:value-type="float">
            <text:p>6.2940952E-01</text:p>
          </table:table-cell>
          <table:table-cell table:style-name="ce7" office:value-type="float" office:value="0.042949277987034" calcext:value-type="float">
            <text:p>4.294927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5];&quot;) = {&quot;;TEXT([.D55];&quot;0.0000000E+00&quot;);&quot;,&quot;;TEXT([.E55];&quot;0.0000000E+00&quot;);&quot;,&quot;;TEXT([.F55];&quot;0.0000000E+00&quot;);&quot;,&quot;;&quot;lc};&quot;)" office:value-type="string" office:string-value="Point(151) = {6.2940952E-01,4.2949278E-02,z0,lc};" calcext:value-type="string">
            <text:p>Point(151) = {6.2940952E-01,4.294927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7" office:value-type="float" office:value="0.616722681927953" calcext:value-type="float">
            <text:p>6.1672268E-01</text:p>
          </table:table-cell>
          <table:table-cell table:style-name="ce7" office:value-type="float" office:value="0.0440545518438032" calcext:value-type="float">
            <text:p>4.405455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6];&quot;) = {&quot;;TEXT([.D56];&quot;0.0000000E+00&quot;);&quot;,&quot;;TEXT([.E56];&quot;0.0000000E+00&quot;);&quot;,&quot;;TEXT([.F56];&quot;0.0000000E+00&quot;);&quot;,&quot;;&quot;lc};&quot;)" office:value-type="string" office:string-value="Point(152) = {6.1672268E-01,4.4054552E-02,z0,lc};" calcext:value-type="string">
            <text:p>Point(152) = {6.1672268E-01,4.405455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3" calcext:value-type="float">
            <text:p>153</text:p>
          </table:table-cell>
          <table:table-cell table:style-name="ce7" office:value-type="float" office:value="0.60395584540888" calcext:value-type="float">
            <text:p>6.0395585E-01</text:p>
          </table:table-cell>
          <table:table-cell table:style-name="ce7" office:value-type="float" office:value="0.0451397548761643" calcext:value-type="float">
            <text:p>4.513975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7];&quot;) = {&quot;;TEXT([.D57];&quot;0.0000000E+00&quot;);&quot;,&quot;;TEXT([.E57];&quot;0.0000000E+00&quot;);&quot;,&quot;;TEXT([.F57];&quot;0.0000000E+00&quot;);&quot;,&quot;;&quot;lc};&quot;)" office:value-type="string" office:string-value="Point(153) = {6.0395585E-01,4.5139755E-02,z0,lc};" calcext:value-type="string">
            <text:p>Point(153) = {6.0395585E-01,4.513975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4" calcext:value-type="float">
            <text:p>154</text:p>
          </table:table-cell>
          <table:table-cell table:style-name="ce7" office:value-type="float" office:value="0.591117762746074" calcext:value-type="float">
            <text:p>5.9111776E-01</text:p>
          </table:table-cell>
          <table:table-cell table:style-name="ce7" office:value-type="float" office:value="0.046202942514998" calcext:value-type="float">
            <text:p>4.620294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8];&quot;) = {&quot;;TEXT([.D58];&quot;0.0000000E+00&quot;);&quot;,&quot;;TEXT([.E58];&quot;0.0000000E+00&quot;);&quot;,&quot;;TEXT([.F58];&quot;0.0000000E+00&quot;);&quot;,&quot;;&quot;lc};&quot;)" office:value-type="string" office:string-value="Point(154) = {5.9111776E-01,4.6202943E-02,z0,lc};" calcext:value-type="string">
            <text:p>Point(154) = {5.9111776E-01,4.620294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5" calcext:value-type="float">
            <text:p>155</text:p>
          </table:table-cell>
          <table:table-cell table:style-name="ce7" office:value-type="float" office:value="0.578217232520115" calcext:value-type="float">
            <text:p>5.7821723E-01</text:p>
          </table:table-cell>
          <table:table-cell table:style-name="ce7" office:value-type="float" office:value="0.0472421489052245" calcext:value-type="float">
            <text:p>4.7242149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59];&quot;) = {&quot;;TEXT([.D59];&quot;0.0000000E+00&quot;);&quot;,&quot;;TEXT([.E59];&quot;0.0000000E+00&quot;);&quot;,&quot;;TEXT([.F59];&quot;0.0000000E+00&quot;);&quot;,&quot;;&quot;lc};&quot;)" office:value-type="string" office:string-value="Point(155) = {5.7821723E-01,4.7242149E-02,z0,lc};" calcext:value-type="string">
            <text:p>Point(155) = {5.7821723E-01,4.724214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0.565263096110026" calcext:value-type="float">
            <text:p>5.6526310E-01</text:p>
          </table:table-cell>
          <table:table-cell table:style-name="ce7" office:value-type="float" office:value="0.0482553884286467" calcext:value-type="float">
            <text:p>4.825538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0];&quot;) = {&quot;;TEXT([.D60];&quot;0.0000000E+00&quot;);&quot;,&quot;;TEXT([.E60];&quot;0.0000000E+00&quot;);&quot;,&quot;;TEXT([.F60];&quot;0.0000000E+00&quot;);&quot;,&quot;;&quot;lc};&quot;)" office:value-type="string" office:string-value="Point(156) = {5.6526310E-01,4.8255388E-02,z0,lc};" calcext:value-type="string">
            <text:p>Point(156) = {5.6526310E-01,4.825538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7" calcext:value-type="float">
            <text:p>157</text:p>
          </table:table-cell>
          <table:table-cell table:style-name="ce7" office:value-type="float" office:value="0.552264231633827" calcext:value-type="float">
            <text:p>5.5226423E-01</text:p>
          </table:table-cell>
          <table:table-cell table:style-name="ce7" office:value-type="float" office:value="0.0492406577295794" calcext:value-type="float">
            <text:p>4.924065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1];&quot;) = {&quot;;TEXT([.D61];&quot;0.0000000E+00&quot;);&quot;,&quot;;TEXT([.E61];&quot;0.0000000E+00&quot;);&quot;,&quot;;TEXT([.F61];&quot;0.0000000E+00&quot;);&quot;,&quot;;&quot;lc};&quot;)" office:value-type="string" office:string-value="Point(157) = {5.5226423E-01,4.9240658E-02,z0,lc};" calcext:value-type="string">
            <text:p>Point(157) = {5.5226423E-01,4.924065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8" calcext:value-type="float">
            <text:p>158</text:p>
          </table:table-cell>
          <table:table-cell table:style-name="ce7" office:value-type="float" office:value="0.539229547863922" calcext:value-type="float">
            <text:p>5.3922955E-01</text:p>
          </table:table-cell>
          <table:table-cell table:style-name="ce7" office:value-type="float" office:value="0.0501959382585087" calcext:value-type="float">
            <text:p>5.019593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2];&quot;) = {&quot;;TEXT([.D62];&quot;0.0000000E+00&quot;);&quot;,&quot;;TEXT([.E62];&quot;0.0000000E+00&quot;);&quot;,&quot;;TEXT([.F62];&quot;0.0000000E+00&quot;);&quot;,&quot;;&quot;lc};&quot;)" office:value-type="string" office:string-value="Point(158) = {5.3922955E-01,5.0195938E-02,z0,lc};" calcext:value-type="string">
            <text:p>Point(158) = {5.3922955E-01,5.019593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59" calcext:value-type="float">
            <text:p>159</text:p>
          </table:table-cell>
          <table:table-cell table:style-name="ce7" office:value-type="float" office:value="0.526167978121472" calcext:value-type="float">
            <text:p>5.2616798E-01</text:p>
          </table:table-cell>
          <table:table-cell table:style-name="ce7" office:value-type="float" office:value="0.0511191993428425" calcext:value-type="float">
            <text:p>5.1119199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3];&quot;) = {&quot;;TEXT([.D63];&quot;0.0000000E+00&quot;);&quot;,&quot;;TEXT([.E63];&quot;0.0000000E+00&quot;);&quot;,&quot;;TEXT([.F63];&quot;0.0000000E+00&quot;);&quot;,&quot;;&quot;lc};&quot;)" office:value-type="string" office:string-value="Point(159) = {5.2616798E-01,5.1119199E-02,z0,lc};" calcext:value-type="string">
            <text:p>Point(159) = {5.2616798E-01,5.111919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0.513088474153937" calcext:value-type="float">
            <text:p>5.1308847E-01</text:p>
          </table:table-cell>
          <table:table-cell table:style-name="ce7" office:value-type="float" office:value="0.0520084017873851" calcext:value-type="float">
            <text:p>5.200840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4];&quot;) = {&quot;;TEXT([.D64];&quot;0.0000000E+00&quot;);&quot;,&quot;;TEXT([.E64];&quot;0.0000000E+00&quot;);&quot;,&quot;;TEXT([.F64];&quot;0.0000000E+00&quot;);&quot;,&quot;;&quot;lc};&quot;)" office:value-type="string" office:string-value="Point(160) = {5.1308847E-01,5.2008402E-02,z0,lc};" calcext:value-type="string">
            <text:p>Point(160) = {5.1308847E-01,5.200840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1" calcext:value-type="float">
            <text:p>161</text:p>
          </table:table-cell>
          <table:table-cell table:style-name="ce7" office:value-type="float" office:value="0.5" calcext:value-type="float">
            <text:p>5.0000000E-01</text:p>
          </table:table-cell>
          <table:table-cell table:style-name="ce7" office:value-type="float" office:value="0.0528615020005716" calcext:value-type="float">
            <text:p>5.286150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5];&quot;) = {&quot;;TEXT([.D65];&quot;0.0000000E+00&quot;);&quot;,&quot;;TEXT([.E65];&quot;0.0000000E+00&quot;);&quot;,&quot;;TEXT([.F65];&quot;0.0000000E+00&quot;);&quot;,&quot;;&quot;lc};&quot;)" office:value-type="string" office:string-value="Point(161) = {5.0000000E-01,5.2861502E-02,z0,lc};" calcext:value-type="string">
            <text:p>Point(161) = {5.0000000E-01,5.286150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2" calcext:value-type="float">
            <text:p>162</text:p>
          </table:table-cell>
          <table:table-cell table:style-name="ce7" office:value-type="float" office:value="0.486911525846063" calcext:value-type="float">
            <text:p>4.8691153E-01</text:p>
          </table:table-cell>
          <table:table-cell table:style-name="ce7" office:value-type="float" office:value="0.0536764566357969" calcext:value-type="float">
            <text:p>5.367645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6];&quot;) = {&quot;;TEXT([.D66];&quot;0.0000000E+00&quot;);&quot;,&quot;;TEXT([.E66];&quot;0.0000000E+00&quot;);&quot;,&quot;;TEXT([.F66];&quot;0.0000000E+00&quot;);&quot;,&quot;;&quot;lc};&quot;)" office:value-type="string" office:string-value="Point(162) = {4.8691153E-01,5.3676457E-02,z0,lc};" calcext:value-type="string">
            <text:p>Point(162) = {4.8691153E-01,5.367645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0.473832021878528" calcext:value-type="float">
            <text:p>4.7383202E-01</text:p>
          </table:table-cell>
          <table:table-cell table:style-name="ce7" office:value-type="float" office:value="0.0544512277304519" calcext:value-type="float">
            <text:p>5.445122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7];&quot;) = {&quot;;TEXT([.D67];&quot;0.0000000E+00&quot;);&quot;,&quot;;TEXT([.E67];&quot;0.0000000E+00&quot;);&quot;,&quot;;TEXT([.F67];&quot;0.0000000E+00&quot;);&quot;,&quot;;&quot;lc};&quot;)" office:value-type="string" office:string-value="Point(163) = {4.7383202E-01,5.4451228E-02,z0,lc};" calcext:value-type="string">
            <text:p>Point(163) = {4.7383202E-01,5.445122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0.460770452136078" calcext:value-type="float">
            <text:p>4.6077045E-01</text:p>
          </table:table-cell>
          <table:table-cell table:style-name="ce7" office:value-type="float" office:value="0.0551837883186037" calcext:value-type="float">
            <text:p>5.518378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8];&quot;) = {&quot;;TEXT([.D68];&quot;0.0000000E+00&quot;);&quot;,&quot;;TEXT([.E68];&quot;0.0000000E+00&quot;);&quot;,&quot;;TEXT([.F68];&quot;0.0000000E+00&quot;);&quot;,&quot;;&quot;lc};&quot;)" office:value-type="string" office:string-value="Point(164) = {4.6077045E-01,5.5183788E-02,z0,lc};" calcext:value-type="string">
            <text:p>Point(164) = {4.6077045E-01,5.518378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5" calcext:value-type="float">
            <text:p>165</text:p>
          </table:table-cell>
          <table:table-cell table:style-name="ce7" office:value-type="float" office:value="0.447735768366173" calcext:value-type="float">
            <text:p>4.4773577E-01</text:p>
          </table:table-cell>
          <table:table-cell table:style-name="ce7" office:value-type="float" office:value="0.0558721284867123" calcext:value-type="float">
            <text:p>5.587212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69];&quot;) = {&quot;;TEXT([.D69];&quot;0.0000000E+00&quot;);&quot;,&quot;;TEXT([.E69];&quot;0.0000000E+00&quot;);&quot;,&quot;;TEXT([.F69];&quot;0.0000000E+00&quot;);&quot;,&quot;;&quot;lc};&quot;)" office:value-type="string" office:string-value="Point(165) = {4.4773577E-01,5.5872128E-02,z0,lc};" calcext:value-type="string">
            <text:p>Point(165) = {4.4773577E-01,5.587212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0.434736903889974" calcext:value-type="float">
            <text:p>4.3473690E-01</text:p>
          </table:table-cell>
          <table:table-cell table:style-name="ce7" office:value-type="float" office:value="0.0565142618354297" calcext:value-type="float">
            <text:p>5.651426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0];&quot;) = {&quot;;TEXT([.D70];&quot;0.0000000E+00&quot;);&quot;,&quot;;TEXT([.E70];&quot;0.0000000E+00&quot;);&quot;,&quot;;TEXT([.F70];&quot;0.0000000E+00&quot;);&quot;,&quot;;&quot;lc};&quot;)" office:value-type="string" office:string-value="Point(166) = {4.3473690E-01,5.6514262E-02,z0,lc};" calcext:value-type="string">
            <text:p>Point(166) = {4.3473690E-01,5.651426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7" calcext:value-type="float">
            <text:p>167</text:p>
          </table:table-cell>
          <table:table-cell table:style-name="ce7" office:value-type="float" office:value="0.421782767479885" calcext:value-type="float">
            <text:p>4.2178277E-01</text:p>
          </table:table-cell>
          <table:table-cell table:style-name="ce7" office:value-type="float" office:value="0.0571082323044601" calcext:value-type="float">
            <text:p>5.710823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1];&quot;) = {&quot;;TEXT([.D71];&quot;0.0000000E+00&quot;);&quot;,&quot;;TEXT([.E71];&quot;0.0000000E+00&quot;);&quot;,&quot;;TEXT([.F71];&quot;0.0000000E+00&quot;);&quot;,&quot;;&quot;lc};&quot;)" office:value-type="string" office:string-value="Point(167) = {4.2178277E-01,5.7108232E-02,z0,lc};" calcext:value-type="string">
            <text:p>Point(167) = {4.2178277E-01,5.710823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8" calcext:value-type="float">
            <text:p>168</text:p>
          </table:table-cell>
          <table:table-cell table:style-name="ce7" office:value-type="float" office:value="0.408882237253926" calcext:value-type="float">
            <text:p>4.0888224E-01</text:p>
          </table:table-cell>
          <table:table-cell table:style-name="ce7" office:value-type="float" office:value="0.0576521213117386" calcext:value-type="float">
            <text:p>5.7652121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2];&quot;) = {&quot;;TEXT([.D72];&quot;0.0000000E+00&quot;);&quot;,&quot;;TEXT([.E72];&quot;0.0000000E+00&quot;);&quot;,&quot;;TEXT([.F72];&quot;0.0000000E+00&quot;);&quot;,&quot;;&quot;lc};&quot;)" office:value-type="string" office:string-value="Point(168) = {4.0888224E-01,5.7652121E-02,z0,lc};" calcext:value-type="string">
            <text:p>Point(168) = {4.0888224E-01,5.765212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69" calcext:value-type="float">
            <text:p>169</text:p>
          </table:table-cell>
          <table:table-cell table:style-name="ce7" office:value-type="float" office:value="0.39604415459112" calcext:value-type="float">
            <text:p>3.9604415E-01</text:p>
          </table:table-cell>
          <table:table-cell table:style-name="ce7" office:value-type="float" office:value="0.0581440551528807" calcext:value-type="float">
            <text:p>5.814405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3];&quot;) = {&quot;;TEXT([.D73];&quot;0.0000000E+00&quot;);&quot;,&quot;;TEXT([.E73];&quot;0.0000000E+00&quot;);&quot;,&quot;;TEXT([.F73];&quot;0.0000000E+00&quot;);&quot;,&quot;;&quot;lc};&quot;)" office:value-type="string" office:string-value="Point(169) = {3.9604415E-01,5.8144055E-02,z0,lc};" calcext:value-type="string">
            <text:p>Point(169) = {3.9604415E-01,5.814405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0" calcext:value-type="float">
            <text:p>170</text:p>
          </table:table-cell>
          <table:table-cell table:style-name="ce7" office:value-type="float" office:value="0.383277318072047" calcext:value-type="float">
            <text:p>3.8327732E-01</text:p>
          </table:table-cell>
          <table:table-cell table:style-name="ce7" office:value-type="float" office:value="0.0585822126020352" calcext:value-type="float">
            <text:p>5.858221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4];&quot;) = {&quot;;TEXT([.D74];&quot;0.0000000E+00&quot;);&quot;,&quot;;TEXT([.E74];&quot;0.0000000E+00&quot;);&quot;,&quot;;TEXT([.F74];&quot;0.0000000E+00&quot;);&quot;,&quot;;&quot;lc};&quot;)" office:value-type="string" office:string-value="Point(170) = {3.8327732E-01,5.8582213E-02,z0,lc};" calcext:value-type="string">
            <text:p>Point(170) = {3.8327732E-01,5.858221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7" office:value-type="float" office:value="0.37059047744874" calcext:value-type="float">
            <text:p>3.7059048E-01</text:p>
          </table:table-cell>
          <table:table-cell table:style-name="ce7" office:value-type="float" office:value="0.0589648326509882" calcext:value-type="float">
            <text:p>5.896483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5];&quot;) = {&quot;;TEXT([.D75];&quot;0.0000000E+00&quot;);&quot;,&quot;;TEXT([.E75];&quot;0.0000000E+00&quot;);&quot;,&quot;;TEXT([.F75];&quot;0.0000000E+00&quot;);&quot;,&quot;;&quot;lc};&quot;)" office:value-type="string" office:string-value="Point(171) = {3.7059048E-01,5.8964833E-02,z0,lc};" calcext:value-type="string">
            <text:p>Point(171) = {3.7059048E-01,5.896483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0.357992327648039" calcext:value-type="float">
            <text:p>3.5799233E-01</text:p>
          </table:table-cell>
          <table:table-cell table:style-name="ce7" office:value-type="float" office:value="0.0592902223196843" calcext:value-type="float">
            <text:p>5.929022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6];&quot;) = {&quot;;TEXT([.D76];&quot;0.0000000E+00&quot;);&quot;,&quot;;TEXT([.E76];&quot;0.0000000E+00&quot;);&quot;,&quot;;TEXT([.F76];&quot;0.0000000E+00&quot;);&quot;,&quot;;&quot;lc};&quot;)" office:value-type="string" office:string-value="Point(172) = {3.5799233E-01,5.9290222E-02,z0,lc};" calcext:value-type="string">
            <text:p>Point(172) = {3.5799233E-01,5.929022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3" calcext:value-type="float">
            <text:p>173</text:p>
          </table:table-cell>
          <table:table-cell table:style-name="ce7" office:value-type="float" office:value="0.345491502812526" calcext:value-type="float">
            <text:p>3.4549150E-01</text:p>
          </table:table-cell>
          <table:table-cell table:style-name="ce7" office:value-type="float" office:value="0.059556764468292" calcext:value-type="float">
            <text:p>5.9556764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7];&quot;) = {&quot;;TEXT([.D77];&quot;0.0000000E+00&quot;);&quot;,&quot;;TEXT([.E77];&quot;0.0000000E+00&quot;);&quot;,&quot;;TEXT([.F77];&quot;0.0000000E+00&quot;);&quot;,&quot;;&quot;lc};&quot;)" office:value-type="string" office:string-value="Point(173) = {3.4549150E-01,5.9556764E-02,z0,lc};" calcext:value-type="string">
            <text:p>Point(173) = {3.4549150E-01,5.9556764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4" calcext:value-type="float">
            <text:p>174</text:p>
          </table:table-cell>
          <table:table-cell table:style-name="ce7" office:value-type="float" office:value="0.333096570383115" calcext:value-type="float">
            <text:p>3.3309657E-01</text:p>
          </table:table-cell>
          <table:table-cell table:style-name="ce7" office:value-type="float" office:value="0.0597629255385877" calcext:value-type="float">
            <text:p>5.976292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8];&quot;) = {&quot;;TEXT([.D78];&quot;0.0000000E+00&quot;);&quot;,&quot;;TEXT([.E78];&quot;0.0000000E+00&quot;);&quot;,&quot;;TEXT([.F78];&quot;0.0000000E+00&quot;);&quot;,&quot;;&quot;lc};&quot;)" office:value-type="string" office:string-value="Point(174) = {3.3309657E-01,5.9762926E-02,z0,lc};" calcext:value-type="string">
            <text:p>Point(174) = {3.3309657E-01,5.976292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5" calcext:value-type="float">
            <text:p>175</text:p>
          </table:table-cell>
          <table:table-cell table:style-name="ce7" office:value-type="float" office:value="0.32081602522735" calcext:value-type="float">
            <text:p>3.2081603E-01</text:p>
          </table:table-cell>
          <table:table-cell table:style-name="ce7" office:value-type="float" office:value="0.0599072631508117" calcext:value-type="float">
            <text:p>5.990726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79];&quot;) = {&quot;;TEXT([.D79];&quot;0.0000000E+00&quot;);&quot;,&quot;;TEXT([.E79];&quot;0.0000000E+00&quot;);&quot;,&quot;;TEXT([.F79];&quot;0.0000000E+00&quot;);&quot;,&quot;;&quot;lc};&quot;)" office:value-type="string" office:string-value="Point(175) = {3.2081603E-01,5.9907263E-02,z0,lc};" calcext:value-type="string">
            <text:p>Point(175) = {3.2081603E-01,5.990726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6" calcext:value-type="float">
            <text:p>176</text:p>
          </table:table-cell>
          <table:table-cell table:style-name="ce7" office:value-type="float" office:value="0.308658283817455" calcext:value-type="float">
            <text:p>3.0865828E-01</text:p>
          </table:table-cell>
          <table:table-cell table:style-name="ce7" office:value-type="float" office:value="0.059988433481268" calcext:value-type="float">
            <text:p>5.998843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0];&quot;) = {&quot;;TEXT([.D80];&quot;0.0000000E+00&quot;);&quot;,&quot;;TEXT([.E80];&quot;0.0000000E+00&quot;);&quot;,&quot;;TEXT([.F80];&quot;0.0000000E+00&quot;);&quot;,&quot;;&quot;lc};&quot;)" office:value-type="string" office:string-value="Point(176) = {3.0865828E-01,5.9988433E-02,z0,lc};" calcext:value-type="string">
            <text:p>Point(176) = {3.0865828E-01,5.998843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7" calcext:value-type="float">
            <text:p>177</text:p>
          </table:table-cell>
          <table:table-cell table:style-name="ce7" office:value-type="float" office:value="0.2966316784621" calcext:value-type="float">
            <text:p>2.9663168E-01</text:p>
          </table:table-cell>
          <table:table-cell table:style-name="ce7" office:value-type="float" office:value="0.060005198345846" calcext:value-type="float">
            <text:p>6.000519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1];&quot;) = {&quot;;TEXT([.D81];&quot;0.0000000E+00&quot;);&quot;,&quot;;TEXT([.E81];&quot;0.0000000E+00&quot;);&quot;,&quot;;TEXT([.F81];&quot;0.0000000E+00&quot;);&quot;,&quot;;&quot;lc};&quot;)" office:value-type="string" office:string-value="Point(177) = {2.9663168E-01,6.0005198E-02,z0,lc};" calcext:value-type="string">
            <text:p>Point(177) = {2.9663168E-01,6.000519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8" calcext:value-type="float">
            <text:p>178</text:p>
          </table:table-cell>
          <table:table-cell table:style-name="ce7" office:value-type="float" office:value="0.284744451595852" calcext:value-type="float">
            <text:p>2.8474445E-01</text:p>
          </table:table-cell>
          <table:table-cell table:style-name="ce7" office:value-type="float" office:value="0.0599564319153178" calcext:value-type="float">
            <text:p>5.995643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2];&quot;) = {&quot;;TEXT([.D82];&quot;0.0000000E+00&quot;);&quot;,&quot;;TEXT([.E82];&quot;0.0000000E+00&quot;);&quot;,&quot;;TEXT([.F82];&quot;0.0000000E+00&quot;);&quot;,&quot;;&quot;lc};&quot;)" office:value-type="string" office:string-value="Point(178) = {2.8474445E-01,5.9956432E-02,z0,lc};" calcext:value-type="string">
            <text:p>Point(178) = {2.8474445E-01,5.995643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79" calcext:value-type="float">
            <text:p>179</text:p>
          </table:table-cell>
          <table:table-cell table:style-name="ce7" office:value-type="float" office:value="0.273004750130227" calcext:value-type="float">
            <text:p>2.7300475E-01</text:p>
          </table:table-cell>
          <table:table-cell table:style-name="ce7" office:value-type="float" office:value="0.0598411269897428" calcext:value-type="float">
            <text:p>5.984112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3];&quot;) = {&quot;;TEXT([.D83];&quot;0.0000000E+00&quot;);&quot;,&quot;;TEXT([.E83];&quot;0.0000000E+00&quot;);&quot;,&quot;;TEXT([.F83];&quot;0.0000000E+00&quot;);&quot;,&quot;;&quot;lc};&quot;)" office:value-type="string" office:string-value="Point(179) = {2.7300475E-01,5.9841127E-02,z0,lc};" calcext:value-type="string">
            <text:p>Point(179) = {2.7300475E-01,5.984112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0.261420619870196" calcext:value-type="float">
            <text:p>2.6142062E-01</text:p>
          </table:table-cell>
          <table:table-cell table:style-name="ce7" office:value-type="float" office:value="0.0596584007615625" calcext:value-type="float">
            <text:p>5.9658401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4];&quot;) = {&quot;;TEXT([.D84];&quot;0.0000000E+00&quot;);&quot;,&quot;;TEXT([.E84];&quot;0.0000000E+00&quot;);&quot;,&quot;;TEXT([.F84];&quot;0.0000000E+00&quot;);&quot;,&quot;;&quot;lc};&quot;)" office:value-type="string" office:string-value="Point(180) = {2.6142062E-01,5.9658401E-02,z0,lc};" calcext:value-type="string">
            <text:p>Point(180) = {2.6142062E-01,5.965840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1" calcext:value-type="float">
            <text:p>181</text:p>
          </table:table-cell>
          <table:table-cell table:style-name="ce7" office:value-type="float" office:value="0.25" calcext:value-type="float">
            <text:p>2.5000000E-01</text:p>
          </table:table-cell>
          <table:table-cell table:style-name="ce7" office:value-type="float" office:value="0.0594075" calcext:value-type="float">
            <text:p>5.940750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5];&quot;) = {&quot;;TEXT([.D85];&quot;0.0000000E+00&quot;);&quot;,&quot;;TEXT([.E85];&quot;0.0000000E+00&quot;);&quot;,&quot;;TEXT([.F85];&quot;0.0000000E+00&quot;);&quot;,&quot;;&quot;lc};&quot;)" office:value-type="string" office:string-value="Point(181) = {2.5000000E-01,5.9407500E-02,z0,lc};" calcext:value-type="string">
            <text:p>Point(181) = {2.5000000E-01,5.940750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2" calcext:value-type="float">
            <text:p>182</text:p>
          </table:table-cell>
          <table:table-cell table:style-name="ce7" office:value-type="float" office:value="0.238750717642026" calcext:value-type="float">
            <text:p>2.3875072E-01</text:p>
          </table:table-cell>
          <table:table-cell table:style-name="ce7" office:value-type="float" office:value="0.0590878055931527" calcext:value-type="float">
            <text:p>5.908780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6];&quot;) = {&quot;;TEXT([.D86];&quot;0.0000000E+00&quot;);&quot;,&quot;;TEXT([.E86];&quot;0.0000000E+00&quot;);&quot;,&quot;;TEXT([.F86];&quot;0.0000000E+00&quot;);&quot;,&quot;;&quot;lc};&quot;)" office:value-type="string" office:string-value="Point(182) = {2.3875072E-01,5.9087806E-02,z0,lc};" calcext:value-type="string">
            <text:p>Point(182) = {2.3875072E-01,5.908780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0.227680482492486" calcext:value-type="float">
            <text:p>2.2768048E-01</text:p>
          </table:table-cell>
          <table:table-cell table:style-name="ce7" office:value-type="float" office:value="0.058698836388671" calcext:value-type="float">
            <text:p>5.869883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7];&quot;) = {&quot;;TEXT([.D87];&quot;0.0000000E+00&quot;);&quot;,&quot;;TEXT([.E87];&quot;0.0000000E+00&quot;);&quot;,&quot;;TEXT([.F87];&quot;0.0000000E+00&quot;);&quot;,&quot;;&quot;lc};&quot;)" office:value-type="string" office:string-value="Point(183) = {2.2768048E-01,5.8698836E-02,z0,lc};" calcext:value-type="string">
            <text:p>Point(183) = {2.2768048E-01,5.869883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4" calcext:value-type="float">
            <text:p>184</text:p>
          </table:table-cell>
          <table:table-cell table:style-name="ce7" office:value-type="float" office:value="0.216796881537584" calcext:value-type="float">
            <text:p>2.1679688E-01</text:p>
          </table:table-cell>
          <table:table-cell table:style-name="ce7" office:value-type="float" office:value="0.0582402522790943" calcext:value-type="float">
            <text:p>5.824025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8];&quot;) = {&quot;;TEXT([.D88];&quot;0.0000000E+00&quot;);&quot;,&quot;;TEXT([.E88];&quot;0.0000000E+00&quot;);&quot;,&quot;;TEXT([.F88];&quot;0.0000000E+00&quot;);&quot;,&quot;;&quot;lc};&quot;)" office:value-type="string" office:string-value="Point(184) = {2.1679688E-01,5.8240252E-02,z0,lc};" calcext:value-type="string">
            <text:p>Point(184) = {2.1679688E-01,5.824025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0.206107373853763" calcext:value-type="float">
            <text:p>2.0610737E-01</text:p>
          </table:table-cell>
          <table:table-cell table:style-name="ce7" office:value-type="float" office:value="0.0577118564837423" calcext:value-type="float">
            <text:p>5.771185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89];&quot;) = {&quot;;TEXT([.D89];&quot;0.0000000E+00&quot;);&quot;,&quot;;TEXT([.E89];&quot;0.0000000E+00&quot;);&quot;,&quot;;TEXT([.F89];&quot;0.0000000E+00&quot;);&quot;,&quot;;&quot;lc};&quot;)" office:value-type="string" office:string-value="Point(185) = {2.0610737E-01,5.7711856E-02,z0,lc};" calcext:value-type="string">
            <text:p>Point(185) = {2.0610737E-01,5.771185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6" calcext:value-type="float">
            <text:p>186</text:p>
          </table:table-cell>
          <table:table-cell table:style-name="ce7" office:value-type="float" office:value="0.19561928549564" calcext:value-type="float">
            <text:p>1.9561929E-01</text:p>
          </table:table-cell>
          <table:table-cell table:style-name="ce7" office:value-type="float" office:value="0.0571135969854671" calcext:value-type="float">
            <text:p>5.711359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0];&quot;) = {&quot;;TEXT([.D90];&quot;0.0000000E+00&quot;);&quot;,&quot;;TEXT([.E90];&quot;0.0000000E+00&quot;);&quot;,&quot;;TEXT([.F90];&quot;0.0000000E+00&quot;);&quot;,&quot;;&quot;lc};&quot;)" office:value-type="string" office:string-value="Point(186) = {1.9561929E-01,5.7113597E-02,z0,lc};" calcext:value-type="string">
            <text:p>Point(186) = {1.9561929E-01,5.711359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7" calcext:value-type="float">
            <text:p>187</text:p>
          </table:table-cell>
          <table:table-cell table:style-name="ce7" office:value-type="float" office:value="0.185339804475081" calcext:value-type="float">
            <text:p>1.8533980E-01</text:p>
          </table:table-cell>
          <table:table-cell table:style-name="ce7" office:value-type="float" office:value="0.0564455670875139" calcext:value-type="float">
            <text:p>5.644556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1];&quot;) = {&quot;;TEXT([.D91];&quot;0.0000000E+00&quot;);&quot;,&quot;;TEXT([.E91];&quot;0.0000000E+00&quot;);&quot;,&quot;;TEXT([.F91];&quot;0.0000000E+00&quot;);&quot;,&quot;;&quot;lc};&quot;)" office:value-type="string" office:string-value="Point(187) = {1.8533980E-01,5.6445567E-02,z0,lc};" calcext:value-type="string">
            <text:p>Point(187) = {1.8533980E-01,5.644556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0.175275975834908" calcext:value-type="float">
            <text:p>1.7527598E-01</text:p>
          </table:table-cell>
          <table:table-cell table:style-name="ce7" office:value-type="float" office:value="0.0557080050631394" calcext:value-type="float">
            <text:p>5.570800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2];&quot;) = {&quot;;TEXT([.D92];&quot;0.0000000E+00&quot;);&quot;,&quot;;TEXT([.E92];&quot;0.0000000E+00&quot;);&quot;,&quot;;TEXT([.F92];&quot;0.0000000E+00&quot;);&quot;,&quot;;&quot;lc};&quot;)" office:value-type="string" office:string-value="Point(188) = {1.7527598E-01,5.5708005E-02,z0,lc};" calcext:value-type="string">
            <text:p>Point(188) = {1.7527598E-01,5.570800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89" calcext:value-type="float">
            <text:p>189</text:p>
          </table:table-cell>
          <table:table-cell table:style-name="ce7" office:value-type="float" office:value="0.165434696820571" calcext:value-type="float">
            <text:p>1.6543470E-01</text:p>
          </table:table-cell>
          <table:table-cell table:style-name="ce7" office:value-type="float" office:value="0.0549012928784368" calcext:value-type="float">
            <text:p>5.490129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3];&quot;) = {&quot;;TEXT([.D93];&quot;0.0000000E+00&quot;);&quot;,&quot;;TEXT([.E93];&quot;0.0000000E+00&quot;);&quot;,&quot;;TEXT([.F93];&quot;0.0000000E+00&quot;);&quot;,&quot;;&quot;lc};&quot;)" office:value-type="string" office:string-value="Point(189) = {1.6543470E-01,5.4901293E-02,z0,lc};" calcext:value-type="string">
            <text:p>Point(189) = {1.6543470E-01,5.490129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7" office:value-type="float" office:value="0.155822712153123" calcext:value-type="float">
            <text:p>1.5582271E-01</text:p>
          </table:table-cell>
          <table:table-cell table:style-name="ce7" office:value-type="float" office:value="0.0540259539769367" calcext:value-type="float">
            <text:p>5.4025954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4];&quot;) = {&quot;;TEXT([.D94];&quot;0.0000000E+00&quot;);&quot;,&quot;;TEXT([.E94];&quot;0.0000000E+00&quot;);&quot;,&quot;;TEXT([.F94];&quot;0.0000000E+00&quot;);&quot;,&quot;;&quot;lc};&quot;)" office:value-type="string" office:string-value="Point(190) = {1.5582271E-01,5.4025954E-02,z0,lc};" calcext:value-type="string">
            <text:p>Point(190) = {1.5582271E-01,5.4025954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1" calcext:value-type="float">
            <text:p>191</text:p>
          </table:table-cell>
          <table:table-cell table:style-name="ce7" office:value-type="float" office:value="0.146446609406726" calcext:value-type="float">
            <text:p>1.4644661E-01</text:p>
          </table:table-cell>
          <table:table-cell table:style-name="ce7" office:value-type="float" office:value="0.0530826501229085" calcext:value-type="float">
            <text:p>5.308265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5];&quot;) = {&quot;;TEXT([.D95];&quot;0.0000000E+00&quot;);&quot;,&quot;;TEXT([.E95];&quot;0.0000000E+00&quot;);&quot;,&quot;;TEXT([.F95];&quot;0.0000000E+00&quot;);&quot;,&quot;;&quot;lc};&quot;)" office:value-type="string" office:string-value="Point(191) = {1.4644661E-01,5.3082650E-02,z0,lc};" calcext:value-type="string">
            <text:p>Point(191) = {1.4644661E-01,5.308265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2" calcext:value-type="float">
            <text:p>192</text:p>
          </table:table-cell>
          <table:table-cell table:style-name="ce7" office:value-type="float" office:value="0.137312814493856" calcext:value-type="float">
            <text:p>1.3731281E-01</text:p>
          </table:table-cell>
          <table:table-cell table:style-name="ce7" office:value-type="float" office:value="0.0520721773088123" calcext:value-type="float">
            <text:p>5.207217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6];&quot;) = {&quot;;TEXT([.D96];&quot;0.0000000E+00&quot;);&quot;,&quot;;TEXT([.E96];&quot;0.0000000E+00&quot;);&quot;,&quot;;TEXT([.F96];&quot;0.0000000E+00&quot;);&quot;,&quot;;&quot;lc};&quot;)" office:value-type="string" office:string-value="Point(192) = {1.3731281E-01,5.2072177E-02,z0,lc};" calcext:value-type="string">
            <text:p>Point(192) = {1.3731281E-01,5.207217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3" calcext:value-type="float">
            <text:p>193</text:p>
          </table:table-cell>
          <table:table-cell table:style-name="ce7" office:value-type="float" office:value="0.128427587261303" calcext:value-type="float">
            <text:p>1.2842759E-01</text:p>
          </table:table-cell>
          <table:table-cell table:style-name="ce7" office:value-type="float" office:value="0.0509954607409406" calcext:value-type="float">
            <text:p>5.0995461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7];&quot;) = {&quot;;TEXT([.D97];&quot;0.0000000E+00&quot;);&quot;,&quot;;TEXT([.E97];&quot;0.0000000E+00&quot;);&quot;,&quot;;TEXT([.F97];&quot;0.0000000E+00&quot;);&quot;,&quot;;&quot;lc};&quot;)" office:value-type="string" office:string-value="Point(193) = {1.2842759E-01,5.0995461E-02,z0,lc};" calcext:value-type="string">
            <text:p>Point(193) = {1.2842759E-01,5.099546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4" calcext:value-type="float">
            <text:p>194</text:p>
          </table:table-cell>
          <table:table-cell table:style-name="ce7" office:value-type="float" office:value="0.119797017199985" calcext:value-type="float">
            <text:p>1.1979702E-01</text:p>
          </table:table-cell>
          <table:table-cell table:style-name="ce7" office:value-type="float" office:value="0.0498535489258783" calcext:value-type="float">
            <text:p>4.9853549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8];&quot;) = {&quot;;TEXT([.D98];&quot;0.0000000E+00&quot;);&quot;,&quot;;TEXT([.E98];&quot;0.0000000E+00&quot;);&quot;,&quot;;TEXT([.F98];&quot;0.0000000E+00&quot;);&quot;,&quot;;&quot;lc};&quot;)" office:value-type="string" office:string-value="Point(194) = {1.1979702E-01,4.9853549E-02,z0,lc};" calcext:value-type="string">
            <text:p>Point(194) = {1.1979702E-01,4.985354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5" calcext:value-type="float">
            <text:p>195</text:p>
          </table:table-cell>
          <table:table-cell table:style-name="ce7" office:value-type="float" office:value="0.111427019271515" calcext:value-type="float">
            <text:p>1.1142702E-01</text:p>
          </table:table-cell>
          <table:table-cell table:style-name="ce7" office:value-type="float" office:value="0.048647606888895" calcext:value-type="float">
            <text:p>4.864760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99];&quot;) = {&quot;;TEXT([.D99];&quot;0.0000000E+00&quot;);&quot;,&quot;;TEXT([.E99];&quot;0.0000000E+00&quot;);&quot;,&quot;;TEXT([.F99];&quot;0.0000000E+00&quot;);&quot;,&quot;;&quot;lc};&quot;)" office:value-type="string" office:string-value="Point(195) = {1.1142702E-01,4.8647607E-02,z0,lc};" calcext:value-type="string">
            <text:p>Point(195) = {1.1142702E-01,4.864760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6" calcext:value-type="float">
            <text:p>196</text:p>
          </table:table-cell>
          <table:table-cell table:style-name="ce7" office:value-type="float" office:value="0.103323329854382" calcext:value-type="float">
            <text:p>1.0332333E-01</text:p>
          </table:table-cell>
          <table:table-cell table:style-name="ce7" office:value-type="float" office:value="0.0473789085636924" calcext:value-type="float">
            <text:p>4.7378909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0];&quot;) = {&quot;;TEXT([.D100];&quot;0.0000000E+00&quot;);&quot;,&quot;;TEXT([.E100];&quot;0.0000000E+00&quot;);&quot;,&quot;;TEXT([.F100];&quot;0.0000000E+00&quot;);&quot;,&quot;;&quot;lc};&quot;)" office:value-type="string" office:string-value="Point(196) = {1.0332333E-01,4.7378909E-02,z0,lc};" calcext:value-type="string">
            <text:p>Point(196) = {1.0332333E-01,4.737890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7" calcext:value-type="float">
            <text:p>197</text:p>
          </table:table-cell>
          <table:table-cell table:style-name="ce7" office:value-type="float" office:value="0.0954915028125263" calcext:value-type="float">
            <text:p>9.5491503E-02</text:p>
          </table:table-cell>
          <table:table-cell table:style-name="ce7" office:value-type="float" office:value="0.0460488284009686" calcext:value-type="float">
            <text:p>4.604882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1];&quot;) = {&quot;;TEXT([.D101];&quot;0.0000000E+00&quot;);&quot;,&quot;;TEXT([.E101];&quot;0.0000000E+00&quot;);&quot;,&quot;;TEXT([.F101];&quot;0.0000000E+00&quot;);&quot;,&quot;;&quot;lc};&quot;)" office:value-type="string" office:string-value="Point(197) = {9.5491503E-02,4.6048828E-02,z0,lc};" calcext:value-type="string">
            <text:p>Point(197) = {9.5491503E-02,4.604882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8" calcext:value-type="float">
            <text:p>198</text:p>
          </table:table-cell>
          <table:table-cell table:style-name="ce7" office:value-type="float" office:value="0.0879369056889922" calcext:value-type="float">
            <text:p>8.7936906E-02</text:p>
          </table:table-cell>
          <table:table-cell table:style-name="ce7" office:value-type="float" office:value="0.0446588322509522" calcext:value-type="float">
            <text:p>4.465883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2];&quot;) = {&quot;;TEXT([.D102];&quot;0.0000000E+00&quot;);&quot;,&quot;;TEXT([.E102];&quot;0.0000000E+00&quot;);&quot;,&quot;;TEXT([.F102];&quot;0.0000000E+00&quot;);&quot;,&quot;;&quot;lc};&quot;)" office:value-type="string" office:string-value="Point(198) = {8.7936906E-02,4.4658832E-02,z0,lc};" calcext:value-type="string">
            <text:p>Point(198) = {8.7936906E-02,4.465883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199" calcext:value-type="float">
            <text:p>199</text:p>
          </table:table-cell>
          <table:table-cell table:style-name="ce7" office:value-type="float" office:value="0.080664716027288" calcext:value-type="float">
            <text:p>8.0664716E-02</text:p>
          </table:table-cell>
          <table:table-cell table:style-name="ce7" office:value-type="float" office:value="0.0432104675823222" calcext:value-type="float">
            <text:p>4.321046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3];&quot;) = {&quot;;TEXT([.D103];&quot;0.0000000E+00&quot;);&quot;,&quot;;TEXT([.E103];&quot;0.0000000E+00&quot;);&quot;,&quot;;TEXT([.F103];&quot;0.0000000E+00&quot;);&quot;,&quot;;&quot;lc};&quot;)" office:value-type="string" office:string-value="Point(199) = {8.0664716E-02,4.3210468E-02,z0,lc};" calcext:value-type="string">
            <text:p>Point(199) = {8.0664716E-02,4.321046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0.0736799178229539" calcext:value-type="float">
            <text:p>7.3679918E-02</text:p>
          </table:table-cell>
          <table:table-cell table:style-name="ce7" office:value-type="float" office:value="0.0417053531066882" calcext:value-type="float">
            <text:p>4.170535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4];&quot;) = {&quot;;TEXT([.D104];&quot;0.0000000E+00&quot;);&quot;,&quot;;TEXT([.E104];&quot;0.0000000E+00&quot;);&quot;,&quot;;TEXT([.F104];&quot;0.0000000E+00&quot;);&quot;,&quot;;&quot;lc};&quot;)" office:value-type="string" office:string-value="Point(200) = {7.3679918E-02,4.1705353E-02,z0,lc};" calcext:value-type="string">
            <text:p>Point(200) = {7.3679918E-02,4.170535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1" calcext:value-type="float">
            <text:p>201</text:p>
          </table:table-cell>
          <table:table-cell table:style-name="ce7" office:value-type="float" office:value="0.0669872981077807" calcext:value-type="float">
            <text:p>6.6987298E-02</text:p>
          </table:table-cell>
          <table:table-cell table:style-name="ce7" office:value-type="float" office:value="0.0401451678839889" calcext:value-type="float">
            <text:p>4.014516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5];&quot;) = {&quot;;TEXT([.D105];&quot;0.0000000E+00&quot;);&quot;,&quot;;TEXT([.E105];&quot;0.0000000E+00&quot;);&quot;,&quot;;TEXT([.F105];&quot;0.0000000E+00&quot;);&quot;,&quot;;&quot;lc};&quot;)" office:value-type="string" office:string-value="Point(201) = {6.6987298E-02,4.0145168E-02,z0,lc};" calcext:value-type="string">
            <text:p>Point(201) = {6.6987298E-02,4.014516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0.0605914436690173" calcext:value-type="float">
            <text:p>6.0591444E-02</text:p>
          </table:table-cell>
          <table:table-cell table:style-name="ce7" office:value-type="float" office:value="0.0385316399897089" calcext:value-type="float">
            <text:p>3.853164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6];&quot;) = {&quot;;TEXT([.D106];&quot;0.0000000E+00&quot;);&quot;,&quot;;TEXT([.E106];&quot;0.0000000E+00&quot;);&quot;,&quot;;TEXT([.F106];&quot;0.0000000E+00&quot;);&quot;,&quot;;&quot;lc};&quot;)" office:value-type="string" office:string-value="Point(202) = {6.0591444E-02,3.8531640E-02,z0,lc};" calcext:value-type="string">
            <text:p>Point(202) = {6.0591444E-02,3.853164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3" calcext:value-type="float">
            <text:p>203</text:p>
          </table:table-cell>
          <table:table-cell table:style-name="ce7" office:value-type="float" office:value="0.0544967379058161" calcext:value-type="float">
            <text:p>5.4496738E-02</text:p>
          </table:table-cell>
          <table:table-cell table:style-name="ce7" office:value-type="float" office:value="0.0368665348296582" calcext:value-type="float">
            <text:p>3.686653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7];&quot;) = {&quot;;TEXT([.D107];&quot;0.0000000E+00&quot;);&quot;,&quot;;TEXT([.E107];&quot;0.0000000E+00&quot;);&quot;,&quot;;TEXT([.F107];&quot;0.0000000E+00&quot;);&quot;,&quot;;&quot;lc};&quot;)" office:value-type="string" office:string-value="Point(203) = {5.4496738E-02,3.6866535E-02,z0,lc};" calcext:value-type="string">
            <text:p>Point(203) = {5.4496738E-02,3.686653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4" calcext:value-type="float">
            <text:p>204</text:p>
          </table:table-cell>
          <table:table-cell table:style-name="ce7" office:value-type="float" office:value="0.0487073578250697" calcext:value-type="float">
            <text:p>4.8707358E-02</text:p>
          </table:table-cell>
          <table:table-cell table:style-name="ce7" office:value-type="float" office:value="0.0351516431921456" calcext:value-type="float">
            <text:p>3.515164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8];&quot;) = {&quot;;TEXT([.D108];&quot;0.0000000E+00&quot;);&quot;,&quot;;TEXT([.E108];&quot;0.0000000E+00&quot;);&quot;,&quot;;TEXT([.F108];&quot;0.0000000E+00&quot;);&quot;,&quot;;&quot;lc};&quot;)" office:value-type="string" office:string-value="Point(204) = {4.8707358E-02,3.5151643E-02,z0,lc};" calcext:value-type="string">
            <text:p>Point(204) = {4.8707358E-02,3.515164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5" calcext:value-type="float">
            <text:p>205</text:p>
          </table:table-cell>
          <table:table-cell table:style-name="ce7" office:value-type="float" office:value="0.0432272711786996" calcext:value-type="float">
            <text:p>4.3227271E-02</text:p>
          </table:table-cell>
          <table:table-cell table:style-name="ce7" office:value-type="float" office:value="0.0333887691306702" calcext:value-type="float">
            <text:p>3.3388769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09];&quot;) = {&quot;;TEXT([.D109];&quot;0.0000000E+00&quot;);&quot;,&quot;;TEXT([.E109];&quot;0.0000000E+00&quot;);&quot;,&quot;;TEXT([.F109];&quot;0.0000000E+00&quot;);&quot;,&quot;;&quot;lc};&quot;)" office:value-type="string" office:string-value="Point(205) = {4.3227271E-02,3.3388769E-02,z0,lc};" calcext:value-type="string">
            <text:p>Point(205) = {4.3227271E-02,3.338876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6" calcext:value-type="float">
            <text:p>206</text:p>
          </table:table-cell>
          <table:table-cell table:style-name="ce7" office:value-type="float" office:value="0.0380602337443566" calcext:value-type="float">
            <text:p>3.8060234E-02</text:p>
          </table:table-cell>
          <table:table-cell table:style-name="ce7" office:value-type="float" office:value="0.0315797177727092" calcext:value-type="float">
            <text:p>3.157971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0];&quot;) = {&quot;;TEXT([.D110];&quot;0.0000000E+00&quot;);&quot;,&quot;;TEXT([.E110];&quot;0.0000000E+00&quot;);&quot;,&quot;;TEXT([.F110];&quot;0.0000000E+00&quot;);&quot;,&quot;;&quot;lc};&quot;)" office:value-type="string" office:string-value="Point(206) = {3.8060234E-02,3.1579718E-02,z0,lc};" calcext:value-type="string">
            <text:p>Point(206) = {3.8060234E-02,3.157971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7" calcext:value-type="float">
            <text:p>207</text:p>
          </table:table-cell>
          <table:table-cell table:style-name="ce7" office:value-type="float" office:value="0.0332097867513991" calcext:value-type="float">
            <text:p>3.3209787E-02</text:p>
          </table:table-cell>
          <table:table-cell table:style-name="ce7" office:value-type="float" office:value="0.0297262831517664" calcext:value-type="float">
            <text:p>2.972628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1];&quot;) = {&quot;;TEXT([.D111];&quot;0.0000000E+00&quot;);&quot;,&quot;;TEXT([.E111];&quot;0.0000000E+00&quot;);&quot;,&quot;;TEXT([.F111];&quot;0.0000000E+00&quot;);&quot;,&quot;;&quot;lc};&quot;)" office:value-type="string" office:string-value="Point(207) = {3.3209787E-02,2.9726283E-02,z0,lc};" calcext:value-type="string">
            <text:p>Point(207) = {3.3209787E-02,2.972628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8" calcext:value-type="float">
            <text:p>208</text:p>
          </table:table-cell>
          <table:table-cell table:style-name="ce7" office:value-type="float" office:value="0.0286792544539108" calcext:value-type="float">
            <text:p>2.8679254E-02</text:p>
          </table:table-cell>
          <table:table-cell table:style-name="ce7" office:value-type="float" office:value="0.0278302361605527" calcext:value-type="float">
            <text:p>2.7830236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2];&quot;) = {&quot;;TEXT([.D112];&quot;0.0000000E+00&quot;);&quot;,&quot;;TEXT([.E112];&quot;0.0000000E+00&quot;);&quot;,&quot;;TEXT([.F112];&quot;0.0000000E+00&quot;);&quot;,&quot;;&quot;lc};&quot;)" office:value-type="string" office:string-value="Point(208) = {2.8679254E-02,2.7830236E-02,z0,lc};" calcext:value-type="string">
            <text:p>Point(208) = {2.8679254E-02,2.783023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7" office:value-type="float" office:value="0.0244717418524232" calcext:value-type="float">
            <text:p>2.4471742E-02</text:p>
          </table:table-cell>
          <table:table-cell table:style-name="ce7" office:value-type="float" office:value="0.0258933127229656" calcext:value-type="float">
            <text:p>2.5893313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3];&quot;) = {&quot;;TEXT([.D113];&quot;0.0000000E+00&quot;);&quot;,&quot;;TEXT([.E113];&quot;0.0000000E+00&quot;);&quot;,&quot;;TEXT([.F113];&quot;0.0000000E+00&quot;);&quot;,&quot;;&quot;lc};&quot;)" office:value-type="string" office:string-value="Point(209) = {2.4471742E-02,2.5893313E-02,z0,lc};" calcext:value-type="string">
            <text:p>Point(209) = {2.4471742E-02,2.589331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0" calcext:value-type="float">
            <text:p>210</text:p>
          </table:table-cell>
          <table:table-cell table:style-name="ce7" office:value-type="float" office:value="0.0205901325659035" calcext:value-type="float">
            <text:p>2.0590133E-02</text:p>
          </table:table-cell>
          <table:table-cell table:style-name="ce7" office:value-type="float" office:value="0.0239172022814422" calcext:value-type="float">
            <text:p>2.391720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4];&quot;) = {&quot;;TEXT([.D114];&quot;0.0000000E+00&quot;);&quot;,&quot;;TEXT([.E114];&quot;0.0000000E+00&quot;);&quot;,&quot;;TEXT([.F114];&quot;0.0000000E+00&quot;);&quot;,&quot;;&quot;lc};&quot;)" office:value-type="string" office:string-value="Point(210) = {2.0590133E-02,2.3917202E-02,z0,lc};" calcext:value-type="string">
            <text:p>Point(210) = {2.0590133E-02,2.391720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1" calcext:value-type="float">
            <text:p>211</text:p>
          </table:table-cell>
          <table:table-cell table:style-name="ce7" office:value-type="float" office:value="0.0170370868554658" calcext:value-type="float">
            <text:p>1.7037087E-02</text:p>
          </table:table-cell>
          <table:table-cell table:style-name="ce7" office:value-type="float" office:value="0.0219035366942596" calcext:value-type="float">
            <text:p>2.190353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5];&quot;) = {&quot;;TEXT([.D115];&quot;0.0000000E+00&quot;);&quot;,&quot;;TEXT([.E115];&quot;0.0000000E+00&quot;);&quot;,&quot;;TEXT([.F115];&quot;0.0000000E+00&quot;);&quot;,&quot;;&quot;lc};&quot;)" office:value-type="string" office:string-value="Point(211) = {1.7037087E-02,2.1903537E-02,z0,lc};" calcext:value-type="string">
            <text:p>Point(211) = {1.7037087E-02,2.190353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2" calcext:value-type="float">
            <text:p>212</text:p>
          </table:table-cell>
          <table:table-cell table:style-name="ce7" office:value-type="float" office:value="0.0138150398011617" calcext:value-type="float">
            <text:p>1.3815040E-02</text:p>
          </table:table-cell>
          <table:table-cell table:style-name="ce7" office:value-type="float" office:value="0.0198538796344812" calcext:value-type="float">
            <text:p>1.985388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6];&quot;) = {&quot;;TEXT([.D116];&quot;0.0000000E+00&quot;);&quot;,&quot;;TEXT([.E116];&quot;0.0000000E+00&quot;);&quot;,&quot;;TEXT([.F116];&quot;0.0000000E+00&quot;);&quot;,&quot;;&quot;lc};&quot;)" office:value-type="string" office:string-value="Point(212) = {1.3815040E-02,1.9853880E-02,z0,lc};" calcext:value-type="string">
            <text:p>Point(212) = {1.3815040E-02,1.985388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3" calcext:value-type="float">
            <text:p>213</text:p>
          </table:table-cell>
          <table:table-cell table:style-name="ce7" office:value-type="float" office:value="0.0109261996330972" calcext:value-type="float">
            <text:p>1.0926200E-02</text:p>
          </table:table-cell>
          <table:table-cell table:style-name="ce7" office:value-type="float" office:value="0.0177697165785102" calcext:value-type="float">
            <text:p>1.776971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7];&quot;) = {&quot;;TEXT([.D117];&quot;0.0000000E+00&quot;);&quot;,&quot;;TEXT([.E117];&quot;0.0000000E+00&quot;);&quot;,&quot;;TEXT([.F117];&quot;0.0000000E+00&quot;);&quot;,&quot;;&quot;lc};&quot;)" office:value-type="string" office:string-value="Point(213) = {1.0926200E-02,1.7769717E-02,z0,lc};" calcext:value-type="string">
            <text:p>Point(213) = {1.0926200E-02,1.776971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4" calcext:value-type="float">
            <text:p>214</text:p>
          </table:table-cell>
          <table:table-cell table:style-name="ce7" office:value-type="float" office:value="0.00837254621802269" calcext:value-type="float">
            <text:p>8.3725462E-03</text:p>
          </table:table-cell>
          <table:table-cell table:style-name="ce7" office:value-type="float" office:value="0.0156524454676532" calcext:value-type="float">
            <text:p>1.565244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8];&quot;) = {&quot;;TEXT([.D118];&quot;0.0000000E+00&quot;);&quot;,&quot;;TEXT([.E118];&quot;0.0000000E+00&quot;);&quot;,&quot;;TEXT([.F118];&quot;0.0000000E+00&quot;);&quot;,&quot;;&quot;lc};&quot;)" office:value-type="string" office:string-value="Point(214) = {8.3725462E-03,1.5652445E-02,z0,lc};" calcext:value-type="string">
            <text:p>Point(214) = {8.3725462E-03,1.565244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5" calcext:value-type="float">
            <text:p>215</text:p>
          </table:table-cell>
          <table:table-cell table:style-name="ce7" office:value-type="float" office:value="0.00615582970243112" calcext:value-type="float">
            <text:p>6.1558297E-03</text:p>
          </table:table-cell>
          <table:table-cell table:style-name="ce7" office:value-type="float" office:value="0.0135033681207455" calcext:value-type="float">
            <text:p>1.350336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19];&quot;) = {&quot;;TEXT([.D119];&quot;0.0000000E+00&quot;);&quot;,&quot;;TEXT([.E119];&quot;0.0000000E+00&quot;);&quot;,&quot;;TEXT([.F119];&quot;0.0000000E+00&quot;);&quot;,&quot;;&quot;lc};&quot;)" office:value-type="string" office:string-value="Point(215) = {6.1558297E-03,1.3503368E-02,z0,lc};" calcext:value-type="string">
            <text:p>Point(215) = {6.1558297E-03,1.350336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6" calcext:value-type="float">
            <text:p>216</text:p>
          </table:table-cell>
          <table:table-cell table:style-name="ce7" office:value-type="float" office:value="0.00427756931309481" calcext:value-type="float">
            <text:p>4.2775693E-03</text:p>
          </table:table-cell>
          <table:table-cell table:style-name="ce7" office:value-type="float" office:value="0.0113236824698117" calcext:value-type="float">
            <text:p>1.132368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0];&quot;) = {&quot;;TEXT([.D120];&quot;0.0000000E+00&quot;);&quot;,&quot;;TEXT([.E120];&quot;0.0000000E+00&quot;);&quot;,&quot;;TEXT([.F120];&quot;0.0000000E+00&quot;);&quot;,&quot;;&quot;lc};&quot;)" office:value-type="string" office:string-value="Point(216) = {4.2775693E-03,1.1323682E-02,z0,lc};" calcext:value-type="string">
            <text:p>Point(216) = {4.2775693E-03,1.132368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7" calcext:value-type="float">
            <text:p>217</text:p>
          </table:table-cell>
          <table:table-cell table:style-name="ce7" office:value-type="float" office:value="0.00273905231586336" calcext:value-type="float">
            <text:p>2.7390523E-03</text:p>
          </table:table-cell>
          <table:table-cell table:style-name="ce7" office:value-type="float" office:value="0.00911447568396653" calcext:value-type="float">
            <text:p>9.1144757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1];&quot;) = {&quot;;TEXT([.D121];&quot;0.0000000E+00&quot;);&quot;,&quot;;TEXT([.E121];&quot;0.0000000E+00&quot;);&quot;,&quot;;TEXT([.F121];&quot;0.0000000E+00&quot;);&quot;,&quot;;&quot;lc};&quot;)" office:value-type="string" office:string-value="Point(217) = {2.7390523E-03,9.1144757E-03,z0,lc};" calcext:value-type="string">
            <text:p>Point(217) = {2.7390523E-03,9.1144757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8" calcext:value-type="float">
            <text:p>218</text:p>
          </table:table-cell>
          <table:table-cell table:style-name="ce7" office:value-type="float" office:value="0.00154133313343602" calcext:value-type="float">
            <text:p>1.5413331E-03</text:p>
          </table:table-cell>
          <table:table-cell table:style-name="ce7" office:value-type="float" office:value="0.006876718239381" calcext:value-type="float">
            <text:p>6.8767182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2];&quot;) = {&quot;;TEXT([.D122];&quot;0.0000000E+00&quot;);&quot;,&quot;;TEXT([.E122];&quot;0.0000000E+00&quot;);&quot;,&quot;;TEXT([.F122];&quot;0.0000000E+00&quot;);&quot;,&quot;;&quot;lc};&quot;)" office:value-type="string" office:string-value="Point(218) = {1.5413331E-03,6.8767182E-03,z0,lc};" calcext:value-type="string">
            <text:p>Point(218) = {1.5413331E-03,6.876718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19" calcext:value-type="float">
            <text:p>219</text:p>
          </table:table-cell>
          <table:table-cell table:style-name="ce7" office:value-type="float" office:value="0.000685232622713083" calcext:value-type="float">
            <text:p>6.8523262E-04</text:p>
          </table:table-cell>
          <table:table-cell table:style-name="ce7" office:value-type="float" office:value="0.00461125898520841" calcext:value-type="float">
            <text:p>4.6112590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3];&quot;) = {&quot;;TEXT([.D123];&quot;0.0000000E+00&quot;);&quot;,&quot;;TEXT([.E123];&quot;0.0000000E+00&quot;);&quot;,&quot;;TEXT([.F123];&quot;0.0000000E+00&quot;);&quot;,&quot;;&quot;lc};&quot;)" office:value-type="string" office:string-value="Point(219) = {6.8523262E-04,4.6112590E-03,z0,lc};" calcext:value-type="string">
            <text:p>Point(219) = {6.8523262E-04,4.6112590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0" calcext:value-type="float">
            <text:p>220</text:p>
          </table:table-cell>
          <table:table-cell table:style-name="ce7" office:value-type="float" office:value="0.00017133751222137" calcext:value-type="float">
            <text:p>1.7133751E-04</text:p>
          </table:table-cell>
          <table:table-cell table:style-name="ce7" office:value-type="float" office:value="0.00231882124695704" calcext:value-type="float">
            <text:p>2.3188212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4];&quot;) = {&quot;;TEXT([.D124];&quot;0.0000000E+00&quot;);&quot;,&quot;;TEXT([.E124];&quot;0.0000000E+00&quot;);&quot;,&quot;;TEXT([.F124];&quot;0.0000000E+00&quot;);&quot;,&quot;;&quot;lc};&quot;)" office:value-type="string" office:string-value="Point(220) = {1.7133751E-04,2.3188212E-03,z0,lc};" calcext:value-type="string">
            <text:p>Point(220) = {1.7133751E-04,2.318821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1" calcext:value-type="float">
            <text:p>221</text:p>
          </table:table-cell>
          <table:table-cell table:number-columns-repeated="2" table:style-name="ce7" office:value-type="float" office:value="0" calcext:value-type="float">
            <text:p>0.0000000E+00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5];&quot;) = {&quot;;TEXT([.D125];&quot;0.0000000E+00&quot;);&quot;,&quot;;TEXT([.E125];&quot;0.0000000E+00&quot;);&quot;,&quot;;TEXT([.F125];&quot;0.0000000E+00&quot;);&quot;,&quot;;&quot;lc};&quot;)" office:value-type="string" office:string-value="Point(221) = {0.0000000E+00,0.0000000E+00,z0,lc};" calcext:value-type="string">
            <text:p>Point(221) = {0.0000000E+00,0.0000000E+00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2" calcext:value-type="float">
            <text:p>222</text:p>
          </table:table-cell>
          <table:table-cell table:style-name="ce7" office:value-type="float" office:value="0.00017133751222137" calcext:value-type="float">
            <text:p>1.7133751E-04</text:p>
          </table:table-cell>
          <table:table-cell table:style-name="ce7" office:value-type="float" office:value="-0.00231882124695704" calcext:value-type="float">
            <text:p>-2.3188212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6];&quot;) = {&quot;;TEXT([.D126];&quot;0.0000000E+00&quot;);&quot;,&quot;;TEXT([.E126];&quot;0.0000000E+00&quot;);&quot;,&quot;;TEXT([.F126];&quot;0.0000000E+00&quot;);&quot;,&quot;;&quot;lc};&quot;)" office:value-type="string" office:string-value="Point(222) = {1.7133751E-04,-2.3188212E-03,z0,lc};" calcext:value-type="string">
            <text:p>Point(222) = {1.7133751E-04,-2.318821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0.000685232622713083" calcext:value-type="float">
            <text:p>6.8523262E-04</text:p>
          </table:table-cell>
          <table:table-cell table:style-name="ce7" office:value-type="float" office:value="-0.00461125898520841" calcext:value-type="float">
            <text:p>-4.6112590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7];&quot;) = {&quot;;TEXT([.D127];&quot;0.0000000E+00&quot;);&quot;,&quot;;TEXT([.E127];&quot;0.0000000E+00&quot;);&quot;,&quot;;TEXT([.F127];&quot;0.0000000E+00&quot;);&quot;,&quot;;&quot;lc};&quot;)" office:value-type="string" office:string-value="Point(223) = {6.8523262E-04,-4.6112590E-03,z0,lc};" calcext:value-type="string">
            <text:p>Point(223) = {6.8523262E-04,-4.6112590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4" calcext:value-type="float">
            <text:p>224</text:p>
          </table:table-cell>
          <table:table-cell table:style-name="ce7" office:value-type="float" office:value="0.00154133313343602" calcext:value-type="float">
            <text:p>1.5413331E-03</text:p>
          </table:table-cell>
          <table:table-cell table:style-name="ce7" office:value-type="float" office:value="-0.006876718239381" calcext:value-type="float">
            <text:p>-6.8767182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8];&quot;) = {&quot;;TEXT([.D128];&quot;0.0000000E+00&quot;);&quot;,&quot;;TEXT([.E128];&quot;0.0000000E+00&quot;);&quot;,&quot;;TEXT([.F128];&quot;0.0000000E+00&quot;);&quot;,&quot;;&quot;lc};&quot;)" office:value-type="string" office:string-value="Point(224) = {1.5413331E-03,-6.8767182E-03,z0,lc};" calcext:value-type="string">
            <text:p>Point(224) = {1.5413331E-03,-6.876718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5" calcext:value-type="float">
            <text:p>225</text:p>
          </table:table-cell>
          <table:table-cell table:style-name="ce7" office:value-type="float" office:value="0.00273905231586336" calcext:value-type="float">
            <text:p>2.7390523E-03</text:p>
          </table:table-cell>
          <table:table-cell table:style-name="ce7" office:value-type="float" office:value="-0.00911447568396653" calcext:value-type="float">
            <text:p>-9.1144757E-03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29];&quot;) = {&quot;;TEXT([.D129];&quot;0.0000000E+00&quot;);&quot;,&quot;;TEXT([.E129];&quot;0.0000000E+00&quot;);&quot;,&quot;;TEXT([.F129];&quot;0.0000000E+00&quot;);&quot;,&quot;;&quot;lc};&quot;)" office:value-type="string" office:string-value="Point(225) = {2.7390523E-03,-9.1144757E-03,z0,lc};" calcext:value-type="string">
            <text:p>Point(225) = {2.7390523E-03,-9.1144757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6" calcext:value-type="float">
            <text:p>226</text:p>
          </table:table-cell>
          <table:table-cell table:style-name="ce7" office:value-type="float" office:value="0.00427756931309481" calcext:value-type="float">
            <text:p>4.2775693E-03</text:p>
          </table:table-cell>
          <table:table-cell table:style-name="ce7" office:value-type="float" office:value="-0.0113236824698117" calcext:value-type="float">
            <text:p>-1.1323682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30];&quot;) = {&quot;;TEXT([.D130];&quot;0.0000000E+00&quot;);&quot;,&quot;;TEXT([.E130];&quot;0.0000000E+00&quot;);&quot;,&quot;;TEXT([.F130];&quot;0.0000000E+00&quot;);&quot;,&quot;;&quot;lc};&quot;)" office:value-type="string" office:string-value="Point(226) = {4.2775693E-03,-1.1323682E-02,z0,lc};" calcext:value-type="string">
            <text:p>Point(226) = {4.2775693E-03,-1.132368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7" calcext:value-type="float">
            <text:p>227</text:p>
          </table:table-cell>
          <table:table-cell table:style-name="ce7" office:value-type="float" office:value="0.00615582970243112" calcext:value-type="float">
            <text:p>6.1558297E-03</text:p>
          </table:table-cell>
          <table:table-cell table:style-name="ce7" office:value-type="float" office:value="-0.0135033681207455" calcext:value-type="float">
            <text:p>-1.3503368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31];&quot;) = {&quot;;TEXT([.D131];&quot;0.0000000E+00&quot;);&quot;,&quot;;TEXT([.E131];&quot;0.0000000E+00&quot;);&quot;,&quot;;TEXT([.F131];&quot;0.0000000E+00&quot;);&quot;,&quot;;&quot;lc};&quot;)" office:value-type="string" office:string-value="Point(227) = {6.1558297E-03,-1.3503368E-02,z0,lc};" calcext:value-type="string">
            <text:p>Point(227) = {6.1558297E-03,-1.350336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7" office:value-type="float" office:value="0.00837254621802269" calcext:value-type="float">
            <text:p>8.3725462E-03</text:p>
          </table:table-cell>
          <table:table-cell table:style-name="ce7" office:value-type="float" office:value="-0.0156524454676532" calcext:value-type="float">
            <text:p>-1.5652445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32];&quot;) = {&quot;;TEXT([.D132];&quot;0.0000000E+00&quot;);&quot;,&quot;;TEXT([.E132];&quot;0.0000000E+00&quot;);&quot;,&quot;;TEXT([.F132];&quot;0.0000000E+00&quot;);&quot;,&quot;;&quot;lc};&quot;)" office:value-type="string" office:string-value="Point(228) = {8.3725462E-03,-1.5652445E-02,z0,lc};" calcext:value-type="string">
            <text:p>Point(228) = {8.3725462E-03,-1.565244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29" calcext:value-type="float">
            <text:p>229</text:p>
          </table:table-cell>
          <table:table-cell table:style-name="ce7" office:value-type="float" office:value="0.0109261996330972" calcext:value-type="float">
            <text:p>1.0926200E-02</text:p>
          </table:table-cell>
          <table:table-cell table:style-name="ce7" office:value-type="float" office:value="-0.0177697165785102" calcext:value-type="float">
            <text:p>-1.776971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33];&quot;) = {&quot;;TEXT([.D133];&quot;0.0000000E+00&quot;);&quot;,&quot;;TEXT([.E133];&quot;0.0000000E+00&quot;);&quot;,&quot;;TEXT([.F133];&quot;0.0000000E+00&quot;);&quot;,&quot;;&quot;lc};&quot;)" office:value-type="string" office:string-value="Point(229) = {1.0926200E-02,-1.7769717E-02,z0,lc};" calcext:value-type="string">
            <text:p>Point(229) = {1.0926200E-02,-1.776971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0" calcext:value-type="float">
            <text:p>230</text:p>
          </table:table-cell>
          <table:table-cell table:style-name="ce7" office:value-type="float" office:value="0.0138150398011617" calcext:value-type="float">
            <text:p>1.3815040E-02</text:p>
          </table:table-cell>
          <table:table-cell table:style-name="ce7" office:value-type="float" office:value="-0.0198538796344812" calcext:value-type="float">
            <text:p>-1.9853880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34];&quot;) = {&quot;;TEXT([.D134];&quot;0.0000000E+00&quot;);&quot;,&quot;;TEXT([.E134];&quot;0.0000000E+00&quot;);&quot;,&quot;;TEXT([.F134];&quot;0.0000000E+00&quot;);&quot;,&quot;;&quot;lc};&quot;)" office:value-type="string" office:string-value="Point(230) = {1.3815040E-02,-1.9853880E-02,z0,lc};" calcext:value-type="string">
            <text:p>Point(230) = {1.3815040E-02,-1.985388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1" calcext:value-type="float">
            <text:p>231</text:p>
          </table:table-cell>
          <table:table-cell table:style-name="ce7" office:value-type="float" office:value="0.0170370868554658" calcext:value-type="float">
            <text:p>1.7037087E-02</text:p>
          </table:table-cell>
          <table:table-cell table:style-name="ce7" office:value-type="float" office:value="-0.0219035366942596" calcext:value-type="float">
            <text:p>-2.1903537E-02</text:p>
          </table:table-cell>
          <table:table-cell table:style-name="ce7" office:value-type="string" calcext:value-type="string">
            <text:p>z0</text:p>
          </table:table-cell>
          <table:table-cell table:style-name="ce9"/>
          <table:table-cell table:style-name="ce3" table:formula="of:=CONCATENATE(&quot;Point(&quot;;[.C135];&quot;) = {&quot;;TEXT([.D135];&quot;0.0000000E+00&quot;);&quot;,&quot;;TEXT([.E135];&quot;0.0000000E+00&quot;);&quot;,&quot;;TEXT([.F135];&quot;0.0000000E+00&quot;);&quot;,&quot;;&quot;lc};&quot;)" office:value-type="string" office:string-value="Point(231) = {1.7037087E-02,-2.1903537E-02,z0,lc};" calcext:value-type="string">
            <text:p>Point(231) = {1.7037087E-02,-2.190353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2" calcext:value-type="float">
            <text:p>232</text:p>
          </table:table-cell>
          <table:table-cell table:style-name="ce7" office:value-type="float" office:value="0.0205901325659035" calcext:value-type="float">
            <text:p>2.0590133E-02</text:p>
          </table:table-cell>
          <table:table-cell table:style-name="ce7" office:value-type="float" office:value="-0.0239172022814422" calcext:value-type="float">
            <text:p>-2.391720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36];&quot;) = {&quot;;TEXT([.D136];&quot;0.0000000E+00&quot;);&quot;,&quot;;TEXT([.E136];&quot;0.0000000E+00&quot;);&quot;,&quot;;TEXT([.F136];&quot;0.0000000E+00&quot;);&quot;,&quot;;&quot;lc};&quot;)" office:value-type="string" office:string-value="Point(232) = {2.0590133E-02,-2.3917202E-02,z0,lc};" calcext:value-type="string">
            <text:p>Point(232) = {2.0590133E-02,-2.391720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3" calcext:value-type="float">
            <text:p>233</text:p>
          </table:table-cell>
          <table:table-cell table:style-name="ce7" office:value-type="float" office:value="0.0244717418524232" calcext:value-type="float">
            <text:p>2.4471742E-02</text:p>
          </table:table-cell>
          <table:table-cell table:style-name="ce7" office:value-type="float" office:value="-0.0258933127229656" calcext:value-type="float">
            <text:p>-2.589331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37];&quot;) = {&quot;;TEXT([.D137];&quot;0.0000000E+00&quot;);&quot;,&quot;;TEXT([.E137];&quot;0.0000000E+00&quot;);&quot;,&quot;;TEXT([.F137];&quot;0.0000000E+00&quot;);&quot;,&quot;;&quot;lc};&quot;)" office:value-type="string" office:string-value="Point(233) = {2.4471742E-02,-2.5893313E-02,z0,lc};" calcext:value-type="string">
            <text:p>Point(233) = {2.4471742E-02,-2.589331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4" calcext:value-type="float">
            <text:p>234</text:p>
          </table:table-cell>
          <table:table-cell table:style-name="ce7" office:value-type="float" office:value="0.0286792544539108" calcext:value-type="float">
            <text:p>2.8679254E-02</text:p>
          </table:table-cell>
          <table:table-cell table:style-name="ce7" office:value-type="float" office:value="-0.0278302361605527" calcext:value-type="float">
            <text:p>-2.783023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38];&quot;) = {&quot;;TEXT([.D138];&quot;0.0000000E+00&quot;);&quot;,&quot;;TEXT([.E138];&quot;0.0000000E+00&quot;);&quot;,&quot;;TEXT([.F138];&quot;0.0000000E+00&quot;);&quot;,&quot;;&quot;lc};&quot;)" office:value-type="string" office:string-value="Point(234) = {2.8679254E-02,-2.7830236E-02,z0,lc};" calcext:value-type="string">
            <text:p>Point(234) = {2.8679254E-02,-2.783023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5" calcext:value-type="float">
            <text:p>235</text:p>
          </table:table-cell>
          <table:table-cell table:style-name="ce7" office:value-type="float" office:value="0.0332097867513991" calcext:value-type="float">
            <text:p>3.3209787E-02</text:p>
          </table:table-cell>
          <table:table-cell table:style-name="ce7" office:value-type="float" office:value="-0.0297262831517664" calcext:value-type="float">
            <text:p>-2.972628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39];&quot;) = {&quot;;TEXT([.D139];&quot;0.0000000E+00&quot;);&quot;,&quot;;TEXT([.E139];&quot;0.0000000E+00&quot;);&quot;,&quot;;TEXT([.F139];&quot;0.0000000E+00&quot;);&quot;,&quot;;&quot;lc};&quot;)" office:value-type="string" office:string-value="Point(235) = {3.3209787E-02,-2.9726283E-02,z0,lc};" calcext:value-type="string">
            <text:p>Point(235) = {3.3209787E-02,-2.972628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6" calcext:value-type="float">
            <text:p>236</text:p>
          </table:table-cell>
          <table:table-cell table:style-name="ce7" office:value-type="float" office:value="0.0380602337443566" calcext:value-type="float">
            <text:p>3.8060234E-02</text:p>
          </table:table-cell>
          <table:table-cell table:style-name="ce7" office:value-type="float" office:value="-0.0315797177727092" calcext:value-type="float">
            <text:p>-3.157971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0];&quot;) = {&quot;;TEXT([.D140];&quot;0.0000000E+00&quot;);&quot;,&quot;;TEXT([.E140];&quot;0.0000000E+00&quot;);&quot;,&quot;;TEXT([.F140];&quot;0.0000000E+00&quot;);&quot;,&quot;;&quot;lc};&quot;)" office:value-type="string" office:string-value="Point(236) = {3.8060234E-02,-3.1579718E-02,z0,lc};" calcext:value-type="string">
            <text:p>Point(236) = {3.8060234E-02,-3.157971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7" calcext:value-type="float">
            <text:p>237</text:p>
          </table:table-cell>
          <table:table-cell table:style-name="ce7" office:value-type="float" office:value="0.0432272711786996" calcext:value-type="float">
            <text:p>4.3227271E-02</text:p>
          </table:table-cell>
          <table:table-cell table:style-name="ce7" office:value-type="float" office:value="-0.0333887691306702" calcext:value-type="float">
            <text:p>-3.3388769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1];&quot;) = {&quot;;TEXT([.D141];&quot;0.0000000E+00&quot;);&quot;,&quot;;TEXT([.E141];&quot;0.0000000E+00&quot;);&quot;,&quot;;TEXT([.F141];&quot;0.0000000E+00&quot;);&quot;,&quot;;&quot;lc};&quot;)" office:value-type="string" office:string-value="Point(237) = {4.3227271E-02,-3.3388769E-02,z0,lc};" calcext:value-type="string">
            <text:p>Point(237) = {4.3227271E-02,-3.338876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8" calcext:value-type="float">
            <text:p>238</text:p>
          </table:table-cell>
          <table:table-cell table:style-name="ce7" office:value-type="float" office:value="0.0487073578250697" calcext:value-type="float">
            <text:p>4.8707358E-02</text:p>
          </table:table-cell>
          <table:table-cell table:style-name="ce7" office:value-type="float" office:value="-0.0351516431921456" calcext:value-type="float">
            <text:p>-3.515164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2];&quot;) = {&quot;;TEXT([.D142];&quot;0.0000000E+00&quot;);&quot;,&quot;;TEXT([.E142];&quot;0.0000000E+00&quot;);&quot;,&quot;;TEXT([.F142];&quot;0.0000000E+00&quot;);&quot;,&quot;;&quot;lc};&quot;)" office:value-type="string" office:string-value="Point(238) = {4.8707358E-02,-3.5151643E-02,z0,lc};" calcext:value-type="string">
            <text:p>Point(238) = {4.8707358E-02,-3.515164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39" calcext:value-type="float">
            <text:p>239</text:p>
          </table:table-cell>
          <table:table-cell table:style-name="ce7" office:value-type="float" office:value="0.0544967379058161" calcext:value-type="float">
            <text:p>5.4496738E-02</text:p>
          </table:table-cell>
          <table:table-cell table:style-name="ce7" office:value-type="float" office:value="-0.0368665348296582" calcext:value-type="float">
            <text:p>-3.6866535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3];&quot;) = {&quot;;TEXT([.D143];&quot;0.0000000E+00&quot;);&quot;,&quot;;TEXT([.E143];&quot;0.0000000E+00&quot;);&quot;,&quot;;TEXT([.F143];&quot;0.0000000E+00&quot;);&quot;,&quot;;&quot;lc};&quot;)" office:value-type="string" office:string-value="Point(239) = {5.4496738E-02,-3.6866535E-02,z0,lc};" calcext:value-type="string">
            <text:p>Point(239) = {5.4496738E-02,-3.686653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0.0605914436690173" calcext:value-type="float">
            <text:p>6.0591444E-02</text:p>
          </table:table-cell>
          <table:table-cell table:style-name="ce7" office:value-type="float" office:value="-0.0385316399897089" calcext:value-type="float">
            <text:p>-3.8531640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4];&quot;) = {&quot;;TEXT([.D144];&quot;0.0000000E+00&quot;);&quot;,&quot;;TEXT([.E144];&quot;0.0000000E+00&quot;);&quot;,&quot;;TEXT([.F144];&quot;0.0000000E+00&quot;);&quot;,&quot;;&quot;lc};&quot;)" office:value-type="string" office:string-value="Point(240) = {6.0591444E-02,-3.8531640E-02,z0,lc};" calcext:value-type="string">
            <text:p>Point(240) = {6.0591444E-02,-3.853164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1" calcext:value-type="float">
            <text:p>241</text:p>
          </table:table-cell>
          <table:table-cell table:style-name="ce7" office:value-type="float" office:value="0.0669872981077807" calcext:value-type="float">
            <text:p>6.6987298E-02</text:p>
          </table:table-cell>
          <table:table-cell table:style-name="ce7" office:value-type="float" office:value="-0.0401451678839889" calcext:value-type="float">
            <text:p>-4.014516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5];&quot;) = {&quot;;TEXT([.D145];&quot;0.0000000E+00&quot;);&quot;,&quot;;TEXT([.E145];&quot;0.0000000E+00&quot;);&quot;,&quot;;TEXT([.F145];&quot;0.0000000E+00&quot;);&quot;,&quot;;&quot;lc};&quot;)" office:value-type="string" office:string-value="Point(241) = {6.6987298E-02,-4.0145168E-02,z0,lc};" calcext:value-type="string">
            <text:p>Point(241) = {6.6987298E-02,-4.014516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2" calcext:value-type="float">
            <text:p>242</text:p>
          </table:table-cell>
          <table:table-cell table:style-name="ce7" office:value-type="float" office:value="0.0736799178229539" calcext:value-type="float">
            <text:p>7.3679918E-02</text:p>
          </table:table-cell>
          <table:table-cell table:style-name="ce7" office:value-type="float" office:value="-0.0417053531066882" calcext:value-type="float">
            <text:p>-4.170535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6];&quot;) = {&quot;;TEXT([.D146];&quot;0.0000000E+00&quot;);&quot;,&quot;;TEXT([.E146];&quot;0.0000000E+00&quot;);&quot;,&quot;;TEXT([.F146];&quot;0.0000000E+00&quot;);&quot;,&quot;;&quot;lc};&quot;)" office:value-type="string" office:string-value="Point(242) = {7.3679918E-02,-4.1705353E-02,z0,lc};" calcext:value-type="string">
            <text:p>Point(242) = {7.3679918E-02,-4.170535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3" calcext:value-type="float">
            <text:p>243</text:p>
          </table:table-cell>
          <table:table-cell table:style-name="ce7" office:value-type="float" office:value="0.080664716027288" calcext:value-type="float">
            <text:p>8.0664716E-02</text:p>
          </table:table-cell>
          <table:table-cell table:style-name="ce7" office:value-type="float" office:value="-0.0432104675823222" calcext:value-type="float">
            <text:p>-4.321046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7];&quot;) = {&quot;;TEXT([.D147];&quot;0.0000000E+00&quot;);&quot;,&quot;;TEXT([.E147];&quot;0.0000000E+00&quot;);&quot;,&quot;;TEXT([.F147];&quot;0.0000000E+00&quot;);&quot;,&quot;;&quot;lc};&quot;)" office:value-type="string" office:string-value="Point(243) = {8.0664716E-02,-4.3210468E-02,z0,lc};" calcext:value-type="string">
            <text:p>Point(243) = {8.0664716E-02,-4.321046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4" calcext:value-type="float">
            <text:p>244</text:p>
          </table:table-cell>
          <table:table-cell table:style-name="ce7" office:value-type="float" office:value="0.0879369056889922" calcext:value-type="float">
            <text:p>8.7936906E-02</text:p>
          </table:table-cell>
          <table:table-cell table:style-name="ce7" office:value-type="float" office:value="-0.0446588322509522" calcext:value-type="float">
            <text:p>-4.465883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8];&quot;) = {&quot;;TEXT([.D148];&quot;0.0000000E+00&quot;);&quot;,&quot;;TEXT([.E148];&quot;0.0000000E+00&quot;);&quot;,&quot;;TEXT([.F148];&quot;0.0000000E+00&quot;);&quot;,&quot;;&quot;lc};&quot;)" office:value-type="string" office:string-value="Point(244) = {8.7936906E-02,-4.4658832E-02,z0,lc};" calcext:value-type="string">
            <text:p>Point(244) = {8.7936906E-02,-4.465883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5" calcext:value-type="float">
            <text:p>245</text:p>
          </table:table-cell>
          <table:table-cell table:style-name="ce7" office:value-type="float" office:value="0.0954915028125263" calcext:value-type="float">
            <text:p>9.5491503E-02</text:p>
          </table:table-cell>
          <table:table-cell table:style-name="ce7" office:value-type="float" office:value="-0.0460488284009686" calcext:value-type="float">
            <text:p>-4.604882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49];&quot;) = {&quot;;TEXT([.D149];&quot;0.0000000E+00&quot;);&quot;,&quot;;TEXT([.E149];&quot;0.0000000E+00&quot;);&quot;,&quot;;TEXT([.F149];&quot;0.0000000E+00&quot;);&quot;,&quot;;&quot;lc};&quot;)" office:value-type="string" office:string-value="Point(245) = {9.5491503E-02,-4.6048828E-02,z0,lc};" calcext:value-type="string">
            <text:p>Point(245) = {9.5491503E-02,-4.604882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6" calcext:value-type="float">
            <text:p>246</text:p>
          </table:table-cell>
          <table:table-cell table:style-name="ce7" office:value-type="float" office:value="0.103323329854382" calcext:value-type="float">
            <text:p>1.0332333E-01</text:p>
          </table:table-cell>
          <table:table-cell table:style-name="ce7" office:value-type="float" office:value="-0.0473789085636924" calcext:value-type="float">
            <text:p>-4.7378909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0];&quot;) = {&quot;;TEXT([.D150];&quot;0.0000000E+00&quot;);&quot;,&quot;;TEXT([.E150];&quot;0.0000000E+00&quot;);&quot;,&quot;;TEXT([.F150];&quot;0.0000000E+00&quot;);&quot;,&quot;;&quot;lc};&quot;)" office:value-type="string" office:string-value="Point(246) = {1.0332333E-01,-4.7378909E-02,z0,lc};" calcext:value-type="string">
            <text:p>Point(246) = {1.0332333E-01,-4.737890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7" office:value-type="float" office:value="0.111427019271515" calcext:value-type="float">
            <text:p>1.1142702E-01</text:p>
          </table:table-cell>
          <table:table-cell table:style-name="ce7" office:value-type="float" office:value="-0.048647606888895" calcext:value-type="float">
            <text:p>-4.8647607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1];&quot;) = {&quot;;TEXT([.D151];&quot;0.0000000E+00&quot;);&quot;,&quot;;TEXT([.E151];&quot;0.0000000E+00&quot;);&quot;,&quot;;TEXT([.F151];&quot;0.0000000E+00&quot;);&quot;,&quot;;&quot;lc};&quot;)" office:value-type="string" office:string-value="Point(247) = {1.1142702E-01,-4.8647607E-02,z0,lc};" calcext:value-type="string">
            <text:p>Point(247) = {1.1142702E-01,-4.864760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8" calcext:value-type="float">
            <text:p>248</text:p>
          </table:table-cell>
          <table:table-cell table:style-name="ce7" office:value-type="float" office:value="0.119797017199985" calcext:value-type="float">
            <text:p>1.1979702E-01</text:p>
          </table:table-cell>
          <table:table-cell table:style-name="ce7" office:value-type="float" office:value="-0.0498535489258783" calcext:value-type="float">
            <text:p>-4.9853549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2];&quot;) = {&quot;;TEXT([.D152];&quot;0.0000000E+00&quot;);&quot;,&quot;;TEXT([.E152];&quot;0.0000000E+00&quot;);&quot;,&quot;;TEXT([.F152];&quot;0.0000000E+00&quot;);&quot;,&quot;;&quot;lc};&quot;)" office:value-type="string" office:string-value="Point(248) = {1.1979702E-01,-4.9853549E-02,z0,lc};" calcext:value-type="string">
            <text:p>Point(248) = {1.1979702E-01,-4.985354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49" calcext:value-type="float">
            <text:p>249</text:p>
          </table:table-cell>
          <table:table-cell table:style-name="ce7" office:value-type="float" office:value="0.128427587261303" calcext:value-type="float">
            <text:p>1.2842759E-01</text:p>
          </table:table-cell>
          <table:table-cell table:style-name="ce7" office:value-type="float" office:value="-0.0509954607409406" calcext:value-type="float">
            <text:p>-5.0995461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3];&quot;) = {&quot;;TEXT([.D153];&quot;0.0000000E+00&quot;);&quot;,&quot;;TEXT([.E153];&quot;0.0000000E+00&quot;);&quot;,&quot;;TEXT([.F153];&quot;0.0000000E+00&quot;);&quot;,&quot;;&quot;lc};&quot;)" office:value-type="string" office:string-value="Point(249) = {1.2842759E-01,-5.0995461E-02,z0,lc};" calcext:value-type="string">
            <text:p>Point(249) = {1.2842759E-01,-5.099546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0" calcext:value-type="float">
            <text:p>250</text:p>
          </table:table-cell>
          <table:table-cell table:style-name="ce7" office:value-type="float" office:value="0.137312814493856" calcext:value-type="float">
            <text:p>1.3731281E-01</text:p>
          </table:table-cell>
          <table:table-cell table:style-name="ce7" office:value-type="float" office:value="-0.0520721773088123" calcext:value-type="float">
            <text:p>-5.2072177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4];&quot;) = {&quot;;TEXT([.D154];&quot;0.0000000E+00&quot;);&quot;,&quot;;TEXT([.E154];&quot;0.0000000E+00&quot;);&quot;,&quot;;TEXT([.F154];&quot;0.0000000E+00&quot;);&quot;,&quot;;&quot;lc};&quot;)" office:value-type="string" office:string-value="Point(250) = {1.3731281E-01,-5.2072177E-02,z0,lc};" calcext:value-type="string">
            <text:p>Point(250) = {1.3731281E-01,-5.207217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1" calcext:value-type="float">
            <text:p>251</text:p>
          </table:table-cell>
          <table:table-cell table:style-name="ce7" office:value-type="float" office:value="0.146446609406726" calcext:value-type="float">
            <text:p>1.4644661E-01</text:p>
          </table:table-cell>
          <table:table-cell table:style-name="ce7" office:value-type="float" office:value="-0.0530826501229085" calcext:value-type="float">
            <text:p>-5.3082650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5];&quot;) = {&quot;;TEXT([.D155];&quot;0.0000000E+00&quot;);&quot;,&quot;;TEXT([.E155];&quot;0.0000000E+00&quot;);&quot;,&quot;;TEXT([.F155];&quot;0.0000000E+00&quot;);&quot;,&quot;;&quot;lc};&quot;)" office:value-type="string" office:string-value="Point(251) = {1.4644661E-01,-5.3082650E-02,z0,lc};" calcext:value-type="string">
            <text:p>Point(251) = {1.4644661E-01,-5.308265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2" calcext:value-type="float">
            <text:p>252</text:p>
          </table:table-cell>
          <table:table-cell table:style-name="ce7" office:value-type="float" office:value="0.155822712153123" calcext:value-type="float">
            <text:p>1.5582271E-01</text:p>
          </table:table-cell>
          <table:table-cell table:style-name="ce7" office:value-type="float" office:value="-0.0540259539769367" calcext:value-type="float">
            <text:p>-5.4025954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6];&quot;) = {&quot;;TEXT([.D156];&quot;0.0000000E+00&quot;);&quot;,&quot;;TEXT([.E156];&quot;0.0000000E+00&quot;);&quot;,&quot;;TEXT([.F156];&quot;0.0000000E+00&quot;);&quot;,&quot;;&quot;lc};&quot;)" office:value-type="string" office:string-value="Point(252) = {1.5582271E-01,-5.4025954E-02,z0,lc};" calcext:value-type="string">
            <text:p>Point(252) = {1.5582271E-01,-5.4025954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3" calcext:value-type="float">
            <text:p>253</text:p>
          </table:table-cell>
          <table:table-cell table:style-name="ce7" office:value-type="float" office:value="0.165434696820571" calcext:value-type="float">
            <text:p>1.6543470E-01</text:p>
          </table:table-cell>
          <table:table-cell table:style-name="ce7" office:value-type="float" office:value="-0.0549012928784368" calcext:value-type="float">
            <text:p>-5.490129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7];&quot;) = {&quot;;TEXT([.D157];&quot;0.0000000E+00&quot;);&quot;,&quot;;TEXT([.E157];&quot;0.0000000E+00&quot;);&quot;,&quot;;TEXT([.F157];&quot;0.0000000E+00&quot;);&quot;,&quot;;&quot;lc};&quot;)" office:value-type="string" office:string-value="Point(253) = {1.6543470E-01,-5.4901293E-02,z0,lc};" calcext:value-type="string">
            <text:p>Point(253) = {1.6543470E-01,-5.490129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4" calcext:value-type="float">
            <text:p>254</text:p>
          </table:table-cell>
          <table:table-cell table:style-name="ce7" office:value-type="float" office:value="0.175275975834908" calcext:value-type="float">
            <text:p>1.7527598E-01</text:p>
          </table:table-cell>
          <table:table-cell table:style-name="ce7" office:value-type="float" office:value="-0.0557080050631394" calcext:value-type="float">
            <text:p>-5.5708005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8];&quot;) = {&quot;;TEXT([.D158];&quot;0.0000000E+00&quot;);&quot;,&quot;;TEXT([.E158];&quot;0.0000000E+00&quot;);&quot;,&quot;;TEXT([.F158];&quot;0.0000000E+00&quot;);&quot;,&quot;;&quot;lc};&quot;)" office:value-type="string" office:string-value="Point(254) = {1.7527598E-01,-5.5708005E-02,z0,lc};" calcext:value-type="string">
            <text:p>Point(254) = {1.7527598E-01,-5.570800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5" calcext:value-type="float">
            <text:p>255</text:p>
          </table:table-cell>
          <table:table-cell table:style-name="ce7" office:value-type="float" office:value="0.185339804475081" calcext:value-type="float">
            <text:p>1.8533980E-01</text:p>
          </table:table-cell>
          <table:table-cell table:style-name="ce7" office:value-type="float" office:value="-0.0564455670875139" calcext:value-type="float">
            <text:p>-5.6445567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59];&quot;) = {&quot;;TEXT([.D159];&quot;0.0000000E+00&quot;);&quot;,&quot;;TEXT([.E159];&quot;0.0000000E+00&quot;);&quot;,&quot;;TEXT([.F159];&quot;0.0000000E+00&quot;);&quot;,&quot;;&quot;lc};&quot;)" office:value-type="string" office:string-value="Point(255) = {1.8533980E-01,-5.6445567E-02,z0,lc};" calcext:value-type="string">
            <text:p>Point(255) = {1.8533980E-01,-5.644556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6" calcext:value-type="float">
            <text:p>256</text:p>
          </table:table-cell>
          <table:table-cell table:style-name="ce7" office:value-type="float" office:value="0.19561928549564" calcext:value-type="float">
            <text:p>1.9561929E-01</text:p>
          </table:table-cell>
          <table:table-cell table:style-name="ce7" office:value-type="float" office:value="-0.0571135969854671" calcext:value-type="float">
            <text:p>-5.7113597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0];&quot;) = {&quot;;TEXT([.D160];&quot;0.0000000E+00&quot;);&quot;,&quot;;TEXT([.E160];&quot;0.0000000E+00&quot;);&quot;,&quot;;TEXT([.F160];&quot;0.0000000E+00&quot;);&quot;,&quot;;&quot;lc};&quot;)" office:value-type="string" office:string-value="Point(256) = {1.9561929E-01,-5.7113597E-02,z0,lc};" calcext:value-type="string">
            <text:p>Point(256) = {1.9561929E-01,-5.711359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7" calcext:value-type="float">
            <text:p>257</text:p>
          </table:table-cell>
          <table:table-cell table:style-name="ce7" office:value-type="float" office:value="0.206107373853763" calcext:value-type="float">
            <text:p>2.0610737E-01</text:p>
          </table:table-cell>
          <table:table-cell table:style-name="ce7" office:value-type="float" office:value="-0.0577118564837423" calcext:value-type="float">
            <text:p>-5.771185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1];&quot;) = {&quot;;TEXT([.D161];&quot;0.0000000E+00&quot;);&quot;,&quot;;TEXT([.E161];&quot;0.0000000E+00&quot;);&quot;,&quot;;TEXT([.F161];&quot;0.0000000E+00&quot;);&quot;,&quot;;&quot;lc};&quot;)" office:value-type="string" office:string-value="Point(257) = {2.0610737E-01,-5.7711856E-02,z0,lc};" calcext:value-type="string">
            <text:p>Point(257) = {2.0610737E-01,-5.771185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8" calcext:value-type="float">
            <text:p>258</text:p>
          </table:table-cell>
          <table:table-cell table:style-name="ce7" office:value-type="float" office:value="0.216796881537584" calcext:value-type="float">
            <text:p>2.1679688E-01</text:p>
          </table:table-cell>
          <table:table-cell table:style-name="ce7" office:value-type="float" office:value="-0.0582402522790943" calcext:value-type="float">
            <text:p>-5.824025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2];&quot;) = {&quot;;TEXT([.D162];&quot;0.0000000E+00&quot;);&quot;,&quot;;TEXT([.E162];&quot;0.0000000E+00&quot;);&quot;,&quot;;TEXT([.F162];&quot;0.0000000E+00&quot;);&quot;,&quot;;&quot;lc};&quot;)" office:value-type="string" office:string-value="Point(258) = {2.1679688E-01,-5.8240252E-02,z0,lc};" calcext:value-type="string">
            <text:p>Point(258) = {2.1679688E-01,-5.824025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59" calcext:value-type="float">
            <text:p>259</text:p>
          </table:table-cell>
          <table:table-cell table:style-name="ce7" office:value-type="float" office:value="0.227680482492486" calcext:value-type="float">
            <text:p>2.2768048E-01</text:p>
          </table:table-cell>
          <table:table-cell table:style-name="ce7" office:value-type="float" office:value="-0.058698836388671" calcext:value-type="float">
            <text:p>-5.869883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3];&quot;) = {&quot;;TEXT([.D163];&quot;0.0000000E+00&quot;);&quot;,&quot;;TEXT([.E163];&quot;0.0000000E+00&quot;);&quot;,&quot;;TEXT([.F163];&quot;0.0000000E+00&quot;);&quot;,&quot;;&quot;lc};&quot;)" office:value-type="string" office:string-value="Point(259) = {2.2768048E-01,-5.8698836E-02,z0,lc};" calcext:value-type="string">
            <text:p>Point(259) = {2.2768048E-01,-5.869883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0" calcext:value-type="float">
            <text:p>260</text:p>
          </table:table-cell>
          <table:table-cell table:style-name="ce7" office:value-type="float" office:value="0.238750717642026" calcext:value-type="float">
            <text:p>2.3875072E-01</text:p>
          </table:table-cell>
          <table:table-cell table:style-name="ce7" office:value-type="float" office:value="-0.0590878055931527" calcext:value-type="float">
            <text:p>-5.908780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4];&quot;) = {&quot;;TEXT([.D164];&quot;0.0000000E+00&quot;);&quot;,&quot;;TEXT([.E164];&quot;0.0000000E+00&quot;);&quot;,&quot;;TEXT([.F164];&quot;0.0000000E+00&quot;);&quot;,&quot;;&quot;lc};&quot;)" office:value-type="string" office:string-value="Point(260) = {2.3875072E-01,-5.9087806E-02,z0,lc};" calcext:value-type="string">
            <text:p>Point(260) = {2.3875072E-01,-5.908780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1" calcext:value-type="float">
            <text:p>261</text:p>
          </table:table-cell>
          <table:table-cell table:style-name="ce7" office:value-type="float" office:value="0.25" calcext:value-type="float">
            <text:p>2.5000000E-01</text:p>
          </table:table-cell>
          <table:table-cell table:style-name="ce7" office:value-type="float" office:value="-0.0594075" calcext:value-type="float">
            <text:p>-5.9407500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5];&quot;) = {&quot;;TEXT([.D165];&quot;0.0000000E+00&quot;);&quot;,&quot;;TEXT([.E165];&quot;0.0000000E+00&quot;);&quot;,&quot;;TEXT([.F165];&quot;0.0000000E+00&quot;);&quot;,&quot;;&quot;lc};&quot;)" office:value-type="string" office:string-value="Point(261) = {2.5000000E-01,-5.9407500E-02,z0,lc};" calcext:value-type="string">
            <text:p>Point(261) = {2.5000000E-01,-5.940750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2" calcext:value-type="float">
            <text:p>262</text:p>
          </table:table-cell>
          <table:table-cell table:style-name="ce7" office:value-type="float" office:value="0.261420619870196" calcext:value-type="float">
            <text:p>2.6142062E-01</text:p>
          </table:table-cell>
          <table:table-cell table:style-name="ce7" office:value-type="float" office:value="-0.0596584007615625" calcext:value-type="float">
            <text:p>-5.9658401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6];&quot;) = {&quot;;TEXT([.D166];&quot;0.0000000E+00&quot;);&quot;,&quot;;TEXT([.E166];&quot;0.0000000E+00&quot;);&quot;,&quot;;TEXT([.F166];&quot;0.0000000E+00&quot;);&quot;,&quot;;&quot;lc};&quot;)" office:value-type="string" office:string-value="Point(262) = {2.6142062E-01,-5.9658401E-02,z0,lc};" calcext:value-type="string">
            <text:p>Point(262) = {2.6142062E-01,-5.965840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3" calcext:value-type="float">
            <text:p>263</text:p>
          </table:table-cell>
          <table:table-cell table:style-name="ce7" office:value-type="float" office:value="0.273004750130227" calcext:value-type="float">
            <text:p>2.7300475E-01</text:p>
          </table:table-cell>
          <table:table-cell table:style-name="ce7" office:value-type="float" office:value="-0.0598411269897428" calcext:value-type="float">
            <text:p>-5.9841127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7];&quot;) = {&quot;;TEXT([.D167];&quot;0.0000000E+00&quot;);&quot;,&quot;;TEXT([.E167];&quot;0.0000000E+00&quot;);&quot;,&quot;;TEXT([.F167];&quot;0.0000000E+00&quot;);&quot;,&quot;;&quot;lc};&quot;)" office:value-type="string" office:string-value="Point(263) = {2.7300475E-01,-5.9841127E-02,z0,lc};" calcext:value-type="string">
            <text:p>Point(263) = {2.7300475E-01,-5.984112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4" calcext:value-type="float">
            <text:p>264</text:p>
          </table:table-cell>
          <table:table-cell table:style-name="ce7" office:value-type="float" office:value="0.284744451595852" calcext:value-type="float">
            <text:p>2.8474445E-01</text:p>
          </table:table-cell>
          <table:table-cell table:style-name="ce7" office:value-type="float" office:value="-0.0599564319153178" calcext:value-type="float">
            <text:p>-5.995643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8];&quot;) = {&quot;;TEXT([.D168];&quot;0.0000000E+00&quot;);&quot;,&quot;;TEXT([.E168];&quot;0.0000000E+00&quot;);&quot;,&quot;;TEXT([.F168];&quot;0.0000000E+00&quot;);&quot;,&quot;;&quot;lc};&quot;)" office:value-type="string" office:string-value="Point(264) = {2.8474445E-01,-5.9956432E-02,z0,lc};" calcext:value-type="string">
            <text:p>Point(264) = {2.8474445E-01,-5.995643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5" calcext:value-type="float">
            <text:p>265</text:p>
          </table:table-cell>
          <table:table-cell table:style-name="ce7" office:value-type="float" office:value="0.2966316784621" calcext:value-type="float">
            <text:p>2.9663168E-01</text:p>
          </table:table-cell>
          <table:table-cell table:style-name="ce7" office:value-type="float" office:value="-0.060005198345846" calcext:value-type="float">
            <text:p>-6.000519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69];&quot;) = {&quot;;TEXT([.D169];&quot;0.0000000E+00&quot;);&quot;,&quot;;TEXT([.E169];&quot;0.0000000E+00&quot;);&quot;,&quot;;TEXT([.F169];&quot;0.0000000E+00&quot;);&quot;,&quot;;&quot;lc};&quot;)" office:value-type="string" office:string-value="Point(265) = {2.9663168E-01,-6.0005198E-02,z0,lc};" calcext:value-type="string">
            <text:p>Point(265) = {2.9663168E-01,-6.000519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7" office:value-type="float" office:value="0.308658283817455" calcext:value-type="float">
            <text:p>3.0865828E-01</text:p>
          </table:table-cell>
          <table:table-cell table:style-name="ce7" office:value-type="float" office:value="-0.059988433481268" calcext:value-type="float">
            <text:p>-5.998843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0];&quot;) = {&quot;;TEXT([.D170];&quot;0.0000000E+00&quot;);&quot;,&quot;;TEXT([.E170];&quot;0.0000000E+00&quot;);&quot;,&quot;;TEXT([.F170];&quot;0.0000000E+00&quot;);&quot;,&quot;;&quot;lc};&quot;)" office:value-type="string" office:string-value="Point(266) = {3.0865828E-01,-5.9988433E-02,z0,lc};" calcext:value-type="string">
            <text:p>Point(266) = {3.0865828E-01,-5.998843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7" calcext:value-type="float">
            <text:p>267</text:p>
          </table:table-cell>
          <table:table-cell table:style-name="ce7" office:value-type="float" office:value="0.32081602522735" calcext:value-type="float">
            <text:p>3.2081603E-01</text:p>
          </table:table-cell>
          <table:table-cell table:style-name="ce7" office:value-type="float" office:value="-0.0599072631508117" calcext:value-type="float">
            <text:p>-5.990726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1];&quot;) = {&quot;;TEXT([.D171];&quot;0.0000000E+00&quot;);&quot;,&quot;;TEXT([.E171];&quot;0.0000000E+00&quot;);&quot;,&quot;;TEXT([.F171];&quot;0.0000000E+00&quot;);&quot;,&quot;;&quot;lc};&quot;)" office:value-type="string" office:string-value="Point(267) = {3.2081603E-01,-5.9907263E-02,z0,lc};" calcext:value-type="string">
            <text:p>Point(267) = {3.2081603E-01,-5.990726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8" calcext:value-type="float">
            <text:p>268</text:p>
          </table:table-cell>
          <table:table-cell table:style-name="ce7" office:value-type="float" office:value="0.333096570383115" calcext:value-type="float">
            <text:p>3.3309657E-01</text:p>
          </table:table-cell>
          <table:table-cell table:style-name="ce7" office:value-type="float" office:value="-0.0597629255385877" calcext:value-type="float">
            <text:p>-5.976292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2];&quot;) = {&quot;;TEXT([.D172];&quot;0.0000000E+00&quot;);&quot;,&quot;;TEXT([.E172];&quot;0.0000000E+00&quot;);&quot;,&quot;;TEXT([.F172];&quot;0.0000000E+00&quot;);&quot;,&quot;;&quot;lc};&quot;)" office:value-type="string" office:string-value="Point(268) = {3.3309657E-01,-5.9762926E-02,z0,lc};" calcext:value-type="string">
            <text:p>Point(268) = {3.3309657E-01,-5.976292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69" calcext:value-type="float">
            <text:p>269</text:p>
          </table:table-cell>
          <table:table-cell table:style-name="ce7" office:value-type="float" office:value="0.345491502812526" calcext:value-type="float">
            <text:p>3.4549150E-01</text:p>
          </table:table-cell>
          <table:table-cell table:style-name="ce7" office:value-type="float" office:value="-0.059556764468292" calcext:value-type="float">
            <text:p>-5.9556764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3];&quot;) = {&quot;;TEXT([.D173];&quot;0.0000000E+00&quot;);&quot;,&quot;;TEXT([.E173];&quot;0.0000000E+00&quot;);&quot;,&quot;;TEXT([.F173];&quot;0.0000000E+00&quot;);&quot;,&quot;;&quot;lc};&quot;)" office:value-type="string" office:string-value="Point(269) = {3.4549150E-01,-5.9556764E-02,z0,lc};" calcext:value-type="string">
            <text:p>Point(269) = {3.4549150E-01,-5.9556764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0" calcext:value-type="float">
            <text:p>270</text:p>
          </table:table-cell>
          <table:table-cell table:style-name="ce7" office:value-type="float" office:value="0.357992327648039" calcext:value-type="float">
            <text:p>3.5799233E-01</text:p>
          </table:table-cell>
          <table:table-cell table:style-name="ce7" office:value-type="float" office:value="-0.0592902223196843" calcext:value-type="float">
            <text:p>-5.929022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4];&quot;) = {&quot;;TEXT([.D174];&quot;0.0000000E+00&quot;);&quot;,&quot;;TEXT([.E174];&quot;0.0000000E+00&quot;);&quot;,&quot;;TEXT([.F174];&quot;0.0000000E+00&quot;);&quot;,&quot;;&quot;lc};&quot;)" office:value-type="string" office:string-value="Point(270) = {3.5799233E-01,-5.9290222E-02,z0,lc};" calcext:value-type="string">
            <text:p>Point(270) = {3.5799233E-01,-5.929022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1" calcext:value-type="float">
            <text:p>271</text:p>
          </table:table-cell>
          <table:table-cell table:style-name="ce7" office:value-type="float" office:value="0.37059047744874" calcext:value-type="float">
            <text:p>3.7059048E-01</text:p>
          </table:table-cell>
          <table:table-cell table:style-name="ce7" office:value-type="float" office:value="-0.0589648326509882" calcext:value-type="float">
            <text:p>-5.896483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5];&quot;) = {&quot;;TEXT([.D175];&quot;0.0000000E+00&quot;);&quot;,&quot;;TEXT([.E175];&quot;0.0000000E+00&quot;);&quot;,&quot;;TEXT([.F175];&quot;0.0000000E+00&quot;);&quot;,&quot;;&quot;lc};&quot;)" office:value-type="string" office:string-value="Point(271) = {3.7059048E-01,-5.8964833E-02,z0,lc};" calcext:value-type="string">
            <text:p>Point(271) = {3.7059048E-01,-5.896483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2" calcext:value-type="float">
            <text:p>272</text:p>
          </table:table-cell>
          <table:table-cell table:style-name="ce7" office:value-type="float" office:value="0.383277318072047" calcext:value-type="float">
            <text:p>3.8327732E-01</text:p>
          </table:table-cell>
          <table:table-cell table:style-name="ce7" office:value-type="float" office:value="-0.0585822126020352" calcext:value-type="float">
            <text:p>-5.858221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6];&quot;) = {&quot;;TEXT([.D176];&quot;0.0000000E+00&quot;);&quot;,&quot;;TEXT([.E176];&quot;0.0000000E+00&quot;);&quot;,&quot;;TEXT([.F176];&quot;0.0000000E+00&quot;);&quot;,&quot;;&quot;lc};&quot;)" office:value-type="string" office:string-value="Point(272) = {3.8327732E-01,-5.8582213E-02,z0,lc};" calcext:value-type="string">
            <text:p>Point(272) = {3.8327732E-01,-5.858221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3" calcext:value-type="float">
            <text:p>273</text:p>
          </table:table-cell>
          <table:table-cell table:style-name="ce7" office:value-type="float" office:value="0.39604415459112" calcext:value-type="float">
            <text:p>3.9604415E-01</text:p>
          </table:table-cell>
          <table:table-cell table:style-name="ce7" office:value-type="float" office:value="-0.0581440551528807" calcext:value-type="float">
            <text:p>-5.8144055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7];&quot;) = {&quot;;TEXT([.D177];&quot;0.0000000E+00&quot;);&quot;,&quot;;TEXT([.E177];&quot;0.0000000E+00&quot;);&quot;,&quot;;TEXT([.F177];&quot;0.0000000E+00&quot;);&quot;,&quot;;&quot;lc};&quot;)" office:value-type="string" office:string-value="Point(273) = {3.9604415E-01,-5.8144055E-02,z0,lc};" calcext:value-type="string">
            <text:p>Point(273) = {3.9604415E-01,-5.814405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4" calcext:value-type="float">
            <text:p>274</text:p>
          </table:table-cell>
          <table:table-cell table:style-name="ce7" office:value-type="float" office:value="0.408882237253926" calcext:value-type="float">
            <text:p>4.0888224E-01</text:p>
          </table:table-cell>
          <table:table-cell table:style-name="ce7" office:value-type="float" office:value="-0.0576521213117386" calcext:value-type="float">
            <text:p>-5.7652121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8];&quot;) = {&quot;;TEXT([.D178];&quot;0.0000000E+00&quot;);&quot;,&quot;;TEXT([.E178];&quot;0.0000000E+00&quot;);&quot;,&quot;;TEXT([.F178];&quot;0.0000000E+00&quot;);&quot;,&quot;;&quot;lc};&quot;)" office:value-type="string" office:string-value="Point(274) = {4.0888224E-01,-5.7652121E-02,z0,lc};" calcext:value-type="string">
            <text:p>Point(274) = {4.0888224E-01,-5.765212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5" calcext:value-type="float">
            <text:p>275</text:p>
          </table:table-cell>
          <table:table-cell table:style-name="ce7" office:value-type="float" office:value="0.421782767479885" calcext:value-type="float">
            <text:p>4.2178277E-01</text:p>
          </table:table-cell>
          <table:table-cell table:style-name="ce7" office:value-type="float" office:value="-0.0571082323044601" calcext:value-type="float">
            <text:p>-5.710823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79];&quot;) = {&quot;;TEXT([.D179];&quot;0.0000000E+00&quot;);&quot;,&quot;;TEXT([.E179];&quot;0.0000000E+00&quot;);&quot;,&quot;;TEXT([.F179];&quot;0.0000000E+00&quot;);&quot;,&quot;;&quot;lc};&quot;)" office:value-type="string" office:string-value="Point(275) = {4.2178277E-01,-5.7108232E-02,z0,lc};" calcext:value-type="string">
            <text:p>Point(275) = {4.2178277E-01,-5.710823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6" calcext:value-type="float">
            <text:p>276</text:p>
          </table:table-cell>
          <table:table-cell table:style-name="ce7" office:value-type="float" office:value="0.434736903889974" calcext:value-type="float">
            <text:p>4.3473690E-01</text:p>
          </table:table-cell>
          <table:table-cell table:style-name="ce7" office:value-type="float" office:value="-0.0565142618354297" calcext:value-type="float">
            <text:p>-5.651426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0];&quot;) = {&quot;;TEXT([.D180];&quot;0.0000000E+00&quot;);&quot;,&quot;;TEXT([.E180];&quot;0.0000000E+00&quot;);&quot;,&quot;;TEXT([.F180];&quot;0.0000000E+00&quot;);&quot;,&quot;;&quot;lc};&quot;)" office:value-type="string" office:string-value="Point(276) = {4.3473690E-01,-5.6514262E-02,z0,lc};" calcext:value-type="string">
            <text:p>Point(276) = {4.3473690E-01,-5.651426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7" calcext:value-type="float">
            <text:p>277</text:p>
          </table:table-cell>
          <table:table-cell table:style-name="ce7" office:value-type="float" office:value="0.447735768366173" calcext:value-type="float">
            <text:p>4.4773577E-01</text:p>
          </table:table-cell>
          <table:table-cell table:style-name="ce7" office:value-type="float" office:value="-0.0558721284867123" calcext:value-type="float">
            <text:p>-5.587212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1];&quot;) = {&quot;;TEXT([.D181];&quot;0.0000000E+00&quot;);&quot;,&quot;;TEXT([.E181];&quot;0.0000000E+00&quot;);&quot;,&quot;;TEXT([.F181];&quot;0.0000000E+00&quot;);&quot;,&quot;;&quot;lc};&quot;)" office:value-type="string" office:string-value="Point(277) = {4.4773577E-01,-5.5872128E-02,z0,lc};" calcext:value-type="string">
            <text:p>Point(277) = {4.4773577E-01,-5.587212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8" calcext:value-type="float">
            <text:p>278</text:p>
          </table:table-cell>
          <table:table-cell table:style-name="ce7" office:value-type="float" office:value="0.460770452136078" calcext:value-type="float">
            <text:p>4.6077045E-01</text:p>
          </table:table-cell>
          <table:table-cell table:style-name="ce7" office:value-type="float" office:value="-0.0551837883186037" calcext:value-type="float">
            <text:p>-5.518378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2];&quot;) = {&quot;;TEXT([.D182];&quot;0.0000000E+00&quot;);&quot;,&quot;;TEXT([.E182];&quot;0.0000000E+00&quot;);&quot;,&quot;;TEXT([.F182];&quot;0.0000000E+00&quot;);&quot;,&quot;;&quot;lc};&quot;)" office:value-type="string" office:string-value="Point(278) = {4.6077045E-01,-5.5183788E-02,z0,lc};" calcext:value-type="string">
            <text:p>Point(278) = {4.6077045E-01,-5.518378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79" calcext:value-type="float">
            <text:p>279</text:p>
          </table:table-cell>
          <table:table-cell table:style-name="ce7" office:value-type="float" office:value="0.473832021878528" calcext:value-type="float">
            <text:p>4.7383202E-01</text:p>
          </table:table-cell>
          <table:table-cell table:style-name="ce7" office:value-type="float" office:value="-0.0544512277304519" calcext:value-type="float">
            <text:p>-5.445122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3];&quot;) = {&quot;;TEXT([.D183];&quot;0.0000000E+00&quot;);&quot;,&quot;;TEXT([.E183];&quot;0.0000000E+00&quot;);&quot;,&quot;;TEXT([.F183];&quot;0.0000000E+00&quot;);&quot;,&quot;;&quot;lc};&quot;)" office:value-type="string" office:string-value="Point(279) = {4.7383202E-01,-5.4451228E-02,z0,lc};" calcext:value-type="string">
            <text:p>Point(279) = {4.7383202E-01,-5.445122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0" calcext:value-type="float">
            <text:p>280</text:p>
          </table:table-cell>
          <table:table-cell table:style-name="ce7" office:value-type="float" office:value="0.486911525846063" calcext:value-type="float">
            <text:p>4.8691153E-01</text:p>
          </table:table-cell>
          <table:table-cell table:style-name="ce7" office:value-type="float" office:value="-0.0536764566357969" calcext:value-type="float">
            <text:p>-5.3676457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4];&quot;) = {&quot;;TEXT([.D184];&quot;0.0000000E+00&quot;);&quot;,&quot;;TEXT([.E184];&quot;0.0000000E+00&quot;);&quot;,&quot;;TEXT([.F184];&quot;0.0000000E+00&quot;);&quot;,&quot;;&quot;lc};&quot;)" office:value-type="string" office:string-value="Point(280) = {4.8691153E-01,-5.3676457E-02,z0,lc};" calcext:value-type="string">
            <text:p>Point(280) = {4.8691153E-01,-5.367645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1" calcext:value-type="float">
            <text:p>281</text:p>
          </table:table-cell>
          <table:table-cell table:style-name="ce7" office:value-type="float" office:value="0.5" calcext:value-type="float">
            <text:p>5.0000000E-01</text:p>
          </table:table-cell>
          <table:table-cell table:style-name="ce7" office:value-type="float" office:value="-0.0528615020005716" calcext:value-type="float">
            <text:p>-5.286150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5];&quot;) = {&quot;;TEXT([.D185];&quot;0.0000000E+00&quot;);&quot;,&quot;;TEXT([.E185];&quot;0.0000000E+00&quot;);&quot;,&quot;;TEXT([.F185];&quot;0.0000000E+00&quot;);&quot;,&quot;;&quot;lc};&quot;)" office:value-type="string" office:string-value="Point(281) = {5.0000000E-01,-5.2861502E-02,z0,lc};" calcext:value-type="string">
            <text:p>Point(281) = {5.0000000E-01,-5.286150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2" calcext:value-type="float">
            <text:p>282</text:p>
          </table:table-cell>
          <table:table-cell table:style-name="ce7" office:value-type="float" office:value="0.513088474153937" calcext:value-type="float">
            <text:p>5.1308847E-01</text:p>
          </table:table-cell>
          <table:table-cell table:style-name="ce7" office:value-type="float" office:value="-0.0520084017873851" calcext:value-type="float">
            <text:p>-5.200840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6];&quot;) = {&quot;;TEXT([.D186];&quot;0.0000000E+00&quot;);&quot;,&quot;;TEXT([.E186];&quot;0.0000000E+00&quot;);&quot;,&quot;;TEXT([.F186];&quot;0.0000000E+00&quot;);&quot;,&quot;;&quot;lc};&quot;)" office:value-type="string" office:string-value="Point(282) = {5.1308847E-01,-5.2008402E-02,z0,lc};" calcext:value-type="string">
            <text:p>Point(282) = {5.1308847E-01,-5.200840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3" calcext:value-type="float">
            <text:p>283</text:p>
          </table:table-cell>
          <table:table-cell table:style-name="ce7" office:value-type="float" office:value="0.526167978121472" calcext:value-type="float">
            <text:p>5.2616798E-01</text:p>
          </table:table-cell>
          <table:table-cell table:style-name="ce7" office:value-type="float" office:value="-0.0511191993428425" calcext:value-type="float">
            <text:p>-5.1119199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7];&quot;) = {&quot;;TEXT([.D187];&quot;0.0000000E+00&quot;);&quot;,&quot;;TEXT([.E187];&quot;0.0000000E+00&quot;);&quot;,&quot;;TEXT([.F187];&quot;0.0000000E+00&quot;);&quot;,&quot;;&quot;lc};&quot;)" office:value-type="string" office:string-value="Point(283) = {5.2616798E-01,-5.1119199E-02,z0,lc};" calcext:value-type="string">
            <text:p>Point(283) = {5.2616798E-01,-5.111919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4" calcext:value-type="float">
            <text:p>284</text:p>
          </table:table-cell>
          <table:table-cell table:style-name="ce7" office:value-type="float" office:value="0.539229547863922" calcext:value-type="float">
            <text:p>5.3922955E-01</text:p>
          </table:table-cell>
          <table:table-cell table:style-name="ce7" office:value-type="float" office:value="-0.0501959382585087" calcext:value-type="float">
            <text:p>-5.019593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8];&quot;) = {&quot;;TEXT([.D188];&quot;0.0000000E+00&quot;);&quot;,&quot;;TEXT([.E188];&quot;0.0000000E+00&quot;);&quot;,&quot;;TEXT([.F188];&quot;0.0000000E+00&quot;);&quot;,&quot;;&quot;lc};&quot;)" office:value-type="string" office:string-value="Point(284) = {5.3922955E-01,-5.0195938E-02,z0,lc};" calcext:value-type="string">
            <text:p>Point(284) = {5.3922955E-01,-5.019593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7" office:value-type="float" office:value="0.552264231633827" calcext:value-type="float">
            <text:p>5.5226423E-01</text:p>
          </table:table-cell>
          <table:table-cell table:style-name="ce7" office:value-type="float" office:value="-0.0492406577295794" calcext:value-type="float">
            <text:p>-4.924065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89];&quot;) = {&quot;;TEXT([.D189];&quot;0.0000000E+00&quot;);&quot;,&quot;;TEXT([.E189];&quot;0.0000000E+00&quot;);&quot;,&quot;;TEXT([.F189];&quot;0.0000000E+00&quot;);&quot;,&quot;;&quot;lc};&quot;)" office:value-type="string" office:string-value="Point(285) = {5.5226423E-01,-4.9240658E-02,z0,lc};" calcext:value-type="string">
            <text:p>Point(285) = {5.5226423E-01,-4.924065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6" calcext:value-type="float">
            <text:p>286</text:p>
          </table:table-cell>
          <table:table-cell table:style-name="ce7" office:value-type="float" office:value="0.565263096110026" calcext:value-type="float">
            <text:p>5.6526310E-01</text:p>
          </table:table-cell>
          <table:table-cell table:style-name="ce7" office:value-type="float" office:value="-0.0482553884286467" calcext:value-type="float">
            <text:p>-4.825538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0];&quot;) = {&quot;;TEXT([.D190];&quot;0.0000000E+00&quot;);&quot;,&quot;;TEXT([.E190];&quot;0.0000000E+00&quot;);&quot;,&quot;;TEXT([.F190];&quot;0.0000000E+00&quot;);&quot;,&quot;;&quot;lc};&quot;)" office:value-type="string" office:string-value="Point(286) = {5.6526310E-01,-4.8255388E-02,z0,lc};" calcext:value-type="string">
            <text:p>Point(286) = {5.6526310E-01,-4.825538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7" calcext:value-type="float">
            <text:p>287</text:p>
          </table:table-cell>
          <table:table-cell table:style-name="ce7" office:value-type="float" office:value="0.578217232520115" calcext:value-type="float">
            <text:p>5.7821723E-01</text:p>
          </table:table-cell>
          <table:table-cell table:style-name="ce7" office:value-type="float" office:value="-0.0472421489052245" calcext:value-type="float">
            <text:p>-4.7242149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1];&quot;) = {&quot;;TEXT([.D191];&quot;0.0000000E+00&quot;);&quot;,&quot;;TEXT([.E191];&quot;0.0000000E+00&quot;);&quot;,&quot;;TEXT([.F191];&quot;0.0000000E+00&quot;);&quot;,&quot;;&quot;lc};&quot;)" office:value-type="string" office:string-value="Point(287) = {5.7821723E-01,-4.7242149E-02,z0,lc};" calcext:value-type="string">
            <text:p>Point(287) = {5.7821723E-01,-4.724214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8" calcext:value-type="float">
            <text:p>288</text:p>
          </table:table-cell>
          <table:table-cell table:style-name="ce7" office:value-type="float" office:value="0.591117762746074" calcext:value-type="float">
            <text:p>5.9111776E-01</text:p>
          </table:table-cell>
          <table:table-cell table:style-name="ce7" office:value-type="float" office:value="-0.046202942514998" calcext:value-type="float">
            <text:p>-4.620294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2];&quot;) = {&quot;;TEXT([.D192];&quot;0.0000000E+00&quot;);&quot;,&quot;;TEXT([.E192];&quot;0.0000000E+00&quot;);&quot;,&quot;;TEXT([.F192];&quot;0.0000000E+00&quot;);&quot;,&quot;;&quot;lc};&quot;)" office:value-type="string" office:string-value="Point(288) = {5.9111776E-01,-4.6202943E-02,z0,lc};" calcext:value-type="string">
            <text:p>Point(288) = {5.9111776E-01,-4.620294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89" calcext:value-type="float">
            <text:p>289</text:p>
          </table:table-cell>
          <table:table-cell table:style-name="ce7" office:value-type="float" office:value="0.60395584540888" calcext:value-type="float">
            <text:p>6.0395585E-01</text:p>
          </table:table-cell>
          <table:table-cell table:style-name="ce7" office:value-type="float" office:value="-0.0451397548761643" calcext:value-type="float">
            <text:p>-4.5139755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3];&quot;) = {&quot;;TEXT([.D193];&quot;0.0000000E+00&quot;);&quot;,&quot;;TEXT([.E193];&quot;0.0000000E+00&quot;);&quot;,&quot;;TEXT([.F193];&quot;0.0000000E+00&quot;);&quot;,&quot;;&quot;lc};&quot;)" office:value-type="string" office:string-value="Point(289) = {6.0395585E-01,-4.5139755E-02,z0,lc};" calcext:value-type="string">
            <text:p>Point(289) = {6.0395585E-01,-4.513975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0" calcext:value-type="float">
            <text:p>290</text:p>
          </table:table-cell>
          <table:table-cell table:style-name="ce7" office:value-type="float" office:value="0.616722681927953" calcext:value-type="float">
            <text:p>6.1672268E-01</text:p>
          </table:table-cell>
          <table:table-cell table:style-name="ce7" office:value-type="float" office:value="-0.0440545518438032" calcext:value-type="float">
            <text:p>-4.405455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4];&quot;) = {&quot;;TEXT([.D194];&quot;0.0000000E+00&quot;);&quot;,&quot;;TEXT([.E194];&quot;0.0000000E+00&quot;);&quot;,&quot;;TEXT([.F194];&quot;0.0000000E+00&quot;);&quot;,&quot;;&quot;lc};&quot;)" office:value-type="string" office:string-value="Point(290) = {6.1672268E-01,-4.4054552E-02,z0,lc};" calcext:value-type="string">
            <text:p>Point(290) = {6.1672268E-01,-4.405455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1" calcext:value-type="float">
            <text:p>291</text:p>
          </table:table-cell>
          <table:table-cell table:style-name="ce7" office:value-type="float" office:value="0.62940952255126" calcext:value-type="float">
            <text:p>6.2940952E-01</text:p>
          </table:table-cell>
          <table:table-cell table:style-name="ce7" office:value-type="float" office:value="-0.042949277987034" calcext:value-type="float">
            <text:p>-4.294927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5];&quot;) = {&quot;;TEXT([.D195];&quot;0.0000000E+00&quot;);&quot;,&quot;;TEXT([.E195];&quot;0.0000000E+00&quot;);&quot;,&quot;;TEXT([.F195];&quot;0.0000000E+00&quot;);&quot;,&quot;;&quot;lc};&quot;)" office:value-type="string" office:string-value="Point(291) = {6.2940952E-01,-4.2949278E-02,z0,lc};" calcext:value-type="string">
            <text:p>Point(291) = {6.2940952E-01,-4.294927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2" calcext:value-type="float">
            <text:p>292</text:p>
          </table:table-cell>
          <table:table-cell table:style-name="ce7" office:value-type="float" office:value="0.642007672351961" calcext:value-type="float">
            <text:p>6.4200767E-01</text:p>
          </table:table-cell>
          <table:table-cell table:style-name="ce7" office:value-type="float" office:value="-0.0418258555478396" calcext:value-type="float">
            <text:p>-4.182585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6];&quot;) = {&quot;;TEXT([.D196];&quot;0.0000000E+00&quot;);&quot;,&quot;;TEXT([.E196];&quot;0.0000000E+00&quot;);&quot;,&quot;;TEXT([.F196];&quot;0.0000000E+00&quot;);&quot;,&quot;;&quot;lc};&quot;)" office:value-type="string" office:string-value="Point(292) = {6.4200767E-01,-4.1825856E-02,z0,lc};" calcext:value-type="string">
            <text:p>Point(292) = {6.4200767E-01,-4.182585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3" calcext:value-type="float">
            <text:p>293</text:p>
          </table:table-cell>
          <table:table-cell table:style-name="ce7" office:value-type="float" office:value="0.654508497187474" calcext:value-type="float">
            <text:p>6.5450850E-01</text:p>
          </table:table-cell>
          <table:table-cell table:style-name="ce7" office:value-type="float" office:value="-0.0406861838549376" calcext:value-type="float">
            <text:p>-4.0686184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7];&quot;) = {&quot;;TEXT([.D197];&quot;0.0000000E+00&quot;);&quot;,&quot;;TEXT([.E197];&quot;0.0000000E+00&quot;);&quot;,&quot;;TEXT([.F197];&quot;0.0000000E+00&quot;);&quot;,&quot;;&quot;lc};&quot;)" office:value-type="string" office:string-value="Point(293) = {6.5450850E-01,-4.0686184E-02,z0,lc};" calcext:value-type="string">
            <text:p>Point(293) = {6.5450850E-01,-4.0686184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4" calcext:value-type="float">
            <text:p>294</text:p>
          </table:table-cell>
          <table:table-cell table:style-name="ce7" office:value-type="float" office:value="0.666903429616885" calcext:value-type="float">
            <text:p>6.6690343E-01</text:p>
          </table:table-cell>
          <table:table-cell table:style-name="ce7" office:value-type="float" office:value="-0.039532139161004" calcext:value-type="float">
            <text:p>-3.9532139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8];&quot;) = {&quot;;TEXT([.D198];&quot;0.0000000E+00&quot;);&quot;,&quot;;TEXT([.E198];&quot;0.0000000E+00&quot;);&quot;,&quot;;TEXT([.F198];&quot;0.0000000E+00&quot;);&quot;,&quot;;&quot;lc};&quot;)" office:value-type="string" office:string-value="Point(294) = {6.6690343E-01,-3.9532139E-02,z0,lc};" calcext:value-type="string">
            <text:p>Point(294) = {6.6690343E-01,-3.953213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5" calcext:value-type="float">
            <text:p>295</text:p>
          </table:table-cell>
          <table:table-cell table:style-name="ce7" office:value-type="float" office:value="0.67918397477265" calcext:value-type="float">
            <text:p>6.7918397E-01</text:p>
          </table:table-cell>
          <table:table-cell table:style-name="ce7" office:value-type="float" office:value="-0.0383655748669655" calcext:value-type="float">
            <text:p>-3.8365575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199];&quot;) = {&quot;;TEXT([.D199];&quot;0.0000000E+00&quot;);&quot;,&quot;;TEXT([.E199];&quot;0.0000000E+00&quot;);&quot;,&quot;;TEXT([.F199];&quot;0.0000000E+00&quot;);&quot;,&quot;;&quot;lc};&quot;)" office:value-type="string" office:string-value="Point(295) = {6.7918397E-01,-3.8365575E-02,z0,lc};" calcext:value-type="string">
            <text:p>Point(295) = {6.7918397E-01,-3.836557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6" calcext:value-type="float">
            <text:p>296</text:p>
          </table:table-cell>
          <table:table-cell table:style-name="ce7" office:value-type="float" office:value="0.691341716182545" calcext:value-type="float">
            <text:p>6.9134172E-01</text:p>
          </table:table-cell>
          <table:table-cell table:style-name="ce7" office:value-type="float" office:value="-0.0371883220930156" calcext:value-type="float">
            <text:p>-3.7188322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0];&quot;) = {&quot;;TEXT([.D200];&quot;0.0000000E+00&quot;);&quot;,&quot;;TEXT([.E200];&quot;0.0000000E+00&quot;);&quot;,&quot;;TEXT([.F200];&quot;0.0000000E+00&quot;);&quot;,&quot;;&quot;lc};&quot;)" office:value-type="string" office:string-value="Point(296) = {6.9134172E-01,-3.7188322E-02,z0,lc};" calcext:value-type="string">
            <text:p>Point(296) = {6.9134172E-01,-3.7188322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7" calcext:value-type="float">
            <text:p>297</text:p>
          </table:table-cell>
          <table:table-cell table:style-name="ce7" office:value-type="float" office:value="0.7033683215379" calcext:value-type="float">
            <text:p>7.0336832E-01</text:p>
          </table:table-cell>
          <table:table-cell table:style-name="ce7" office:value-type="float" office:value="-0.0360021905525126" calcext:value-type="float">
            <text:p>-3.6002191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1];&quot;) = {&quot;;TEXT([.D201];&quot;0.0000000E+00&quot;);&quot;,&quot;;TEXT([.E201];&quot;0.0000000E+00&quot;);&quot;,&quot;;TEXT([.F201];&quot;0.0000000E+00&quot;);&quot;,&quot;;&quot;lc};&quot;)" office:value-type="string" office:string-value="Point(297) = {7.0336832E-01,-3.6002191E-02,z0,lc};" calcext:value-type="string">
            <text:p>Point(297) = {7.0336832E-01,-3.600219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8" calcext:value-type="float">
            <text:p>298</text:p>
          </table:table-cell>
          <table:table-cell table:style-name="ce7" office:value-type="float" office:value="0.715255548404147" calcext:value-type="float">
            <text:p>7.1525555E-01</text:p>
          </table:table-cell>
          <table:table-cell table:style-name="ce7" office:value-type="float" office:value="-0.0348089696820301" calcext:value-type="float">
            <text:p>-3.4808970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2];&quot;) = {&quot;;TEXT([.D202];&quot;0.0000000E+00&quot;);&quot;,&quot;;TEXT([.E202];&quot;0.0000000E+00&quot;);&quot;,&quot;;TEXT([.F202];&quot;0.0000000E+00&quot;);&quot;,&quot;;&quot;lc};&quot;)" office:value-type="string" office:string-value="Point(298) = {7.1525555E-01,-3.4808970E-02,z0,lc};" calcext:value-type="string">
            <text:p>Point(298) = {7.1525555E-01,-3.480897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299" calcext:value-type="float">
            <text:p>299</text:p>
          </table:table-cell>
          <table:table-cell table:style-name="ce7" office:value-type="float" office:value="0.726995249869773" calcext:value-type="float">
            <text:p>7.2699525E-01</text:p>
          </table:table-cell>
          <table:table-cell table:style-name="ce7" office:value-type="float" office:value="-0.0336104299785611" calcext:value-type="float">
            <text:p>-3.3610430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3];&quot;) = {&quot;;TEXT([.D203];&quot;0.0000000E+00&quot;);&quot;,&quot;;TEXT([.E203];&quot;0.0000000E+00&quot;);&quot;,&quot;;TEXT([.F203];&quot;0.0000000E+00&quot;);&quot;,&quot;;&quot;lc};&quot;)" office:value-type="string" office:string-value="Point(299) = {7.2699525E-01,-3.3610430E-02,z0,lc};" calcext:value-type="string">
            <text:p>Point(299) = {7.2699525E-01,-3.361043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0.738579380129804" calcext:value-type="float">
            <text:p>7.3857938E-01</text:p>
          </table:table-cell>
          <table:table-cell table:style-name="ce7" office:value-type="float" office:value="-0.0324083244932621" calcext:value-type="float">
            <text:p>-3.2408324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4];&quot;) = {&quot;;TEXT([.D204];&quot;0.0000000E+00&quot;);&quot;,&quot;;TEXT([.E204];&quot;0.0000000E+00&quot;);&quot;,&quot;;TEXT([.F204];&quot;0.0000000E+00&quot;);&quot;,&quot;;&quot;lc};&quot;)" office:value-type="string" office:string-value="Point(300) = {7.3857938E-01,-3.2408324E-02,z0,lc};" calcext:value-type="string">
            <text:p>Point(300) = {7.3857938E-01,-3.2408324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1" calcext:value-type="float">
            <text:p>301</text:p>
          </table:table-cell>
          <table:table-cell table:style-name="ce7" office:value-type="float" office:value="0.75" calcext:value-type="float">
            <text:p>7.5000000E-01</text:p>
          </table:table-cell>
          <table:table-cell table:style-name="ce7" office:value-type="float" office:value="-0.0312043904301599" calcext:value-type="float">
            <text:p>-3.1204390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5];&quot;) = {&quot;;TEXT([.D205];&quot;0.0000000E+00&quot;);&quot;,&quot;;TEXT([.E205];&quot;0.0000000E+00&quot;);&quot;,&quot;;TEXT([.F205];&quot;0.0000000E+00&quot;);&quot;,&quot;;&quot;lc};&quot;)" office:value-type="string" office:string-value="Point(301) = {7.5000000E-01,-3.1204390E-02,z0,lc};" calcext:value-type="string">
            <text:p>Point(301) = {7.5000000E-01,-3.120439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2" calcext:value-type="float">
            <text:p>302</text:p>
          </table:table-cell>
          <table:table-cell table:style-name="ce7" office:value-type="float" office:value="0.761249282357974" calcext:value-type="float">
            <text:p>7.6124928E-01</text:p>
          </table:table-cell>
          <table:table-cell table:style-name="ce7" office:value-type="float" office:value="-0.0300003507979432" calcext:value-type="float">
            <text:p>-3.0000351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6];&quot;) = {&quot;;TEXT([.D206];&quot;0.0000000E+00&quot;);&quot;,&quot;;TEXT([.E206];&quot;0.0000000E+00&quot;);&quot;,&quot;;TEXT([.F206];&quot;0.0000000E+00&quot;);&quot;,&quot;;&quot;lc};&quot;)" office:value-type="string" office:string-value="Point(302) = {7.6124928E-01,-3.0000351E-02,z0,lc};" calcext:value-type="string">
            <text:p>Point(302) = {7.6124928E-01,-3.000035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3" calcext:value-type="float">
            <text:p>303</text:p>
          </table:table-cell>
          <table:table-cell table:style-name="ce7" office:value-type="float" office:value="0.772319517507513" calcext:value-type="float">
            <text:p>7.7231952E-01</text:p>
          </table:table-cell>
          <table:table-cell table:style-name="ce7" office:value-type="float" office:value="-0.0287979160633171" calcext:value-type="float">
            <text:p>-2.879791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7];&quot;) = {&quot;;TEXT([.D207];&quot;0.0000000E+00&quot;);&quot;,&quot;;TEXT([.E207];&quot;0.0000000E+00&quot;);&quot;,&quot;;TEXT([.F207];&quot;0.0000000E+00&quot;);&quot;,&quot;;&quot;lc};&quot;)" office:value-type="string" office:string-value="Point(303) = {7.7231952E-01,-2.8797916E-02,z0,lc};" calcext:value-type="string">
            <text:p>Point(303) = {7.7231952E-01,-2.879791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7" office:value-type="float" office:value="0.783203118462417" calcext:value-type="float">
            <text:p>7.8320312E-01</text:p>
          </table:table-cell>
          <table:table-cell table:style-name="ce7" office:value-type="float" office:value="-0.0275987857553968" calcext:value-type="float">
            <text:p>-2.759878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8];&quot;) = {&quot;;TEXT([.D208];&quot;0.0000000E+00&quot;);&quot;,&quot;;TEXT([.E208];&quot;0.0000000E+00&quot;);&quot;,&quot;;TEXT([.F208];&quot;0.0000000E+00&quot;);&quot;,&quot;;&quot;lc};&quot;)" office:value-type="string" office:string-value="Point(304) = {7.8320312E-01,-2.7598786E-02,z0,lc};" calcext:value-type="string">
            <text:p>Point(304) = {7.8320312E-01,-2.759878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5" calcext:value-type="float">
            <text:p>305</text:p>
          </table:table-cell>
          <table:table-cell table:style-name="ce7" office:value-type="float" office:value="0.793892626146237" calcext:value-type="float">
            <text:p>7.9389263E-01</text:p>
          </table:table-cell>
          <table:table-cell table:style-name="ce7" office:value-type="float" office:value="-0.0264046499722451" calcext:value-type="float">
            <text:p>-2.6404650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09];&quot;) = {&quot;;TEXT([.D209];&quot;0.0000000E+00&quot;);&quot;,&quot;;TEXT([.E209];&quot;0.0000000E+00&quot;);&quot;,&quot;;TEXT([.F209];&quot;0.0000000E+00&quot;);&quot;,&quot;;&quot;lc};&quot;)" office:value-type="string" office:string-value="Point(305) = {7.9389263E-01,-2.6404650E-02,z0,lc};" calcext:value-type="string">
            <text:p>Point(305) = {7.9389263E-01,-2.6404650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6" calcext:value-type="float">
            <text:p>306</text:p>
          </table:table-cell>
          <table:table-cell table:style-name="ce7" office:value-type="float" office:value="0.80438071450436" calcext:value-type="float">
            <text:p>8.0438071E-01</text:p>
          </table:table-cell>
          <table:table-cell table:style-name="ce7" office:value-type="float" office:value="-0.025217190742879" calcext:value-type="float">
            <text:p>-2.5217191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0];&quot;) = {&quot;;TEXT([.D210];&quot;0.0000000E+00&quot;);&quot;,&quot;;TEXT([.E210];&quot;0.0000000E+00&quot;);&quot;,&quot;;TEXT([.F210];&quot;0.0000000E+00&quot;);&quot;,&quot;;&quot;lc};&quot;)" office:value-type="string" office:string-value="Point(306) = {8.0438071E-01,-2.5217191E-02,z0,lc};" calcext:value-type="string">
            <text:p>Point(306) = {8.0438071E-01,-2.521719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7" calcext:value-type="float">
            <text:p>307</text:p>
          </table:table-cell>
          <table:table-cell table:style-name="ce7" office:value-type="float" office:value="0.814660195524919" calcext:value-type="float">
            <text:p>8.1466020E-01</text:p>
          </table:table-cell>
          <table:table-cell table:style-name="ce7" office:value-type="float" office:value="-0.0240380832008678" calcext:value-type="float">
            <text:p>-2.403808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1];&quot;) = {&quot;;TEXT([.D211];&quot;0.0000000E+00&quot;);&quot;,&quot;;TEXT([.E211];&quot;0.0000000E+00&quot;);&quot;,&quot;;TEXT([.F211];&quot;0.0000000E+00&quot;);&quot;,&quot;;&quot;lc};&quot;)" office:value-type="string" office:string-value="Point(307) = {8.1466020E-01,-2.4038083E-02,z0,lc};" calcext:value-type="string">
            <text:p>Point(307) = {8.1466020E-01,-2.403808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8" calcext:value-type="float">
            <text:p>308</text:p>
          </table:table-cell>
          <table:table-cell table:style-name="ce7" office:value-type="float" office:value="0.824724024165092" calcext:value-type="float">
            <text:p>8.2472402E-01</text:p>
          </table:table-cell>
          <table:table-cell table:style-name="ce7" office:value-type="float" office:value="-0.0228689965289596" calcext:value-type="float">
            <text:p>-2.2868997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2];&quot;) = {&quot;;TEXT([.D212];&quot;0.0000000E+00&quot;);&quot;,&quot;;TEXT([.E212];&quot;0.0000000E+00&quot;);&quot;,&quot;;TEXT([.F212];&quot;0.0000000E+00&quot;);&quot;,&quot;;&quot;lc};&quot;)" office:value-type="string" office:string-value="Point(308) = {8.2472402E-01,-2.2868997E-02,z0,lc};" calcext:value-type="string">
            <text:p>Point(308) = {8.2472402E-01,-2.286899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09" calcext:value-type="float">
            <text:p>309</text:p>
          </table:table-cell>
          <table:table-cell table:style-name="ce7" office:value-type="float" office:value="0.834565303179429" calcext:value-type="float">
            <text:p>8.3456530E-01</text:p>
          </table:table-cell>
          <table:table-cell table:style-name="ce7" office:value-type="float" office:value="-0.0217115946379781" calcext:value-type="float">
            <text:p>-2.1711595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3];&quot;) = {&quot;;TEXT([.D213];&quot;0.0000000E+00&quot;);&quot;,&quot;;TEXT([.E213];&quot;0.0000000E+00&quot;);&quot;,&quot;;TEXT([.F213];&quot;0.0000000E+00&quot;);&quot;,&quot;;&quot;lc};&quot;)" office:value-type="string" office:string-value="Point(309) = {8.3456530E-01,-2.1711595E-02,z0,lc};" calcext:value-type="string">
            <text:p>Point(309) = {8.3456530E-01,-2.171159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0" calcext:value-type="float">
            <text:p>310</text:p>
          </table:table-cell>
          <table:table-cell table:style-name="ce7" office:value-type="float" office:value="0.844177287846877" calcext:value-type="float">
            <text:p>8.4417729E-01</text:p>
          </table:table-cell>
          <table:table-cell table:style-name="ce7" office:value-type="float" office:value="-0.0205675365474671" calcext:value-type="float">
            <text:p>-2.0567537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4];&quot;) = {&quot;;TEXT([.D214];&quot;0.0000000E+00&quot;);&quot;,&quot;;TEXT([.E214];&quot;0.0000000E+00&quot;);&quot;,&quot;;TEXT([.F214];&quot;0.0000000E+00&quot;);&quot;,&quot;;&quot;lc};&quot;)" office:value-type="string" office:string-value="Point(310) = {8.4417729E-01,-2.0567537E-02,z0,lc};" calcext:value-type="string">
            <text:p>Point(310) = {8.4417729E-01,-2.0567537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1" calcext:value-type="float">
            <text:p>311</text:p>
          </table:table-cell>
          <table:table-cell table:style-name="ce7" office:value-type="float" office:value="0.853553390593274" calcext:value-type="float">
            <text:p>8.5355339E-01</text:p>
          </table:table-cell>
          <table:table-cell table:style-name="ce7" office:value-type="float" office:value="-0.0194384764401692" calcext:value-type="float">
            <text:p>-1.943847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5];&quot;) = {&quot;;TEXT([.D215];&quot;0.0000000E+00&quot;);&quot;,&quot;;TEXT([.E215];&quot;0.0000000E+00&quot;);&quot;,&quot;;TEXT([.F215];&quot;0.0000000E+00&quot;);&quot;,&quot;;&quot;lc};&quot;)" office:value-type="string" office:string-value="Point(311) = {8.5355339E-01,-1.9438476E-02,z0,lc};" calcext:value-type="string">
            <text:p>Point(311) = {8.5355339E-01,-1.943847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2" calcext:value-type="float">
            <text:p>312</text:p>
          </table:table-cell>
          <table:table-cell table:style-name="ce7" office:value-type="float" office:value="0.862687185506144" calcext:value-type="float">
            <text:p>8.6268719E-01</text:p>
          </table:table-cell>
          <table:table-cell table:style-name="ce7" office:value-type="float" office:value="-0.0183260633673618" calcext:value-type="float">
            <text:p>-1.832606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6];&quot;) = {&quot;;TEXT([.D216];&quot;0.0000000E+00&quot;);&quot;,&quot;;TEXT([.E216];&quot;0.0000000E+00&quot;);&quot;,&quot;;TEXT([.F216];&quot;0.0000000E+00&quot;);&quot;,&quot;;&quot;lc};&quot;)" office:value-type="string" office:string-value="Point(312) = {8.6268719E-01,-1.8326063E-02,z0,lc};" calcext:value-type="string">
            <text:p>Point(312) = {8.6268719E-01,-1.832606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3" calcext:value-type="float">
            <text:p>313</text:p>
          </table:table-cell>
          <table:table-cell table:style-name="ce7" office:value-type="float" office:value="0.871572412738697" calcext:value-type="float">
            <text:p>8.7157241E-01</text:p>
          </table:table-cell>
          <table:table-cell table:style-name="ce7" office:value-type="float" office:value="-0.0172319405872572" calcext:value-type="float">
            <text:p>-1.7231941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7];&quot;) = {&quot;;TEXT([.D217];&quot;0.0000000E+00&quot;);&quot;,&quot;;TEXT([.E217];&quot;0.0000000E+00&quot;);&quot;,&quot;;TEXT([.F217];&quot;0.0000000E+00&quot;);&quot;,&quot;;&quot;lc};&quot;)" office:value-type="string" office:string-value="Point(313) = {8.7157241E-01,-1.7231941E-02,z0,lc};" calcext:value-type="string">
            <text:p>Point(313) = {8.7157241E-01,-1.7231941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4" calcext:value-type="float">
            <text:p>314</text:p>
          </table:table-cell>
          <table:table-cell table:style-name="ce7" office:value-type="float" office:value="0.880202982800016" calcext:value-type="float">
            <text:p>8.8020298E-01</text:p>
          </table:table-cell>
          <table:table-cell table:style-name="ce7" office:value-type="float" office:value="-0.0161577445240594" calcext:value-type="float">
            <text:p>-1.6157745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8];&quot;) = {&quot;;TEXT([.D218];&quot;0.0000000E+00&quot;);&quot;,&quot;;TEXT([.E218];&quot;0.0000000E+00&quot;);&quot;,&quot;;TEXT([.F218];&quot;0.0000000E+00&quot;);&quot;,&quot;;&quot;lc};&quot;)" office:value-type="string" office:string-value="Point(314) = {8.8020298E-01,-1.6157745E-02,z0,lc};" calcext:value-type="string">
            <text:p>Point(314) = {8.8020298E-01,-1.615774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5" calcext:value-type="float">
            <text:p>315</text:p>
          </table:table-cell>
          <table:table-cell table:style-name="ce7" office:value-type="float" office:value="0.888572980728486" calcext:value-type="float">
            <text:p>8.8857298E-01</text:p>
          </table:table-cell>
          <table:table-cell table:style-name="ce7" office:value-type="float" office:value="-0.0151051033407724" calcext:value-type="float">
            <text:p>-1.5105103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19];&quot;) = {&quot;;TEXT([.D219];&quot;0.0000000E+00&quot;);&quot;,&quot;;TEXT([.E219];&quot;0.0000000E+00&quot;);&quot;,&quot;;TEXT([.F219];&quot;0.0000000E+00&quot;);&quot;,&quot;;&quot;lc};&quot;)" office:value-type="string" office:string-value="Point(315) = {8.8857298E-01,-1.5105103E-02,z0,lc};" calcext:value-type="string">
            <text:p>Point(315) = {8.8857298E-01,-1.5105103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6" calcext:value-type="float">
            <text:p>316</text:p>
          </table:table-cell>
          <table:table-cell table:style-name="ce7" office:value-type="float" office:value="0.896676670145618" calcext:value-type="float">
            <text:p>8.9667667E-01</text:p>
          </table:table-cell>
          <table:table-cell table:style-name="ce7" office:value-type="float" office:value="-0.014075635124422" calcext:value-type="float">
            <text:p>-1.4075635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0];&quot;) = {&quot;;TEXT([.D220];&quot;0.0000000E+00&quot;);&quot;,&quot;;TEXT([.E220];&quot;0.0000000E+00&quot;);&quot;,&quot;;TEXT([.F220];&quot;0.0000000E+00&quot;);&quot;,&quot;;&quot;lc};&quot;)" office:value-type="string" office:string-value="Point(316) = {8.9667667E-01,-1.4075635E-02,z0,lc};" calcext:value-type="string">
            <text:p>Point(316) = {8.9667667E-01,-1.4075635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7" calcext:value-type="float">
            <text:p>317</text:p>
          </table:table-cell>
          <table:table-cell table:style-name="ce7" office:value-type="float" office:value="0.904508497187474" calcext:value-type="float">
            <text:p>9.0450850E-01</text:p>
          </table:table-cell>
          <table:table-cell table:style-name="ce7" office:value-type="float" office:value="-0.0130709456879079" calcext:value-type="float">
            <text:p>-1.307094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1];&quot;) = {&quot;;TEXT([.D221];&quot;0.0000000E+00&quot;);&quot;,&quot;;TEXT([.E221];&quot;0.0000000E+00&quot;);&quot;,&quot;;TEXT([.F221];&quot;0.0000000E+00&quot;);&quot;,&quot;;&quot;lc};&quot;)" office:value-type="string" office:string-value="Point(317) = {9.0450850E-01,-1.3070946E-02,z0,lc};" calcext:value-type="string">
            <text:p>Point(317) = {9.0450850E-01,-1.307094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8" calcext:value-type="float">
            <text:p>318</text:p>
          </table:table-cell>
          <table:table-cell table:style-name="ce7" office:value-type="float" office:value="0.912063094311008" calcext:value-type="float">
            <text:p>9.1206309E-01</text:p>
          </table:table-cell>
          <table:table-cell table:style-name="ce7" office:value-type="float" office:value="-0.0120926259981795" calcext:value-type="float">
            <text:p>-1.2092626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2];&quot;) = {&quot;;TEXT([.D222];&quot;0.0000000E+00&quot;);&quot;,&quot;;TEXT([.E222];&quot;0.0000000E+00&quot;);&quot;,&quot;;TEXT([.F222];&quot;0.0000000E+00&quot;);&quot;,&quot;;&quot;lc};&quot;)" office:value-type="string" office:string-value="Point(318) = {9.1206309E-01,-1.2092626E-02,z0,lc};" calcext:value-type="string">
            <text:p>Point(318) = {9.1206309E-01,-1.2092626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19" calcext:value-type="float">
            <text:p>319</text:p>
          </table:table-cell>
          <table:table-cell table:style-name="ce7" office:value-type="float" office:value="0.919335283972712" calcext:value-type="float">
            <text:p>9.1933528E-01</text:p>
          </table:table-cell>
          <table:table-cell table:style-name="ce7" office:value-type="float" office:value="-0.0111422492457677" calcext:value-type="float">
            <text:p>-1.1142249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3];&quot;) = {&quot;;TEXT([.D223];&quot;0.0000000E+00&quot;);&quot;,&quot;;TEXT([.E223];&quot;0.0000000E+00&quot;);&quot;,&quot;;TEXT([.F223];&quot;0.0000000E+00&quot;);&quot;,&quot;;&quot;lc};&quot;)" office:value-type="string" office:string-value="Point(319) = {9.1933528E-01,-1.1142249E-02,z0,lc};" calcext:value-type="string">
            <text:p>Point(319) = {9.1933528E-01,-1.1142249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0" calcext:value-type="float">
            <text:p>320</text:p>
          </table:table-cell>
          <table:table-cell table:style-name="ce7" office:value-type="float" office:value="0.926320082177046" calcext:value-type="float">
            <text:p>9.2632008E-01</text:p>
          </table:table-cell>
          <table:table-cell table:style-name="ce7" office:value-type="float" office:value="-0.0102213675758267" calcext:value-type="float">
            <text:p>-1.0221368E-02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4];&quot;) = {&quot;;TEXT([.D224];&quot;0.0000000E+00&quot;);&quot;,&quot;;TEXT([.E224];&quot;0.0000000E+00&quot;);&quot;,&quot;;TEXT([.F224];&quot;0.0000000E+00&quot;);&quot;,&quot;;&quot;lc};&quot;)" office:value-type="string" office:string-value="Point(320) = {9.2632008E-01,-1.0221368E-02,z0,lc};" calcext:value-type="string">
            <text:p>Point(320) = {9.2632008E-01,-1.0221368E-02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1" calcext:value-type="float">
            <text:p>321</text:p>
          </table:table-cell>
          <table:table-cell table:style-name="ce7" office:value-type="float" office:value="0.933012701892219" calcext:value-type="float">
            <text:p>9.3301270E-01</text:p>
          </table:table-cell>
          <table:table-cell table:style-name="ce7" office:value-type="float" office:value="-0.00933150850570876" calcext:value-type="float">
            <text:p>-9.3315085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5];&quot;) = {&quot;;TEXT([.D225];&quot;0.0000000E+00&quot;);&quot;,&quot;;TEXT([.E225];&quot;0.0000000E+00&quot;);&quot;,&quot;;TEXT([.F225];&quot;0.0000000E+00&quot;);&quot;,&quot;;&quot;lc};&quot;)" office:value-type="string" office:string-value="Point(321) = {9.3301270E-01,-9.3315085E-03,z0,lc};" calcext:value-type="string">
            <text:p>Point(321) = {9.3301270E-01,-9.3315085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2" calcext:value-type="float">
            <text:p>322</text:p>
          </table:table-cell>
          <table:table-cell table:style-name="ce7" office:value-type="float" office:value="0.939408556330983" calcext:value-type="float">
            <text:p>9.3940856E-01</text:p>
          </table:table-cell>
          <table:table-cell table:style-name="ce7" office:value-type="float" office:value="-0.00847417105862204" calcext:value-type="float">
            <text:p>-8.4741711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6];&quot;) = {&quot;;TEXT([.D226];&quot;0.0000000E+00&quot;);&quot;,&quot;;TEXT([.E226];&quot;0.0000000E+00&quot;);&quot;,&quot;;TEXT([.F226];&quot;0.0000000E+00&quot;);&quot;,&quot;;&quot;lc};&quot;)" office:value-type="string" office:string-value="Point(322) = {9.3940856E-01,-8.4741711E-03,z0,lc};" calcext:value-type="string">
            <text:p>Point(322) = {9.3940856E-01,-8.4741711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7" office:value-type="float" office:value="0.945503262094184" calcext:value-type="float">
            <text:p>9.4550326E-01</text:p>
          </table:table-cell>
          <table:table-cell table:style-name="ce7" office:value-type="float" office:value="-0.00765082164708146" calcext:value-type="float">
            <text:p>-7.6508216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7];&quot;) = {&quot;;TEXT([.D227];&quot;0.0000000E+00&quot;);&quot;,&quot;;TEXT([.E227];&quot;0.0000000E+00&quot;);&quot;,&quot;;TEXT([.F227];&quot;0.0000000E+00&quot;);&quot;,&quot;;&quot;lc};&quot;)" office:value-type="string" office:string-value="Point(323) = {9.4550326E-01,-7.6508216E-03,z0,lc};" calcext:value-type="string">
            <text:p>Point(323) = {9.4550326E-01,-7.6508216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4" calcext:value-type="float">
            <text:p>324</text:p>
          </table:table-cell>
          <table:table-cell table:style-name="ce7" office:value-type="float" office:value="0.95129264217493" calcext:value-type="float">
            <text:p>9.5129264E-01</text:p>
          </table:table-cell>
          <table:table-cell table:style-name="ce7" office:value-type="float" office:value="-0.00686288974358955" calcext:value-type="float">
            <text:p>-6.8628897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8];&quot;) = {&quot;;TEXT([.D228];&quot;0.0000000E+00&quot;);&quot;,&quot;;TEXT([.E228];&quot;0.0000000E+00&quot;);&quot;,&quot;;TEXT([.F228];&quot;0.0000000E+00&quot;);&quot;,&quot;;&quot;lc};&quot;)" office:value-type="string" office:string-value="Point(324) = {9.5129264E-01,-6.8628897E-03,z0,lc};" calcext:value-type="string">
            <text:p>Point(324) = {9.5129264E-01,-6.8628897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5" calcext:value-type="float">
            <text:p>325</text:p>
          </table:table-cell>
          <table:table-cell table:style-name="ce7" office:value-type="float" office:value="0.956772728821301" calcext:value-type="float">
            <text:p>9.5677273E-01</text:p>
          </table:table-cell>
          <table:table-cell table:style-name="ce7" office:value-type="float" office:value="-0.00611176337923921" calcext:value-type="float">
            <text:p>-6.1117634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29];&quot;) = {&quot;;TEXT([.D229];&quot;0.0000000E+00&quot;);&quot;,&quot;;TEXT([.E229];&quot;0.0000000E+00&quot;);&quot;,&quot;;TEXT([.F229];&quot;0.0000000E+00&quot;);&quot;,&quot;;&quot;lc};&quot;)" office:value-type="string" office:string-value="Point(325) = {9.5677273E-01,-6.1117634E-03,z0,lc};" calcext:value-type="string">
            <text:p>Point(325) = {9.5677273E-01,-6.1117634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6" calcext:value-type="float">
            <text:p>326</text:p>
          </table:table-cell>
          <table:table-cell table:style-name="ce7" office:value-type="float" office:value="0.961939766255643" calcext:value-type="float">
            <text:p>9.6193977E-01</text:p>
          </table:table-cell>
          <table:table-cell table:style-name="ce7" office:value-type="float" office:value="-0.00539878451367922" calcext:value-type="float">
            <text:p>-5.3987845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0];&quot;) = {&quot;;TEXT([.D230];&quot;0.0000000E+00&quot;);&quot;,&quot;;TEXT([.E230];&quot;0.0000000E+00&quot;);&quot;,&quot;;TEXT([.F230];&quot;0.0000000E+00&quot;);&quot;,&quot;;&quot;lc};&quot;)" office:value-type="string" office:string-value="Point(326) = {9.6193977E-01,-5.3987845E-03,z0,lc};" calcext:value-type="string">
            <text:p>Point(326) = {9.6193977E-01,-5.3987845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7" calcext:value-type="float">
            <text:p>327</text:p>
          </table:table-cell>
          <table:table-cell table:style-name="ce7" office:value-type="float" office:value="0.966790213248601" calcext:value-type="float">
            <text:p>9.6679021E-01</text:p>
          </table:table-cell>
          <table:table-cell table:style-name="ce7" office:value-type="float" office:value="-0.00472524432208854" calcext:value-type="float">
            <text:p>-4.7252443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1];&quot;) = {&quot;;TEXT([.D231];&quot;0.0000000E+00&quot;);&quot;,&quot;;TEXT([.E231];&quot;0.0000000E+00&quot;);&quot;,&quot;;TEXT([.F231];&quot;0.0000000E+00&quot;);&quot;,&quot;;&quot;lc};&quot;)" office:value-type="string" office:string-value="Point(327) = {9.6679021E-01,-4.7252443E-03,z0,lc};" calcext:value-type="string">
            <text:p>Point(327) = {9.6679021E-01,-4.7252443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8" calcext:value-type="float">
            <text:p>328</text:p>
          </table:table-cell>
          <table:table-cell table:style-name="ce7" office:value-type="float" office:value="0.971320745546089" calcext:value-type="float">
            <text:p>9.7132075E-01</text:p>
          </table:table-cell>
          <table:table-cell table:style-name="ce7" office:value-type="float" office:value="-0.00409237844644753" calcext:value-type="float">
            <text:p>-4.0923784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2];&quot;) = {&quot;;TEXT([.D232];&quot;0.0000000E+00&quot;);&quot;,&quot;;TEXT([.E232];&quot;0.0000000E+00&quot;);&quot;,&quot;;TEXT([.F232];&quot;0.0000000E+00&quot;);&quot;,&quot;;&quot;lc};&quot;)" office:value-type="string" office:string-value="Point(328) = {9.7132075E-01,-4.0923784E-03,z0,lc};" calcext:value-type="string">
            <text:p>Point(328) = {9.7132075E-01,-4.0923784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29" calcext:value-type="float">
            <text:p>329</text:p>
          </table:table-cell>
          <table:table-cell table:style-name="ce7" office:value-type="float" office:value="0.975528258147577" calcext:value-type="float">
            <text:p>9.7552826E-01</text:p>
          </table:table-cell>
          <table:table-cell table:style-name="ce7" office:value-type="float" office:value="-0.00350136225945033" calcext:value-type="float">
            <text:p>-3.5013623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3];&quot;) = {&quot;;TEXT([.D233];&quot;0.0000000E+00&quot;);&quot;,&quot;;TEXT([.E233];&quot;0.0000000E+00&quot;);&quot;,&quot;;TEXT([.F233];&quot;0.0000000E+00&quot;);&quot;,&quot;;&quot;lc};&quot;)" office:value-type="string" office:string-value="Point(329) = {9.7552826E-01,-3.5013623E-03,z0,lc};" calcext:value-type="string">
            <text:p>Point(329) = {9.7552826E-01,-3.5013623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0" calcext:value-type="float">
            <text:p>330</text:p>
          </table:table-cell>
          <table:table-cell table:style-name="ce7" office:value-type="float" office:value="0.979409867434097" calcext:value-type="float">
            <text:p>9.7940987E-01</text:p>
          </table:table-cell>
          <table:table-cell table:style-name="ce7" office:value-type="float" office:value="-0.00295330618986665" calcext:value-type="float">
            <text:p>-2.9533062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4];&quot;) = {&quot;;TEXT([.D234];&quot;0.0000000E+00&quot;);&quot;,&quot;;TEXT([.E234];&quot;0.0000000E+00&quot;);&quot;,&quot;;TEXT([.F234];&quot;0.0000000E+00&quot;);&quot;,&quot;;&quot;lc};&quot;)" office:value-type="string" office:string-value="Point(330) = {9.7940987E-01,-2.9533062E-03,z0,lc};" calcext:value-type="string">
            <text:p>Point(330) = {9.7940987E-01,-2.953306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1" calcext:value-type="float">
            <text:p>331</text:p>
          </table:table-cell>
          <table:table-cell table:style-name="ce7" office:value-type="float" office:value="0.982962913144534" calcext:value-type="float">
            <text:p>9.8296291E-01</text:p>
          </table:table-cell>
          <table:table-cell table:style-name="ce7" office:value-type="float" office:value="-0.0024492511580229" calcext:value-type="float">
            <text:p>-2.4492512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5];&quot;) = {&quot;;TEXT([.D235];&quot;0.0000000E+00&quot;);&quot;,&quot;;TEXT([.E235];&quot;0.0000000E+00&quot;);&quot;,&quot;;TEXT([.F235];&quot;0.0000000E+00&quot;);&quot;,&quot;;&quot;lc};&quot;)" office:value-type="string" office:string-value="Point(331) = {9.8296291E-01,-2.4492512E-03,z0,lc};" calcext:value-type="string">
            <text:p>Point(331) = {9.8296291E-01,-2.449251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2" calcext:value-type="float">
            <text:p>332</text:p>
          </table:table-cell>
          <table:table-cell table:style-name="ce7" office:value-type="float" office:value="0.986184960198838" calcext:value-type="float">
            <text:p>9.8618496E-01</text:p>
          </table:table-cell>
          <table:table-cell table:style-name="ce7" office:value-type="float" office:value="-0.00199016416934176" calcext:value-type="float">
            <text:p>-1.9901642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6];&quot;) = {&quot;;TEXT([.D236];&quot;0.0000000E+00&quot;);&quot;,&quot;;TEXT([.E236];&quot;0.0000000E+00&quot;);&quot;,&quot;;TEXT([.F236];&quot;0.0000000E+00&quot;);&quot;,&quot;;&quot;lc};&quot;)" office:value-type="string" office:string-value="Point(332) = {9.8618496E-01,-1.9901642E-03,z0,lc};" calcext:value-type="string">
            <text:p>Point(332) = {9.8618496E-01,-1.9901642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3" calcext:value-type="float">
            <text:p>333</text:p>
          </table:table-cell>
          <table:table-cell table:style-name="ce7" office:value-type="float" office:value="0.989073800366903" calcext:value-type="float">
            <text:p>9.8907380E-01</text:p>
          </table:table-cell>
          <table:table-cell table:style-name="ce7" office:value-type="float" office:value="-0.00157693411255947" calcext:value-type="float">
            <text:p>-1.5769341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7];&quot;) = {&quot;;TEXT([.D237];&quot;0.0000000E+00&quot;);&quot;,&quot;;TEXT([.E237];&quot;0.0000000E+00&quot;);&quot;,&quot;;TEXT([.F237];&quot;0.0000000E+00&quot;);&quot;,&quot;;&quot;lc};&quot;)" office:value-type="string" office:string-value="Point(333) = {9.8907380E-01,-1.5769341E-03,z0,lc};" calcext:value-type="string">
            <text:p>Point(333) = {9.8907380E-01,-1.5769341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4" calcext:value-type="float">
            <text:p>334</text:p>
          </table:table-cell>
          <table:table-cell table:style-name="ce7" office:value-type="float" office:value="0.991627453781977" calcext:value-type="float">
            <text:p>9.9162745E-01</text:p>
          </table:table-cell>
          <table:table-cell table:style-name="ce7" office:value-type="float" office:value="-0.00121036780735655" calcext:value-type="float">
            <text:p>-1.2103678E-03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8];&quot;) = {&quot;;TEXT([.D238];&quot;0.0000000E+00&quot;);&quot;,&quot;;TEXT([.E238];&quot;0.0000000E+00&quot;);&quot;,&quot;;TEXT([.F238];&quot;0.0000000E+00&quot;);&quot;,&quot;;&quot;lc};&quot;)" office:value-type="string" office:string-value="Point(334) = {9.9162745E-01,-1.2103678E-03,z0,lc};" calcext:value-type="string">
            <text:p>Point(334) = {9.9162745E-01,-1.2103678E-03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5" calcext:value-type="float">
            <text:p>335</text:p>
          </table:table-cell>
          <table:table-cell table:style-name="ce7" office:value-type="float" office:value="0.993844170297569" calcext:value-type="float">
            <text:p>9.9384417E-01</text:p>
          </table:table-cell>
          <table:table-cell table:style-name="ce7" office:value-type="float" office:value="-0.000891186343702668" calcext:value-type="float">
            <text:p>-8.9118634E-04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39];&quot;) = {&quot;;TEXT([.D239];&quot;0.0000000E+00&quot;);&quot;,&quot;;TEXT([.E239];&quot;0.0000000E+00&quot;);&quot;,&quot;;TEXT([.F239];&quot;0.0000000E+00&quot;);&quot;,&quot;;&quot;lc};&quot;)" office:value-type="string" office:string-value="Point(335) = {9.9384417E-01,-8.9118634E-04,z0,lc};" calcext:value-type="string">
            <text:p>Point(335) = {9.9384417E-01,-8.9118634E-04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6" calcext:value-type="float">
            <text:p>336</text:p>
          </table:table-cell>
          <table:table-cell table:style-name="ce7" office:value-type="float" office:value="0.995722430686905" calcext:value-type="float">
            <text:p>9.9572243E-01</text:p>
          </table:table-cell>
          <table:table-cell table:style-name="ce7" office:value-type="float" office:value="-0.000620021752274463" calcext:value-type="float">
            <text:p>-6.2002175E-04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40];&quot;) = {&quot;;TEXT([.D240];&quot;0.0000000E+00&quot;);&quot;,&quot;;TEXT([.E240];&quot;0.0000000E+00&quot;);&quot;,&quot;;TEXT([.F240];&quot;0.0000000E+00&quot;);&quot;,&quot;;&quot;lc};&quot;)" office:value-type="string" office:string-value="Point(336) = {9.9572243E-01,-6.2002175E-04,z0,lc};" calcext:value-type="string">
            <text:p>Point(336) = {9.9572243E-01,-6.2002175E-04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7" calcext:value-type="float">
            <text:p>337</text:p>
          </table:table-cell>
          <table:table-cell table:style-name="ce7" office:value-type="float" office:value="0.997260947684137" calcext:value-type="float">
            <text:p>9.9726095E-01</text:p>
          </table:table-cell>
          <table:table-cell table:style-name="ce7" office:value-type="float" office:value="-0.000397414041878869" calcext:value-type="float">
            <text:p>-3.9741404E-04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41];&quot;) = {&quot;;TEXT([.D241];&quot;0.0000000E+00&quot;);&quot;,&quot;;TEXT([.E241];&quot;0.0000000E+00&quot;);&quot;,&quot;;TEXT([.F241];&quot;0.0000000E+00&quot;);&quot;,&quot;;&quot;lc};&quot;)" office:value-type="string" office:string-value="Point(337) = {9.9726095E-01,-3.9741404E-04,z0,lc};" calcext:value-type="string">
            <text:p>Point(337) = {9.9726095E-01,-3.9741404E-04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8" calcext:value-type="float">
            <text:p>338</text:p>
          </table:table-cell>
          <table:table-cell table:style-name="ce7" office:value-type="float" office:value="0.998458666866564" calcext:value-type="float">
            <text:p>9.9845867E-01</text:p>
          </table:table-cell>
          <table:table-cell table:style-name="ce7" office:value-type="float" office:value="-0.000223808635957323" calcext:value-type="float">
            <text:p>-2.2380864E-04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42];&quot;) = {&quot;;TEXT([.D242];&quot;0.0000000E+00&quot;);&quot;,&quot;;TEXT([.E242];&quot;0.0000000E+00&quot;);&quot;,&quot;;TEXT([.F242];&quot;0.0000000E+00&quot;);&quot;,&quot;;&quot;lc};&quot;)" office:value-type="string" office:string-value="Point(338) = {9.9845867E-01,-2.2380864E-04,z0,lc};" calcext:value-type="string">
            <text:p>Point(338) = {9.9845867E-01,-2.2380864E-04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39" calcext:value-type="float">
            <text:p>339</text:p>
          </table:table-cell>
          <table:table-cell table:style-name="ce7" office:value-type="float" office:value="0.999314767377287" calcext:value-type="float">
            <text:p>9.9931477E-01</text:p>
          </table:table-cell>
          <table:table-cell table:style-name="ce7" office:value-type="float" office:value="-0.0000995542359963547" calcext:value-type="float">
            <text:p>-9.9554236E-05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43];&quot;) = {&quot;;TEXT([.D243];&quot;0.0000000E+00&quot;);&quot;,&quot;;TEXT([.E243];&quot;0.0000000E+00&quot;);&quot;,&quot;;TEXT([.F243];&quot;0.0000000E+00&quot;);&quot;,&quot;;&quot;lc};&quot;)" office:value-type="string" office:string-value="Point(339) = {9.9931477E-01,-9.9554236E-05,z0,lc};" calcext:value-type="string">
            <text:p>Point(339) = {9.9931477E-01,-9.9554236E-05,z0,lc};</text:p>
          </table:table-cell>
        </table:table-row>
        <table:table-row table:style-name="ro1">
          <table:table-cell table:number-columns-repeated="2"/>
          <table:table-cell table:style-name="ce3" office:value-type="float" office:value="340" calcext:value-type="float">
            <text:p>340</text:p>
          </table:table-cell>
          <table:table-cell table:style-name="ce7" office:value-type="float" office:value="0.999828662487779" calcext:value-type="float">
            <text:p>9.9982866E-01</text:p>
          </table:table-cell>
          <table:table-cell table:style-name="ce7" office:value-type="float" office:value="-0.0000249011350858169" calcext:value-type="float">
            <text:p>-2.4901135E-05</text:p>
          </table:table-cell>
          <table:table-cell table:style-name="ce7" office:value-type="string" calcext:value-type="string">
            <text:p>z0</text:p>
          </table:table-cell>
          <table:table-cell table:style-name="ce3"/>
          <table:table-cell table:style-name="ce3" table:formula="of:=CONCATENATE(&quot;Point(&quot;;[.C244];&quot;) = {&quot;;TEXT([.D244];&quot;0.0000000E+00&quot;);&quot;,&quot;;TEXT([.E244];&quot;0.0000000E+00&quot;);&quot;,&quot;;TEXT([.F244];&quot;0.0000000E+00&quot;);&quot;,&quot;;&quot;lc};&quot;)" office:value-type="string" office:string-value="Point(340) = {9.9982866E-01,-2.4901135E-05,z0,lc};" calcext:value-type="string">
            <text:p>Point(340) = {9.9982866E-01,-2.4901135E-05,z0,lc};</text:p>
          </table:table-cell>
        </table:table-row>
        <table:table-row table:style-name="ro1" table:number-rows-repeated="10483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ACA0012-XZ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4"/>
        <table:table-column table:style-name="co9" table:default-cell-style-name="ce4"/>
        <table:table-column table:style-name="co7" table:default-cell-style-name="ce4"/>
        <table:table-column table:style-name="co1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PointID</text:p>
          </table:table-cell>
          <table:table-cell office:value-type="string" calcext:value-type="string">
            <text:p>CoordinateX</text:p>
          </table:table-cell>
          <table:table-cell office:value-type="string" calcext:value-type="string">
            <text:p>CoordinateY</text:p>
          </table:table-cell>
          <table:table-cell office:value-type="string" calcext:value-type="string">
            <text:p>CoordinateZ</text:p>
          </table:table-cell>
          <table:table-cell/>
          <table:table-cell office:value-type="string" calcext:value-type="string">
            <text:p>GMSH OUTPUT</text:p>
          </table:table-cell>
        </table:table-row>
        <table:table-row table:style-name="ro1">
          <table:table-cell table:number-columns-repeated="2"/>
          <table:table-cell table:style-name="ce3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.0000000E+00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" calcext:value-type="float">
            <text:p>0.0000000E+00</text:p>
          </table:table-cell>
          <table:table-cell table:style-name="ce9"/>
          <table:table-cell table:style-name="ce3" table:formula="of:=CONCATENATE(&quot;Point(&quot;;[.C5];&quot;) = {&quot;;TEXT([.D5];&quot;0.0000000E+00&quot;);&quot;,&quot;;TEXT([.E5];&quot;0.0000000E+00&quot;);&quot;,&quot;;TEXT([.F5];&quot;0.0000000E+00&quot;);&quot;,&quot;;&quot;lc};&quot;)" office:value-type="string" office:string-value="Point(101) = {1.0000000E+00,y0,0.0000000E+00,lc};" calcext:value-type="string">
            <text:p>Point(101) = {1.0000000E+00,y0,0.0000000E+00,lc};</text:p>
          </table:table-cell>
        </table:table-row>
        <table:table-row table:style-name="ro1">
          <table:table-cell table:number-columns-repeated="2"/>
          <table:table-cell table:style-name="ce3" office:value-type="float" office:value="102" calcext:value-type="float">
            <text:p>102</text:p>
          </table:table-cell>
          <table:table-cell table:style-name="ce7" office:value-type="float" office:value="0.999828662487779" calcext:value-type="float">
            <text:p>9.998286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00249011350858169" calcext:value-type="float">
            <text:p>2.4901135E-05</text:p>
          </table:table-cell>
          <table:table-cell table:style-name="ce9"/>
          <table:table-cell table:style-name="ce3" table:formula="of:=CONCATENATE(&quot;Point(&quot;;[.C6];&quot;) = {&quot;;TEXT([.D6];&quot;0.0000000E+00&quot;);&quot;,&quot;;TEXT([.E6];&quot;0.0000000E+00&quot;);&quot;,&quot;;TEXT([.F6];&quot;0.0000000E+00&quot;);&quot;,&quot;;&quot;lc};&quot;)" office:value-type="string" office:string-value="Point(102) = {9.9982866E-01,y0,2.4901135E-05,lc};" calcext:value-type="string">
            <text:p>Point(102) = {9.9982866E-01,y0,2.4901135E-05,lc};</text:p>
          </table:table-cell>
        </table:table-row>
        <table:table-row table:style-name="ro1">
          <table:table-cell table:number-columns-repeated="2"/>
          <table:table-cell table:style-name="ce3" office:value-type="float" office:value="103" calcext:value-type="float">
            <text:p>103</text:p>
          </table:table-cell>
          <table:table-cell table:style-name="ce7" office:value-type="float" office:value="0.999314767377287" calcext:value-type="float">
            <text:p>9.993147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00995542359963547" calcext:value-type="float">
            <text:p>9.9554236E-05</text:p>
          </table:table-cell>
          <table:table-cell table:style-name="ce9"/>
          <table:table-cell table:style-name="ce3" table:formula="of:=CONCATENATE(&quot;Point(&quot;;[.C7];&quot;) = {&quot;;TEXT([.D7];&quot;0.0000000E+00&quot;);&quot;,&quot;;TEXT([.E7];&quot;0.0000000E+00&quot;);&quot;,&quot;;TEXT([.F7];&quot;0.0000000E+00&quot;);&quot;,&quot;;&quot;lc};&quot;)" office:value-type="string" office:string-value="Point(103) = {9.9931477E-01,y0,9.9554236E-05,lc};" calcext:value-type="string">
            <text:p>Point(103) = {9.9931477E-01,y0,9.9554236E-05,lc};</text:p>
          </table:table-cell>
        </table:table-row>
        <table:table-row table:style-name="ro1">
          <table:table-cell table:number-columns-repeated="2"/>
          <table:table-cell table:style-name="ce3" office:value-type="float" office:value="104" calcext:value-type="float">
            <text:p>104</text:p>
          </table:table-cell>
          <table:table-cell table:style-name="ce7" office:value-type="float" office:value="0.998458666866564" calcext:value-type="float">
            <text:p>9.984586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0223808635957323" calcext:value-type="float">
            <text:p>2.2380864E-04</text:p>
          </table:table-cell>
          <table:table-cell table:style-name="ce9"/>
          <table:table-cell table:style-name="ce3" table:formula="of:=CONCATENATE(&quot;Point(&quot;;[.C8];&quot;) = {&quot;;TEXT([.D8];&quot;0.0000000E+00&quot;);&quot;,&quot;;TEXT([.E8];&quot;0.0000000E+00&quot;);&quot;,&quot;;TEXT([.F8];&quot;0.0000000E+00&quot;);&quot;,&quot;;&quot;lc};&quot;)" office:value-type="string" office:string-value="Point(104) = {9.9845867E-01,y0,2.2380864E-04,lc};" calcext:value-type="string">
            <text:p>Point(104) = {9.9845867E-01,y0,2.2380864E-04,lc};</text:p>
          </table:table-cell>
        </table:table-row>
        <table:table-row table:style-name="ro1">
          <table:table-cell table:number-columns-repeated="2"/>
          <table:table-cell table:style-name="ce3" office:value-type="float" office:value="105" calcext:value-type="float">
            <text:p>105</text:p>
          </table:table-cell>
          <table:table-cell table:style-name="ce7" office:value-type="float" office:value="0.997260947684137" calcext:value-type="float">
            <text:p>9.972609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0397414041878869" calcext:value-type="float">
            <text:p>3.9741404E-04</text:p>
          </table:table-cell>
          <table:table-cell table:style-name="ce9"/>
          <table:table-cell table:style-name="ce3" table:formula="of:=CONCATENATE(&quot;Point(&quot;;[.C9];&quot;) = {&quot;;TEXT([.D9];&quot;0.0000000E+00&quot;);&quot;,&quot;;TEXT([.E9];&quot;0.0000000E+00&quot;);&quot;,&quot;;TEXT([.F9];&quot;0.0000000E+00&quot;);&quot;,&quot;;&quot;lc};&quot;)" office:value-type="string" office:string-value="Point(105) = {9.9726095E-01,y0,3.9741404E-04,lc};" calcext:value-type="string">
            <text:p>Point(105) = {9.9726095E-01,y0,3.9741404E-04,lc};</text:p>
          </table:table-cell>
        </table:table-row>
        <table:table-row table:style-name="ro1">
          <table:table-cell table:number-columns-repeated="2"/>
          <table:table-cell table:style-name="ce3" office:value-type="float" office:value="106" calcext:value-type="float">
            <text:p>106</text:p>
          </table:table-cell>
          <table:table-cell table:style-name="ce7" office:value-type="float" office:value="0.995722430686905" calcext:value-type="float">
            <text:p>9.957224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0620021752274463" calcext:value-type="float">
            <text:p>6.2002175E-04</text:p>
          </table:table-cell>
          <table:table-cell table:style-name="ce9"/>
          <table:table-cell table:style-name="ce3" table:formula="of:=CONCATENATE(&quot;Point(&quot;;[.C10];&quot;) = {&quot;;TEXT([.D10];&quot;0.0000000E+00&quot;);&quot;,&quot;;TEXT([.E10];&quot;0.0000000E+00&quot;);&quot;,&quot;;TEXT([.F10];&quot;0.0000000E+00&quot;);&quot;,&quot;;&quot;lc};&quot;)" office:value-type="string" office:string-value="Point(106) = {9.9572243E-01,y0,6.2002175E-04,lc};" calcext:value-type="string">
            <text:p>Point(106) = {9.9572243E-01,y0,6.2002175E-04,lc};</text:p>
          </table:table-cell>
        </table:table-row>
        <table:table-row table:style-name="ro1">
          <table:table-cell table:number-columns-repeated="2"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0.993844170297569" calcext:value-type="float">
            <text:p>9.938441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0891186343702668" calcext:value-type="float">
            <text:p>8.9118634E-04</text:p>
          </table:table-cell>
          <table:table-cell table:style-name="ce9"/>
          <table:table-cell table:style-name="ce3" table:formula="of:=CONCATENATE(&quot;Point(&quot;;[.C11];&quot;) = {&quot;;TEXT([.D11];&quot;0.0000000E+00&quot;);&quot;,&quot;;TEXT([.E11];&quot;0.0000000E+00&quot;);&quot;,&quot;;TEXT([.F11];&quot;0.0000000E+00&quot;);&quot;,&quot;;&quot;lc};&quot;)" office:value-type="string" office:string-value="Point(107) = {9.9384417E-01,y0,8.9118634E-04,lc};" calcext:value-type="string">
            <text:p>Point(107) = {9.9384417E-01,y0,8.9118634E-04,lc};</text:p>
          </table:table-cell>
        </table:table-row>
        <table:table-row table:style-name="ro1">
          <table:table-cell table:number-columns-repeated="2"/>
          <table:table-cell table:style-name="ce3" office:value-type="float" office:value="108" calcext:value-type="float">
            <text:p>108</text:p>
          </table:table-cell>
          <table:table-cell table:style-name="ce7" office:value-type="float" office:value="0.991627453781977" calcext:value-type="float">
            <text:p>9.916274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121036780735655" calcext:value-type="float">
            <text:p>1.2103678E-03</text:p>
          </table:table-cell>
          <table:table-cell table:style-name="ce9"/>
          <table:table-cell table:style-name="ce3" table:formula="of:=CONCATENATE(&quot;Point(&quot;;[.C12];&quot;) = {&quot;;TEXT([.D12];&quot;0.0000000E+00&quot;);&quot;,&quot;;TEXT([.E12];&quot;0.0000000E+00&quot;);&quot;,&quot;;TEXT([.F12];&quot;0.0000000E+00&quot;);&quot;,&quot;;&quot;lc};&quot;)" office:value-type="string" office:string-value="Point(108) = {9.9162745E-01,y0,1.2103678E-03,lc};" calcext:value-type="string">
            <text:p>Point(108) = {9.9162745E-01,y0,1.2103678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09" calcext:value-type="float">
            <text:p>109</text:p>
          </table:table-cell>
          <table:table-cell table:style-name="ce7" office:value-type="float" office:value="0.989073800366903" calcext:value-type="float">
            <text:p>9.890738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157693411255947" calcext:value-type="float">
            <text:p>1.5769341E-03</text:p>
          </table:table-cell>
          <table:table-cell table:style-name="ce9"/>
          <table:table-cell table:style-name="ce3" table:formula="of:=CONCATENATE(&quot;Point(&quot;;[.C13];&quot;) = {&quot;;TEXT([.D13];&quot;0.0000000E+00&quot;);&quot;,&quot;;TEXT([.E13];&quot;0.0000000E+00&quot;);&quot;,&quot;;TEXT([.F13];&quot;0.0000000E+00&quot;);&quot;,&quot;;&quot;lc};&quot;)" office:value-type="string" office:string-value="Point(109) = {9.8907380E-01,y0,1.5769341E-03,lc};" calcext:value-type="string">
            <text:p>Point(109) = {9.8907380E-01,y0,1.5769341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0" calcext:value-type="float">
            <text:p>110</text:p>
          </table:table-cell>
          <table:table-cell table:style-name="ce7" office:value-type="float" office:value="0.986184960198838" calcext:value-type="float">
            <text:p>9.861849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199016416934176" calcext:value-type="float">
            <text:p>1.9901642E-03</text:p>
          </table:table-cell>
          <table:table-cell table:style-name="ce9"/>
          <table:table-cell table:style-name="ce3" table:formula="of:=CONCATENATE(&quot;Point(&quot;;[.C14];&quot;) = {&quot;;TEXT([.D14];&quot;0.0000000E+00&quot;);&quot;,&quot;;TEXT([.E14];&quot;0.0000000E+00&quot;);&quot;,&quot;;TEXT([.F14];&quot;0.0000000E+00&quot;);&quot;,&quot;;&quot;lc};&quot;)" office:value-type="string" office:string-value="Point(110) = {9.8618496E-01,y0,1.9901642E-03,lc};" calcext:value-type="string">
            <text:p>Point(110) = {9.8618496E-01,y0,1.990164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1" calcext:value-type="float">
            <text:p>111</text:p>
          </table:table-cell>
          <table:table-cell table:style-name="ce7" office:value-type="float" office:value="0.982962913144534" calcext:value-type="float">
            <text:p>9.829629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24492511580229" calcext:value-type="float">
            <text:p>2.4492512E-03</text:p>
          </table:table-cell>
          <table:table-cell table:style-name="ce9"/>
          <table:table-cell table:style-name="ce3" table:formula="of:=CONCATENATE(&quot;Point(&quot;;[.C15];&quot;) = {&quot;;TEXT([.D15];&quot;0.0000000E+00&quot;);&quot;,&quot;;TEXT([.E15];&quot;0.0000000E+00&quot;);&quot;,&quot;;TEXT([.F15];&quot;0.0000000E+00&quot;);&quot;,&quot;;&quot;lc};&quot;)" office:value-type="string" office:string-value="Point(111) = {9.8296291E-01,y0,2.4492512E-03,lc};" calcext:value-type="string">
            <text:p>Point(111) = {9.8296291E-01,y0,2.449251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2" calcext:value-type="float">
            <text:p>112</text:p>
          </table:table-cell>
          <table:table-cell table:style-name="ce7" office:value-type="float" office:value="0.979409867434097" calcext:value-type="float">
            <text:p>9.794098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295330618986665" calcext:value-type="float">
            <text:p>2.9533062E-03</text:p>
          </table:table-cell>
          <table:table-cell table:style-name="ce9"/>
          <table:table-cell table:style-name="ce3" table:formula="of:=CONCATENATE(&quot;Point(&quot;;[.C16];&quot;) = {&quot;;TEXT([.D16];&quot;0.0000000E+00&quot;);&quot;,&quot;;TEXT([.E16];&quot;0.0000000E+00&quot;);&quot;,&quot;;TEXT([.F16];&quot;0.0000000E+00&quot;);&quot;,&quot;;&quot;lc};&quot;)" office:value-type="string" office:string-value="Point(112) = {9.7940987E-01,y0,2.9533062E-03,lc};" calcext:value-type="string">
            <text:p>Point(112) = {9.7940987E-01,y0,2.953306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3" calcext:value-type="float">
            <text:p>113</text:p>
          </table:table-cell>
          <table:table-cell table:style-name="ce7" office:value-type="float" office:value="0.975528258147577" calcext:value-type="float">
            <text:p>9.755282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350136225945033" calcext:value-type="float">
            <text:p>3.5013623E-03</text:p>
          </table:table-cell>
          <table:table-cell table:style-name="ce9"/>
          <table:table-cell table:style-name="ce3" table:formula="of:=CONCATENATE(&quot;Point(&quot;;[.C17];&quot;) = {&quot;;TEXT([.D17];&quot;0.0000000E+00&quot;);&quot;,&quot;;TEXT([.E17];&quot;0.0000000E+00&quot;);&quot;,&quot;;TEXT([.F17];&quot;0.0000000E+00&quot;);&quot;,&quot;;&quot;lc};&quot;)" office:value-type="string" office:string-value="Point(113) = {9.7552826E-01,y0,3.5013623E-03,lc};" calcext:value-type="string">
            <text:p>Point(113) = {9.7552826E-01,y0,3.5013623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7" office:value-type="float" office:value="0.971320745546089" calcext:value-type="float">
            <text:p>9.713207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409237844644753" calcext:value-type="float">
            <text:p>4.0923784E-03</text:p>
          </table:table-cell>
          <table:table-cell table:style-name="ce9"/>
          <table:table-cell table:style-name="ce3" table:formula="of:=CONCATENATE(&quot;Point(&quot;;[.C18];&quot;) = {&quot;;TEXT([.D18];&quot;0.0000000E+00&quot;);&quot;,&quot;;TEXT([.E18];&quot;0.0000000E+00&quot;);&quot;,&quot;;TEXT([.F18];&quot;0.0000000E+00&quot;);&quot;,&quot;;&quot;lc};&quot;)" office:value-type="string" office:string-value="Point(114) = {9.7132075E-01,y0,4.0923784E-03,lc};" calcext:value-type="string">
            <text:p>Point(114) = {9.7132075E-01,y0,4.0923784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5" calcext:value-type="float">
            <text:p>115</text:p>
          </table:table-cell>
          <table:table-cell table:style-name="ce7" office:value-type="float" office:value="0.966790213248601" calcext:value-type="float">
            <text:p>9.667902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472524432208854" calcext:value-type="float">
            <text:p>4.7252443E-03</text:p>
          </table:table-cell>
          <table:table-cell table:style-name="ce9"/>
          <table:table-cell table:style-name="ce3" table:formula="of:=CONCATENATE(&quot;Point(&quot;;[.C19];&quot;) = {&quot;;TEXT([.D19];&quot;0.0000000E+00&quot;);&quot;,&quot;;TEXT([.E19];&quot;0.0000000E+00&quot;);&quot;,&quot;;TEXT([.F19];&quot;0.0000000E+00&quot;);&quot;,&quot;;&quot;lc};&quot;)" office:value-type="string" office:string-value="Point(115) = {9.6679021E-01,y0,4.7252443E-03,lc};" calcext:value-type="string">
            <text:p>Point(115) = {9.6679021E-01,y0,4.7252443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6" calcext:value-type="float">
            <text:p>116</text:p>
          </table:table-cell>
          <table:table-cell table:style-name="ce7" office:value-type="float" office:value="0.961939766255643" calcext:value-type="float">
            <text:p>9.619397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539878451367922" calcext:value-type="float">
            <text:p>5.3987845E-03</text:p>
          </table:table-cell>
          <table:table-cell table:style-name="ce9"/>
          <table:table-cell table:style-name="ce3" table:formula="of:=CONCATENATE(&quot;Point(&quot;;[.C20];&quot;) = {&quot;;TEXT([.D20];&quot;0.0000000E+00&quot;);&quot;,&quot;;TEXT([.E20];&quot;0.0000000E+00&quot;);&quot;,&quot;;TEXT([.F20];&quot;0.0000000E+00&quot;);&quot;,&quot;;&quot;lc};&quot;)" office:value-type="string" office:string-value="Point(116) = {9.6193977E-01,y0,5.3987845E-03,lc};" calcext:value-type="string">
            <text:p>Point(116) = {9.6193977E-01,y0,5.3987845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7" calcext:value-type="float">
            <text:p>117</text:p>
          </table:table-cell>
          <table:table-cell table:style-name="ce7" office:value-type="float" office:value="0.956772728821301" calcext:value-type="float">
            <text:p>9.567727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611176337923921" calcext:value-type="float">
            <text:p>6.1117634E-03</text:p>
          </table:table-cell>
          <table:table-cell table:style-name="ce9"/>
          <table:table-cell table:style-name="ce3" table:formula="of:=CONCATENATE(&quot;Point(&quot;;[.C21];&quot;) = {&quot;;TEXT([.D21];&quot;0.0000000E+00&quot;);&quot;,&quot;;TEXT([.E21];&quot;0.0000000E+00&quot;);&quot;,&quot;;TEXT([.F21];&quot;0.0000000E+00&quot;);&quot;,&quot;;&quot;lc};&quot;)" office:value-type="string" office:string-value="Point(117) = {9.5677273E-01,y0,6.1117634E-03,lc};" calcext:value-type="string">
            <text:p>Point(117) = {9.5677273E-01,y0,6.1117634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8" calcext:value-type="float">
            <text:p>118</text:p>
          </table:table-cell>
          <table:table-cell table:style-name="ce7" office:value-type="float" office:value="0.95129264217493" calcext:value-type="float">
            <text:p>9.5129264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686288974358955" calcext:value-type="float">
            <text:p>6.8628897E-03</text:p>
          </table:table-cell>
          <table:table-cell table:style-name="ce9"/>
          <table:table-cell table:style-name="ce3" table:formula="of:=CONCATENATE(&quot;Point(&quot;;[.C22];&quot;) = {&quot;;TEXT([.D22];&quot;0.0000000E+00&quot;);&quot;,&quot;;TEXT([.E22];&quot;0.0000000E+00&quot;);&quot;,&quot;;TEXT([.F22];&quot;0.0000000E+00&quot;);&quot;,&quot;;&quot;lc};&quot;)" office:value-type="string" office:string-value="Point(118) = {9.5129264E-01,y0,6.8628897E-03,lc};" calcext:value-type="string">
            <text:p>Point(118) = {9.5129264E-01,y0,6.8628897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19" calcext:value-type="float">
            <text:p>119</text:p>
          </table:table-cell>
          <table:table-cell table:style-name="ce7" office:value-type="float" office:value="0.945503262094184" calcext:value-type="float">
            <text:p>9.455032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765082164708146" calcext:value-type="float">
            <text:p>7.6508216E-03</text:p>
          </table:table-cell>
          <table:table-cell table:style-name="ce9"/>
          <table:table-cell table:style-name="ce3" table:formula="of:=CONCATENATE(&quot;Point(&quot;;[.C23];&quot;) = {&quot;;TEXT([.D23];&quot;0.0000000E+00&quot;);&quot;,&quot;;TEXT([.E23];&quot;0.0000000E+00&quot;);&quot;,&quot;;TEXT([.F23];&quot;0.0000000E+00&quot;);&quot;,&quot;;&quot;lc};&quot;)" office:value-type="string" office:string-value="Point(119) = {9.4550326E-01,y0,7.6508216E-03,lc};" calcext:value-type="string">
            <text:p>Point(119) = {9.4550326E-01,y0,7.6508216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style-name="ce7" office:value-type="float" office:value="0.939408556330983" calcext:value-type="float">
            <text:p>9.394085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847417105862204" calcext:value-type="float">
            <text:p>8.4741711E-03</text:p>
          </table:table-cell>
          <table:table-cell table:style-name="ce9"/>
          <table:table-cell table:style-name="ce3" table:formula="of:=CONCATENATE(&quot;Point(&quot;;[.C24];&quot;) = {&quot;;TEXT([.D24];&quot;0.0000000E+00&quot;);&quot;,&quot;;TEXT([.E24];&quot;0.0000000E+00&quot;);&quot;,&quot;;TEXT([.F24];&quot;0.0000000E+00&quot;);&quot;,&quot;;&quot;lc};&quot;)" office:value-type="string" office:string-value="Point(120) = {9.3940856E-01,y0,8.4741711E-03,lc};" calcext:value-type="string">
            <text:p>Point(120) = {9.3940856E-01,y0,8.4741711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21" calcext:value-type="float">
            <text:p>121</text:p>
          </table:table-cell>
          <table:table-cell table:style-name="ce7" office:value-type="float" office:value="0.933012701892219" calcext:value-type="float">
            <text:p>9.330127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933150850570876" calcext:value-type="float">
            <text:p>9.3315085E-03</text:p>
          </table:table-cell>
          <table:table-cell table:style-name="ce9"/>
          <table:table-cell table:style-name="ce3" table:formula="of:=CONCATENATE(&quot;Point(&quot;;[.C25];&quot;) = {&quot;;TEXT([.D25];&quot;0.0000000E+00&quot;);&quot;,&quot;;TEXT([.E25];&quot;0.0000000E+00&quot;);&quot;,&quot;;TEXT([.F25];&quot;0.0000000E+00&quot;);&quot;,&quot;;&quot;lc};&quot;)" office:value-type="string" office:string-value="Point(121) = {9.3301270E-01,y0,9.3315085E-03,lc};" calcext:value-type="string">
            <text:p>Point(121) = {9.3301270E-01,y0,9.3315085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122" calcext:value-type="float">
            <text:p>122</text:p>
          </table:table-cell>
          <table:table-cell table:style-name="ce7" office:value-type="float" office:value="0.926320082177046" calcext:value-type="float">
            <text:p>9.263200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02213675758267" calcext:value-type="float">
            <text:p>1.0221368E-02</text:p>
          </table:table-cell>
          <table:table-cell table:style-name="ce9"/>
          <table:table-cell table:style-name="ce3" table:formula="of:=CONCATENATE(&quot;Point(&quot;;[.C26];&quot;) = {&quot;;TEXT([.D26];&quot;0.0000000E+00&quot;);&quot;,&quot;;TEXT([.E26];&quot;0.0000000E+00&quot;);&quot;,&quot;;TEXT([.F26];&quot;0.0000000E+00&quot;);&quot;,&quot;;&quot;lc};&quot;)" office:value-type="string" office:string-value="Point(122) = {9.2632008E-01,y0,1.0221368E-02,lc};" calcext:value-type="string">
            <text:p>Point(122) = {9.2632008E-01,y0,1.022136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23" calcext:value-type="float">
            <text:p>123</text:p>
          </table:table-cell>
          <table:table-cell table:style-name="ce7" office:value-type="float" office:value="0.919335283972712" calcext:value-type="float">
            <text:p>9.193352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11422492457677" calcext:value-type="float">
            <text:p>1.1142249E-02</text:p>
          </table:table-cell>
          <table:table-cell table:style-name="ce9"/>
          <table:table-cell table:style-name="ce3" table:formula="of:=CONCATENATE(&quot;Point(&quot;;[.C27];&quot;) = {&quot;;TEXT([.D27];&quot;0.0000000E+00&quot;);&quot;,&quot;;TEXT([.E27];&quot;0.0000000E+00&quot;);&quot;,&quot;;TEXT([.F27];&quot;0.0000000E+00&quot;);&quot;,&quot;;&quot;lc};&quot;)" office:value-type="string" office:string-value="Point(123) = {9.1933528E-01,y0,1.1142249E-02,lc};" calcext:value-type="string">
            <text:p>Point(123) = {9.1933528E-01,y0,1.114224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24" calcext:value-type="float">
            <text:p>124</text:p>
          </table:table-cell>
          <table:table-cell table:style-name="ce7" office:value-type="float" office:value="0.912063094311008" calcext:value-type="float">
            <text:p>9.120630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20926259981795" calcext:value-type="float">
            <text:p>1.2092626E-02</text:p>
          </table:table-cell>
          <table:table-cell table:style-name="ce9"/>
          <table:table-cell table:style-name="ce3" table:formula="of:=CONCATENATE(&quot;Point(&quot;;[.C28];&quot;) = {&quot;;TEXT([.D28];&quot;0.0000000E+00&quot;);&quot;,&quot;;TEXT([.E28];&quot;0.0000000E+00&quot;);&quot;,&quot;;TEXT([.F28];&quot;0.0000000E+00&quot;);&quot;,&quot;;&quot;lc};&quot;)" office:value-type="string" office:string-value="Point(124) = {9.1206309E-01,y0,1.2092626E-02,lc};" calcext:value-type="string">
            <text:p>Point(124) = {9.1206309E-01,y0,1.209262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0.904508497187474" calcext:value-type="float">
            <text:p>9.045085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30709456879079" calcext:value-type="float">
            <text:p>1.3070946E-02</text:p>
          </table:table-cell>
          <table:table-cell table:style-name="ce9"/>
          <table:table-cell table:style-name="ce3" table:formula="of:=CONCATENATE(&quot;Point(&quot;;[.C29];&quot;) = {&quot;;TEXT([.D29];&quot;0.0000000E+00&quot;);&quot;,&quot;;TEXT([.E29];&quot;0.0000000E+00&quot;);&quot;,&quot;;TEXT([.F29];&quot;0.0000000E+00&quot;);&quot;,&quot;;&quot;lc};&quot;)" office:value-type="string" office:string-value="Point(125) = {9.0450850E-01,y0,1.3070946E-02,lc};" calcext:value-type="string">
            <text:p>Point(125) = {9.0450850E-01,y0,1.307094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26" calcext:value-type="float">
            <text:p>126</text:p>
          </table:table-cell>
          <table:table-cell table:style-name="ce7" office:value-type="float" office:value="0.896676670145618" calcext:value-type="float">
            <text:p>8.966766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4075635124422" calcext:value-type="float">
            <text:p>1.4075635E-02</text:p>
          </table:table-cell>
          <table:table-cell table:style-name="ce9"/>
          <table:table-cell table:style-name="ce3" table:formula="of:=CONCATENATE(&quot;Point(&quot;;[.C30];&quot;) = {&quot;;TEXT([.D30];&quot;0.0000000E+00&quot;);&quot;,&quot;;TEXT([.E30];&quot;0.0000000E+00&quot;);&quot;,&quot;;TEXT([.F30];&quot;0.0000000E+00&quot;);&quot;,&quot;;&quot;lc};&quot;)" office:value-type="string" office:string-value="Point(126) = {8.9667667E-01,y0,1.4075635E-02,lc};" calcext:value-type="string">
            <text:p>Point(126) = {8.9667667E-01,y0,1.407563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27" calcext:value-type="float">
            <text:p>127</text:p>
          </table:table-cell>
          <table:table-cell table:style-name="ce7" office:value-type="float" office:value="0.888572980728486" calcext:value-type="float">
            <text:p>8.885729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51051033407724" calcext:value-type="float">
            <text:p>1.5105103E-02</text:p>
          </table:table-cell>
          <table:table-cell table:style-name="ce9"/>
          <table:table-cell table:style-name="ce3" table:formula="of:=CONCATENATE(&quot;Point(&quot;;[.C31];&quot;) = {&quot;;TEXT([.D31];&quot;0.0000000E+00&quot;);&quot;,&quot;;TEXT([.E31];&quot;0.0000000E+00&quot;);&quot;,&quot;;TEXT([.F31];&quot;0.0000000E+00&quot;);&quot;,&quot;;&quot;lc};&quot;)" office:value-type="string" office:string-value="Point(127) = {8.8857298E-01,y0,1.5105103E-02,lc};" calcext:value-type="string">
            <text:p>Point(127) = {8.8857298E-01,y0,1.510510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0.880202982800016" calcext:value-type="float">
            <text:p>8.802029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61577445240594" calcext:value-type="float">
            <text:p>1.6157745E-02</text:p>
          </table:table-cell>
          <table:table-cell table:style-name="ce9"/>
          <table:table-cell table:style-name="ce3" table:formula="of:=CONCATENATE(&quot;Point(&quot;;[.C32];&quot;) = {&quot;;TEXT([.D32];&quot;0.0000000E+00&quot;);&quot;,&quot;;TEXT([.E32];&quot;0.0000000E+00&quot;);&quot;,&quot;;TEXT([.F32];&quot;0.0000000E+00&quot;);&quot;,&quot;;&quot;lc};&quot;)" office:value-type="string" office:string-value="Point(128) = {8.8020298E-01,y0,1.6157745E-02,lc};" calcext:value-type="string">
            <text:p>Point(128) = {8.8020298E-01,y0,1.615774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29" calcext:value-type="float">
            <text:p>129</text:p>
          </table:table-cell>
          <table:table-cell table:style-name="ce7" office:value-type="float" office:value="0.871572412738697" calcext:value-type="float">
            <text:p>8.715724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72319405872572" calcext:value-type="float">
            <text:p>1.7231941E-02</text:p>
          </table:table-cell>
          <table:table-cell table:style-name="ce9"/>
          <table:table-cell table:style-name="ce3" table:formula="of:=CONCATENATE(&quot;Point(&quot;;[.C33];&quot;) = {&quot;;TEXT([.D33];&quot;0.0000000E+00&quot;);&quot;,&quot;;TEXT([.E33];&quot;0.0000000E+00&quot;);&quot;,&quot;;TEXT([.F33];&quot;0.0000000E+00&quot;);&quot;,&quot;;&quot;lc};&quot;)" office:value-type="string" office:string-value="Point(129) = {8.7157241E-01,y0,1.7231941E-02,lc};" calcext:value-type="string">
            <text:p>Point(129) = {8.7157241E-01,y0,1.723194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0" calcext:value-type="float">
            <text:p>130</text:p>
          </table:table-cell>
          <table:table-cell table:style-name="ce7" office:value-type="float" office:value="0.862687185506144" calcext:value-type="float">
            <text:p>8.626871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83260633673618" calcext:value-type="float">
            <text:p>1.8326063E-02</text:p>
          </table:table-cell>
          <table:table-cell table:style-name="ce9"/>
          <table:table-cell table:style-name="ce3" table:formula="of:=CONCATENATE(&quot;Point(&quot;;[.C34];&quot;) = {&quot;;TEXT([.D34];&quot;0.0000000E+00&quot;);&quot;,&quot;;TEXT([.E34];&quot;0.0000000E+00&quot;);&quot;,&quot;;TEXT([.F34];&quot;0.0000000E+00&quot;);&quot;,&quot;;&quot;lc};&quot;)" office:value-type="string" office:string-value="Point(130) = {8.6268719E-01,y0,1.8326063E-02,lc};" calcext:value-type="string">
            <text:p>Point(130) = {8.6268719E-01,y0,1.832606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1" calcext:value-type="float">
            <text:p>131</text:p>
          </table:table-cell>
          <table:table-cell table:style-name="ce7" office:value-type="float" office:value="0.853553390593274" calcext:value-type="float">
            <text:p>8.535533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94384764401692" calcext:value-type="float">
            <text:p>1.9438476E-02</text:p>
          </table:table-cell>
          <table:table-cell table:style-name="ce9"/>
          <table:table-cell table:style-name="ce3" table:formula="of:=CONCATENATE(&quot;Point(&quot;;[.C35];&quot;) = {&quot;;TEXT([.D35];&quot;0.0000000E+00&quot;);&quot;,&quot;;TEXT([.E35];&quot;0.0000000E+00&quot;);&quot;,&quot;;TEXT([.F35];&quot;0.0000000E+00&quot;);&quot;,&quot;;&quot;lc};&quot;)" office:value-type="string" office:string-value="Point(131) = {8.5355339E-01,y0,1.9438476E-02,lc};" calcext:value-type="string">
            <text:p>Point(131) = {8.5355339E-01,y0,1.943847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2" calcext:value-type="float">
            <text:p>132</text:p>
          </table:table-cell>
          <table:table-cell table:style-name="ce7" office:value-type="float" office:value="0.844177287846877" calcext:value-type="float">
            <text:p>8.441772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05675365474671" calcext:value-type="float">
            <text:p>2.0567537E-02</text:p>
          </table:table-cell>
          <table:table-cell table:style-name="ce9"/>
          <table:table-cell table:style-name="ce3" table:formula="of:=CONCATENATE(&quot;Point(&quot;;[.C36];&quot;) = {&quot;;TEXT([.D36];&quot;0.0000000E+00&quot;);&quot;,&quot;;TEXT([.E36];&quot;0.0000000E+00&quot;);&quot;,&quot;;TEXT([.F36];&quot;0.0000000E+00&quot;);&quot;,&quot;;&quot;lc};&quot;)" office:value-type="string" office:string-value="Point(132) = {8.4417729E-01,y0,2.0567537E-02,lc};" calcext:value-type="string">
            <text:p>Point(132) = {8.4417729E-01,y0,2.056753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3" calcext:value-type="float">
            <text:p>133</text:p>
          </table:table-cell>
          <table:table-cell table:style-name="ce7" office:value-type="float" office:value="0.834565303179429" calcext:value-type="float">
            <text:p>8.345653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17115946379781" calcext:value-type="float">
            <text:p>2.1711595E-02</text:p>
          </table:table-cell>
          <table:table-cell table:style-name="ce9"/>
          <table:table-cell table:style-name="ce3" table:formula="of:=CONCATENATE(&quot;Point(&quot;;[.C37];&quot;) = {&quot;;TEXT([.D37];&quot;0.0000000E+00&quot;);&quot;,&quot;;TEXT([.E37];&quot;0.0000000E+00&quot;);&quot;,&quot;;TEXT([.F37];&quot;0.0000000E+00&quot;);&quot;,&quot;;&quot;lc};&quot;)" office:value-type="string" office:string-value="Point(133) = {8.3456530E-01,y0,2.1711595E-02,lc};" calcext:value-type="string">
            <text:p>Point(133) = {8.3456530E-01,y0,2.171159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4" calcext:value-type="float">
            <text:p>134</text:p>
          </table:table-cell>
          <table:table-cell table:style-name="ce7" office:value-type="float" office:value="0.824724024165092" calcext:value-type="float">
            <text:p>8.247240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28689965289596" calcext:value-type="float">
            <text:p>2.2868997E-02</text:p>
          </table:table-cell>
          <table:table-cell table:style-name="ce9"/>
          <table:table-cell table:style-name="ce3" table:formula="of:=CONCATENATE(&quot;Point(&quot;;[.C38];&quot;) = {&quot;;TEXT([.D38];&quot;0.0000000E+00&quot;);&quot;,&quot;;TEXT([.E38];&quot;0.0000000E+00&quot;);&quot;,&quot;;TEXT([.F38];&quot;0.0000000E+00&quot;);&quot;,&quot;;&quot;lc};&quot;)" office:value-type="string" office:string-value="Point(134) = {8.2472402E-01,y0,2.2868997E-02,lc};" calcext:value-type="string">
            <text:p>Point(134) = {8.2472402E-01,y0,2.286899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5" calcext:value-type="float">
            <text:p>135</text:p>
          </table:table-cell>
          <table:table-cell table:style-name="ce7" office:value-type="float" office:value="0.814660195524919" calcext:value-type="float">
            <text:p>8.146602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40380832008678" calcext:value-type="float">
            <text:p>2.4038083E-02</text:p>
          </table:table-cell>
          <table:table-cell table:style-name="ce9"/>
          <table:table-cell table:style-name="ce3" table:formula="of:=CONCATENATE(&quot;Point(&quot;;[.C39];&quot;) = {&quot;;TEXT([.D39];&quot;0.0000000E+00&quot;);&quot;,&quot;;TEXT([.E39];&quot;0.0000000E+00&quot;);&quot;,&quot;;TEXT([.F39];&quot;0.0000000E+00&quot;);&quot;,&quot;;&quot;lc};&quot;)" office:value-type="string" office:string-value="Point(135) = {8.1466020E-01,y0,2.4038083E-02,lc};" calcext:value-type="string">
            <text:p>Point(135) = {8.1466020E-01,y0,2.403808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6" calcext:value-type="float">
            <text:p>136</text:p>
          </table:table-cell>
          <table:table-cell table:style-name="ce7" office:value-type="float" office:value="0.80438071450436" calcext:value-type="float">
            <text:p>8.043807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5217190742879" calcext:value-type="float">
            <text:p>2.5217191E-02</text:p>
          </table:table-cell>
          <table:table-cell table:style-name="ce9"/>
          <table:table-cell table:style-name="ce3" table:formula="of:=CONCATENATE(&quot;Point(&quot;;[.C40];&quot;) = {&quot;;TEXT([.D40];&quot;0.0000000E+00&quot;);&quot;,&quot;;TEXT([.E40];&quot;0.0000000E+00&quot;);&quot;,&quot;;TEXT([.F40];&quot;0.0000000E+00&quot;);&quot;,&quot;;&quot;lc};&quot;)" office:value-type="string" office:string-value="Point(136) = {8.0438071E-01,y0,2.5217191E-02,lc};" calcext:value-type="string">
            <text:p>Point(136) = {8.0438071E-01,y0,2.521719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7" calcext:value-type="float">
            <text:p>137</text:p>
          </table:table-cell>
          <table:table-cell table:style-name="ce7" office:value-type="float" office:value="0.793892626146237" calcext:value-type="float">
            <text:p>7.938926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64046499722451" calcext:value-type="float">
            <text:p>2.6404650E-02</text:p>
          </table:table-cell>
          <table:table-cell table:style-name="ce9"/>
          <table:table-cell table:style-name="ce3" table:formula="of:=CONCATENATE(&quot;Point(&quot;;[.C41];&quot;) = {&quot;;TEXT([.D41];&quot;0.0000000E+00&quot;);&quot;,&quot;;TEXT([.E41];&quot;0.0000000E+00&quot;);&quot;,&quot;;TEXT([.F41];&quot;0.0000000E+00&quot;);&quot;,&quot;;&quot;lc};&quot;)" office:value-type="string" office:string-value="Point(137) = {7.9389263E-01,y0,2.6404650E-02,lc};" calcext:value-type="string">
            <text:p>Point(137) = {7.9389263E-01,y0,2.640465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8" calcext:value-type="float">
            <text:p>138</text:p>
          </table:table-cell>
          <table:table-cell table:style-name="ce7" office:value-type="float" office:value="0.783203118462417" calcext:value-type="float">
            <text:p>7.832031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75987857553968" calcext:value-type="float">
            <text:p>2.7598786E-02</text:p>
          </table:table-cell>
          <table:table-cell table:style-name="ce9"/>
          <table:table-cell table:style-name="ce3" table:formula="of:=CONCATENATE(&quot;Point(&quot;;[.C42];&quot;) = {&quot;;TEXT([.D42];&quot;0.0000000E+00&quot;);&quot;,&quot;;TEXT([.E42];&quot;0.0000000E+00&quot;);&quot;,&quot;;TEXT([.F42];&quot;0.0000000E+00&quot;);&quot;,&quot;;&quot;lc};&quot;)" office:value-type="string" office:string-value="Point(138) = {7.8320312E-01,y0,2.7598786E-02,lc};" calcext:value-type="string">
            <text:p>Point(138) = {7.8320312E-01,y0,2.759878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39" calcext:value-type="float">
            <text:p>139</text:p>
          </table:table-cell>
          <table:table-cell table:style-name="ce7" office:value-type="float" office:value="0.772319517507513" calcext:value-type="float">
            <text:p>7.723195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87979160633171" calcext:value-type="float">
            <text:p>2.8797916E-02</text:p>
          </table:table-cell>
          <table:table-cell table:style-name="ce9"/>
          <table:table-cell table:style-name="ce3" table:formula="of:=CONCATENATE(&quot;Point(&quot;;[.C43];&quot;) = {&quot;;TEXT([.D43];&quot;0.0000000E+00&quot;);&quot;,&quot;;TEXT([.E43];&quot;0.0000000E+00&quot;);&quot;,&quot;;TEXT([.F43];&quot;0.0000000E+00&quot;);&quot;,&quot;;&quot;lc};&quot;)" office:value-type="string" office:string-value="Point(139) = {7.7231952E-01,y0,2.8797916E-02,lc};" calcext:value-type="string">
            <text:p>Point(139) = {7.7231952E-01,y0,2.879791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0" calcext:value-type="float">
            <text:p>140</text:p>
          </table:table-cell>
          <table:table-cell table:style-name="ce7" office:value-type="float" office:value="0.761249282357974" calcext:value-type="float">
            <text:p>7.612492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00003507979432" calcext:value-type="float">
            <text:p>3.0000351E-02</text:p>
          </table:table-cell>
          <table:table-cell table:style-name="ce9"/>
          <table:table-cell table:style-name="ce3" table:formula="of:=CONCATENATE(&quot;Point(&quot;;[.C44];&quot;) = {&quot;;TEXT([.D44];&quot;0.0000000E+00&quot;);&quot;,&quot;;TEXT([.E44];&quot;0.0000000E+00&quot;);&quot;,&quot;;TEXT([.F44];&quot;0.0000000E+00&quot;);&quot;,&quot;;&quot;lc};&quot;)" office:value-type="string" office:string-value="Point(140) = {7.6124928E-01,y0,3.0000351E-02,lc};" calcext:value-type="string">
            <text:p>Point(140) = {7.6124928E-01,y0,3.000035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1" calcext:value-type="float">
            <text:p>141</text:p>
          </table:table-cell>
          <table:table-cell table:style-name="ce7" office:value-type="float" office:value="0.75" calcext:value-type="float">
            <text:p>7.500000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12043904301599" calcext:value-type="float">
            <text:p>3.1204390E-02</text:p>
          </table:table-cell>
          <table:table-cell table:style-name="ce9"/>
          <table:table-cell table:style-name="ce3" table:formula="of:=CONCATENATE(&quot;Point(&quot;;[.C45];&quot;) = {&quot;;TEXT([.D45];&quot;0.0000000E+00&quot;);&quot;,&quot;;TEXT([.E45];&quot;0.0000000E+00&quot;);&quot;,&quot;;TEXT([.F45];&quot;0.0000000E+00&quot;);&quot;,&quot;;&quot;lc};&quot;)" office:value-type="string" office:string-value="Point(141) = {7.5000000E-01,y0,3.1204390E-02,lc};" calcext:value-type="string">
            <text:p>Point(141) = {7.5000000E-01,y0,3.120439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2" calcext:value-type="float">
            <text:p>142</text:p>
          </table:table-cell>
          <table:table-cell table:style-name="ce7" office:value-type="float" office:value="0.738579380129804" calcext:value-type="float">
            <text:p>7.385793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24083244932621" calcext:value-type="float">
            <text:p>3.2408324E-02</text:p>
          </table:table-cell>
          <table:table-cell table:style-name="ce9"/>
          <table:table-cell table:style-name="ce3" table:formula="of:=CONCATENATE(&quot;Point(&quot;;[.C46];&quot;) = {&quot;;TEXT([.D46];&quot;0.0000000E+00&quot;);&quot;,&quot;;TEXT([.E46];&quot;0.0000000E+00&quot;);&quot;,&quot;;TEXT([.F46];&quot;0.0000000E+00&quot;);&quot;,&quot;;&quot;lc};&quot;)" office:value-type="string" office:string-value="Point(142) = {7.3857938E-01,y0,3.2408324E-02,lc};" calcext:value-type="string">
            <text:p>Point(142) = {7.3857938E-01,y0,3.2408324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3" calcext:value-type="float">
            <text:p>143</text:p>
          </table:table-cell>
          <table:table-cell table:style-name="ce7" office:value-type="float" office:value="0.726995249869773" calcext:value-type="float">
            <text:p>7.269952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36104299785611" calcext:value-type="float">
            <text:p>3.3610430E-02</text:p>
          </table:table-cell>
          <table:table-cell table:style-name="ce9"/>
          <table:table-cell table:style-name="ce3" table:formula="of:=CONCATENATE(&quot;Point(&quot;;[.C47];&quot;) = {&quot;;TEXT([.D47];&quot;0.0000000E+00&quot;);&quot;,&quot;;TEXT([.E47];&quot;0.0000000E+00&quot;);&quot;,&quot;;TEXT([.F47];&quot;0.0000000E+00&quot;);&quot;,&quot;;&quot;lc};&quot;)" office:value-type="string" office:string-value="Point(143) = {7.2699525E-01,y0,3.3610430E-02,lc};" calcext:value-type="string">
            <text:p>Point(143) = {7.2699525E-01,y0,3.361043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0.715255548404147" calcext:value-type="float">
            <text:p>7.152555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48089696820301" calcext:value-type="float">
            <text:p>3.4808970E-02</text:p>
          </table:table-cell>
          <table:table-cell table:style-name="ce9"/>
          <table:table-cell table:style-name="ce3" table:formula="of:=CONCATENATE(&quot;Point(&quot;;[.C48];&quot;) = {&quot;;TEXT([.D48];&quot;0.0000000E+00&quot;);&quot;,&quot;;TEXT([.E48];&quot;0.0000000E+00&quot;);&quot;,&quot;;TEXT([.F48];&quot;0.0000000E+00&quot;);&quot;,&quot;;&quot;lc};&quot;)" office:value-type="string" office:string-value="Point(144) = {7.1525555E-01,y0,3.4808970E-02,lc};" calcext:value-type="string">
            <text:p>Point(144) = {7.1525555E-01,y0,3.480897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5" calcext:value-type="float">
            <text:p>145</text:p>
          </table:table-cell>
          <table:table-cell table:style-name="ce7" office:value-type="float" office:value="0.7033683215379" calcext:value-type="float">
            <text:p>7.033683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60021905525126" calcext:value-type="float">
            <text:p>3.6002191E-02</text:p>
          </table:table-cell>
          <table:table-cell table:style-name="ce9"/>
          <table:table-cell table:style-name="ce3" table:formula="of:=CONCATENATE(&quot;Point(&quot;;[.C49];&quot;) = {&quot;;TEXT([.D49];&quot;0.0000000E+00&quot;);&quot;,&quot;;TEXT([.E49];&quot;0.0000000E+00&quot;);&quot;,&quot;;TEXT([.F49];&quot;0.0000000E+00&quot;);&quot;,&quot;;&quot;lc};&quot;)" office:value-type="string" office:string-value="Point(145) = {7.0336832E-01,y0,3.6002191E-02,lc};" calcext:value-type="string">
            <text:p>Point(145) = {7.0336832E-01,y0,3.600219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6" calcext:value-type="float">
            <text:p>146</text:p>
          </table:table-cell>
          <table:table-cell table:style-name="ce7" office:value-type="float" office:value="0.691341716182545" calcext:value-type="float">
            <text:p>6.913417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71883220930156" calcext:value-type="float">
            <text:p>3.7188322E-02</text:p>
          </table:table-cell>
          <table:table-cell table:style-name="ce9"/>
          <table:table-cell table:style-name="ce3" table:formula="of:=CONCATENATE(&quot;Point(&quot;;[.C50];&quot;) = {&quot;;TEXT([.D50];&quot;0.0000000E+00&quot;);&quot;,&quot;;TEXT([.E50];&quot;0.0000000E+00&quot;);&quot;,&quot;;TEXT([.F50];&quot;0.0000000E+00&quot;);&quot;,&quot;;&quot;lc};&quot;)" office:value-type="string" office:string-value="Point(146) = {6.9134172E-01,y0,3.7188322E-02,lc};" calcext:value-type="string">
            <text:p>Point(146) = {6.9134172E-01,y0,3.718832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0.67918397477265" calcext:value-type="float">
            <text:p>6.791839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83655748669655" calcext:value-type="float">
            <text:p>3.8365575E-02</text:p>
          </table:table-cell>
          <table:table-cell table:style-name="ce9"/>
          <table:table-cell table:style-name="ce3" table:formula="of:=CONCATENATE(&quot;Point(&quot;;[.C51];&quot;) = {&quot;;TEXT([.D51];&quot;0.0000000E+00&quot;);&quot;,&quot;;TEXT([.E51];&quot;0.0000000E+00&quot;);&quot;,&quot;;TEXT([.F51];&quot;0.0000000E+00&quot;);&quot;,&quot;;&quot;lc};&quot;)" office:value-type="string" office:string-value="Point(147) = {6.7918397E-01,y0,3.8365575E-02,lc};" calcext:value-type="string">
            <text:p>Point(147) = {6.7918397E-01,y0,3.836557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8" calcext:value-type="float">
            <text:p>148</text:p>
          </table:table-cell>
          <table:table-cell table:style-name="ce7" office:value-type="float" office:value="0.666903429616885" calcext:value-type="float">
            <text:p>6.669034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9532139161004" calcext:value-type="float">
            <text:p>3.9532139E-02</text:p>
          </table:table-cell>
          <table:table-cell table:style-name="ce9"/>
          <table:table-cell table:style-name="ce3" table:formula="of:=CONCATENATE(&quot;Point(&quot;;[.C52];&quot;) = {&quot;;TEXT([.D52];&quot;0.0000000E+00&quot;);&quot;,&quot;;TEXT([.E52];&quot;0.0000000E+00&quot;);&quot;,&quot;;TEXT([.F52];&quot;0.0000000E+00&quot;);&quot;,&quot;;&quot;lc};&quot;)" office:value-type="string" office:string-value="Point(148) = {6.6690343E-01,y0,3.9532139E-02,lc};" calcext:value-type="string">
            <text:p>Point(148) = {6.6690343E-01,y0,3.953213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49" calcext:value-type="float">
            <text:p>149</text:p>
          </table:table-cell>
          <table:table-cell table:style-name="ce7" office:value-type="float" office:value="0.654508497187474" calcext:value-type="float">
            <text:p>6.545085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06861838549376" calcext:value-type="float">
            <text:p>4.0686184E-02</text:p>
          </table:table-cell>
          <table:table-cell table:style-name="ce9"/>
          <table:table-cell table:style-name="ce3" table:formula="of:=CONCATENATE(&quot;Point(&quot;;[.C53];&quot;) = {&quot;;TEXT([.D53];&quot;0.0000000E+00&quot;);&quot;,&quot;;TEXT([.E53];&quot;0.0000000E+00&quot;);&quot;,&quot;;TEXT([.F53];&quot;0.0000000E+00&quot;);&quot;,&quot;;&quot;lc};&quot;)" office:value-type="string" office:string-value="Point(149) = {6.5450850E-01,y0,4.0686184E-02,lc};" calcext:value-type="string">
            <text:p>Point(149) = {6.5450850E-01,y0,4.0686184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0" calcext:value-type="float">
            <text:p>150</text:p>
          </table:table-cell>
          <table:table-cell table:style-name="ce7" office:value-type="float" office:value="0.642007672351961" calcext:value-type="float">
            <text:p>6.420076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18258555478396" calcext:value-type="float">
            <text:p>4.1825856E-02</text:p>
          </table:table-cell>
          <table:table-cell table:style-name="ce9"/>
          <table:table-cell table:style-name="ce3" table:formula="of:=CONCATENATE(&quot;Point(&quot;;[.C54];&quot;) = {&quot;;TEXT([.D54];&quot;0.0000000E+00&quot;);&quot;,&quot;;TEXT([.E54];&quot;0.0000000E+00&quot;);&quot;,&quot;;TEXT([.F54];&quot;0.0000000E+00&quot;);&quot;,&quot;;&quot;lc};&quot;)" office:value-type="string" office:string-value="Point(150) = {6.4200767E-01,y0,4.1825856E-02,lc};" calcext:value-type="string">
            <text:p>Point(150) = {6.4200767E-01,y0,4.182585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1" calcext:value-type="float">
            <text:p>151</text:p>
          </table:table-cell>
          <table:table-cell table:style-name="ce7" office:value-type="float" office:value="0.62940952255126" calcext:value-type="float">
            <text:p>6.294095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2949277987034" calcext:value-type="float">
            <text:p>4.2949278E-02</text:p>
          </table:table-cell>
          <table:table-cell table:style-name="ce9"/>
          <table:table-cell table:style-name="ce3" table:formula="of:=CONCATENATE(&quot;Point(&quot;;[.C55];&quot;) = {&quot;;TEXT([.D55];&quot;0.0000000E+00&quot;);&quot;,&quot;;TEXT([.E55];&quot;0.0000000E+00&quot;);&quot;,&quot;;TEXT([.F55];&quot;0.0000000E+00&quot;);&quot;,&quot;;&quot;lc};&quot;)" office:value-type="string" office:string-value="Point(151) = {6.2940952E-01,y0,4.2949278E-02,lc};" calcext:value-type="string">
            <text:p>Point(151) = {6.2940952E-01,y0,4.294927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7" office:value-type="float" office:value="0.616722681927953" calcext:value-type="float">
            <text:p>6.167226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40545518438032" calcext:value-type="float">
            <text:p>4.4054552E-02</text:p>
          </table:table-cell>
          <table:table-cell table:style-name="ce9"/>
          <table:table-cell table:style-name="ce3" table:formula="of:=CONCATENATE(&quot;Point(&quot;;[.C56];&quot;) = {&quot;;TEXT([.D56];&quot;0.0000000E+00&quot;);&quot;,&quot;;TEXT([.E56];&quot;0.0000000E+00&quot;);&quot;,&quot;;TEXT([.F56];&quot;0.0000000E+00&quot;);&quot;,&quot;;&quot;lc};&quot;)" office:value-type="string" office:string-value="Point(152) = {6.1672268E-01,y0,4.4054552E-02,lc};" calcext:value-type="string">
            <text:p>Point(152) = {6.1672268E-01,y0,4.405455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3" calcext:value-type="float">
            <text:p>153</text:p>
          </table:table-cell>
          <table:table-cell table:style-name="ce7" office:value-type="float" office:value="0.60395584540888" calcext:value-type="float">
            <text:p>6.039558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51397548761643" calcext:value-type="float">
            <text:p>4.5139755E-02</text:p>
          </table:table-cell>
          <table:table-cell table:style-name="ce9"/>
          <table:table-cell table:style-name="ce3" table:formula="of:=CONCATENATE(&quot;Point(&quot;;[.C57];&quot;) = {&quot;;TEXT([.D57];&quot;0.0000000E+00&quot;);&quot;,&quot;;TEXT([.E57];&quot;0.0000000E+00&quot;);&quot;,&quot;;TEXT([.F57];&quot;0.0000000E+00&quot;);&quot;,&quot;;&quot;lc};&quot;)" office:value-type="string" office:string-value="Point(153) = {6.0395585E-01,y0,4.5139755E-02,lc};" calcext:value-type="string">
            <text:p>Point(153) = {6.0395585E-01,y0,4.513975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4" calcext:value-type="float">
            <text:p>154</text:p>
          </table:table-cell>
          <table:table-cell table:style-name="ce7" office:value-type="float" office:value="0.591117762746074" calcext:value-type="float">
            <text:p>5.911177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6202942514998" calcext:value-type="float">
            <text:p>4.6202943E-02</text:p>
          </table:table-cell>
          <table:table-cell table:style-name="ce9"/>
          <table:table-cell table:style-name="ce3" table:formula="of:=CONCATENATE(&quot;Point(&quot;;[.C58];&quot;) = {&quot;;TEXT([.D58];&quot;0.0000000E+00&quot;);&quot;,&quot;;TEXT([.E58];&quot;0.0000000E+00&quot;);&quot;,&quot;;TEXT([.F58];&quot;0.0000000E+00&quot;);&quot;,&quot;;&quot;lc};&quot;)" office:value-type="string" office:string-value="Point(154) = {5.9111776E-01,y0,4.6202943E-02,lc};" calcext:value-type="string">
            <text:p>Point(154) = {5.9111776E-01,y0,4.620294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5" calcext:value-type="float">
            <text:p>155</text:p>
          </table:table-cell>
          <table:table-cell table:style-name="ce7" office:value-type="float" office:value="0.578217232520115" calcext:value-type="float">
            <text:p>5.782172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72421489052245" calcext:value-type="float">
            <text:p>4.7242149E-02</text:p>
          </table:table-cell>
          <table:table-cell table:style-name="ce9"/>
          <table:table-cell table:style-name="ce3" table:formula="of:=CONCATENATE(&quot;Point(&quot;;[.C59];&quot;) = {&quot;;TEXT([.D59];&quot;0.0000000E+00&quot;);&quot;,&quot;;TEXT([.E59];&quot;0.0000000E+00&quot;);&quot;,&quot;;TEXT([.F59];&quot;0.0000000E+00&quot;);&quot;,&quot;;&quot;lc};&quot;)" office:value-type="string" office:string-value="Point(155) = {5.7821723E-01,y0,4.7242149E-02,lc};" calcext:value-type="string">
            <text:p>Point(155) = {5.7821723E-01,y0,4.724214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0.565263096110026" calcext:value-type="float">
            <text:p>5.652631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82553884286467" calcext:value-type="float">
            <text:p>4.8255388E-02</text:p>
          </table:table-cell>
          <table:table-cell table:style-name="ce9"/>
          <table:table-cell table:style-name="ce3" table:formula="of:=CONCATENATE(&quot;Point(&quot;;[.C60];&quot;) = {&quot;;TEXT([.D60];&quot;0.0000000E+00&quot;);&quot;,&quot;;TEXT([.E60];&quot;0.0000000E+00&quot;);&quot;,&quot;;TEXT([.F60];&quot;0.0000000E+00&quot;);&quot;,&quot;;&quot;lc};&quot;)" office:value-type="string" office:string-value="Point(156) = {5.6526310E-01,y0,4.8255388E-02,lc};" calcext:value-type="string">
            <text:p>Point(156) = {5.6526310E-01,y0,4.825538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7" calcext:value-type="float">
            <text:p>157</text:p>
          </table:table-cell>
          <table:table-cell table:style-name="ce7" office:value-type="float" office:value="0.552264231633827" calcext:value-type="float">
            <text:p>5.522642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92406577295794" calcext:value-type="float">
            <text:p>4.9240658E-02</text:p>
          </table:table-cell>
          <table:table-cell table:style-name="ce9"/>
          <table:table-cell table:style-name="ce3" table:formula="of:=CONCATENATE(&quot;Point(&quot;;[.C61];&quot;) = {&quot;;TEXT([.D61];&quot;0.0000000E+00&quot;);&quot;,&quot;;TEXT([.E61];&quot;0.0000000E+00&quot;);&quot;,&quot;;TEXT([.F61];&quot;0.0000000E+00&quot;);&quot;,&quot;;&quot;lc};&quot;)" office:value-type="string" office:string-value="Point(157) = {5.5226423E-01,y0,4.9240658E-02,lc};" calcext:value-type="string">
            <text:p>Point(157) = {5.5226423E-01,y0,4.924065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8" calcext:value-type="float">
            <text:p>158</text:p>
          </table:table-cell>
          <table:table-cell table:style-name="ce7" office:value-type="float" office:value="0.539229547863922" calcext:value-type="float">
            <text:p>5.392295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01959382585087" calcext:value-type="float">
            <text:p>5.0195938E-02</text:p>
          </table:table-cell>
          <table:table-cell table:style-name="ce9"/>
          <table:table-cell table:style-name="ce3" table:formula="of:=CONCATENATE(&quot;Point(&quot;;[.C62];&quot;) = {&quot;;TEXT([.D62];&quot;0.0000000E+00&quot;);&quot;,&quot;;TEXT([.E62];&quot;0.0000000E+00&quot;);&quot;,&quot;;TEXT([.F62];&quot;0.0000000E+00&quot;);&quot;,&quot;;&quot;lc};&quot;)" office:value-type="string" office:string-value="Point(158) = {5.3922955E-01,y0,5.0195938E-02,lc};" calcext:value-type="string">
            <text:p>Point(158) = {5.3922955E-01,y0,5.019593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59" calcext:value-type="float">
            <text:p>159</text:p>
          </table:table-cell>
          <table:table-cell table:style-name="ce7" office:value-type="float" office:value="0.526167978121472" calcext:value-type="float">
            <text:p>5.261679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11191993428425" calcext:value-type="float">
            <text:p>5.1119199E-02</text:p>
          </table:table-cell>
          <table:table-cell table:style-name="ce9"/>
          <table:table-cell table:style-name="ce3" table:formula="of:=CONCATENATE(&quot;Point(&quot;;[.C63];&quot;) = {&quot;;TEXT([.D63];&quot;0.0000000E+00&quot;);&quot;,&quot;;TEXT([.E63];&quot;0.0000000E+00&quot;);&quot;,&quot;;TEXT([.F63];&quot;0.0000000E+00&quot;);&quot;,&quot;;&quot;lc};&quot;)" office:value-type="string" office:string-value="Point(159) = {5.2616798E-01,y0,5.1119199E-02,lc};" calcext:value-type="string">
            <text:p>Point(159) = {5.2616798E-01,y0,5.111919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0.513088474153937" calcext:value-type="float">
            <text:p>5.130884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20084017873851" calcext:value-type="float">
            <text:p>5.2008402E-02</text:p>
          </table:table-cell>
          <table:table-cell table:style-name="ce9"/>
          <table:table-cell table:style-name="ce3" table:formula="of:=CONCATENATE(&quot;Point(&quot;;[.C64];&quot;) = {&quot;;TEXT([.D64];&quot;0.0000000E+00&quot;);&quot;,&quot;;TEXT([.E64];&quot;0.0000000E+00&quot;);&quot;,&quot;;TEXT([.F64];&quot;0.0000000E+00&quot;);&quot;,&quot;;&quot;lc};&quot;)" office:value-type="string" office:string-value="Point(160) = {5.1308847E-01,y0,5.2008402E-02,lc};" calcext:value-type="string">
            <text:p>Point(160) = {5.1308847E-01,y0,5.200840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1" calcext:value-type="float">
            <text:p>161</text:p>
          </table:table-cell>
          <table:table-cell table:style-name="ce7" office:value-type="float" office:value="0.5" calcext:value-type="float">
            <text:p>5.000000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28615020005716" calcext:value-type="float">
            <text:p>5.2861502E-02</text:p>
          </table:table-cell>
          <table:table-cell table:style-name="ce9"/>
          <table:table-cell table:style-name="ce3" table:formula="of:=CONCATENATE(&quot;Point(&quot;;[.C65];&quot;) = {&quot;;TEXT([.D65];&quot;0.0000000E+00&quot;);&quot;,&quot;;TEXT([.E65];&quot;0.0000000E+00&quot;);&quot;,&quot;;TEXT([.F65];&quot;0.0000000E+00&quot;);&quot;,&quot;;&quot;lc};&quot;)" office:value-type="string" office:string-value="Point(161) = {5.0000000E-01,y0,5.2861502E-02,lc};" calcext:value-type="string">
            <text:p>Point(161) = {5.0000000E-01,y0,5.286150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2" calcext:value-type="float">
            <text:p>162</text:p>
          </table:table-cell>
          <table:table-cell table:style-name="ce7" office:value-type="float" office:value="0.486911525846063" calcext:value-type="float">
            <text:p>4.869115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36764566357969" calcext:value-type="float">
            <text:p>5.3676457E-02</text:p>
          </table:table-cell>
          <table:table-cell table:style-name="ce9"/>
          <table:table-cell table:style-name="ce3" table:formula="of:=CONCATENATE(&quot;Point(&quot;;[.C66];&quot;) = {&quot;;TEXT([.D66];&quot;0.0000000E+00&quot;);&quot;,&quot;;TEXT([.E66];&quot;0.0000000E+00&quot;);&quot;,&quot;;TEXT([.F66];&quot;0.0000000E+00&quot;);&quot;,&quot;;&quot;lc};&quot;)" office:value-type="string" office:string-value="Point(162) = {4.8691153E-01,y0,5.3676457E-02,lc};" calcext:value-type="string">
            <text:p>Point(162) = {4.8691153E-01,y0,5.367645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0.473832021878528" calcext:value-type="float">
            <text:p>4.738320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44512277304519" calcext:value-type="float">
            <text:p>5.4451228E-02</text:p>
          </table:table-cell>
          <table:table-cell table:style-name="ce9"/>
          <table:table-cell table:style-name="ce3" table:formula="of:=CONCATENATE(&quot;Point(&quot;;[.C67];&quot;) = {&quot;;TEXT([.D67];&quot;0.0000000E+00&quot;);&quot;,&quot;;TEXT([.E67];&quot;0.0000000E+00&quot;);&quot;,&quot;;TEXT([.F67];&quot;0.0000000E+00&quot;);&quot;,&quot;;&quot;lc};&quot;)" office:value-type="string" office:string-value="Point(163) = {4.7383202E-01,y0,5.4451228E-02,lc};" calcext:value-type="string">
            <text:p>Point(163) = {4.7383202E-01,y0,5.445122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0.460770452136078" calcext:value-type="float">
            <text:p>4.607704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51837883186037" calcext:value-type="float">
            <text:p>5.5183788E-02</text:p>
          </table:table-cell>
          <table:table-cell table:style-name="ce9"/>
          <table:table-cell table:style-name="ce3" table:formula="of:=CONCATENATE(&quot;Point(&quot;;[.C68];&quot;) = {&quot;;TEXT([.D68];&quot;0.0000000E+00&quot;);&quot;,&quot;;TEXT([.E68];&quot;0.0000000E+00&quot;);&quot;,&quot;;TEXT([.F68];&quot;0.0000000E+00&quot;);&quot;,&quot;;&quot;lc};&quot;)" office:value-type="string" office:string-value="Point(164) = {4.6077045E-01,y0,5.5183788E-02,lc};" calcext:value-type="string">
            <text:p>Point(164) = {4.6077045E-01,y0,5.518378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5" calcext:value-type="float">
            <text:p>165</text:p>
          </table:table-cell>
          <table:table-cell table:style-name="ce7" office:value-type="float" office:value="0.447735768366173" calcext:value-type="float">
            <text:p>4.477357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58721284867123" calcext:value-type="float">
            <text:p>5.5872128E-02</text:p>
          </table:table-cell>
          <table:table-cell table:style-name="ce9"/>
          <table:table-cell table:style-name="ce3" table:formula="of:=CONCATENATE(&quot;Point(&quot;;[.C69];&quot;) = {&quot;;TEXT([.D69];&quot;0.0000000E+00&quot;);&quot;,&quot;;TEXT([.E69];&quot;0.0000000E+00&quot;);&quot;,&quot;;TEXT([.F69];&quot;0.0000000E+00&quot;);&quot;,&quot;;&quot;lc};&quot;)" office:value-type="string" office:string-value="Point(165) = {4.4773577E-01,y0,5.5872128E-02,lc};" calcext:value-type="string">
            <text:p>Point(165) = {4.4773577E-01,y0,5.587212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0.434736903889974" calcext:value-type="float">
            <text:p>4.347369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65142618354297" calcext:value-type="float">
            <text:p>5.6514262E-02</text:p>
          </table:table-cell>
          <table:table-cell table:style-name="ce9"/>
          <table:table-cell table:style-name="ce3" table:formula="of:=CONCATENATE(&quot;Point(&quot;;[.C70];&quot;) = {&quot;;TEXT([.D70];&quot;0.0000000E+00&quot;);&quot;,&quot;;TEXT([.E70];&quot;0.0000000E+00&quot;);&quot;,&quot;;TEXT([.F70];&quot;0.0000000E+00&quot;);&quot;,&quot;;&quot;lc};&quot;)" office:value-type="string" office:string-value="Point(166) = {4.3473690E-01,y0,5.6514262E-02,lc};" calcext:value-type="string">
            <text:p>Point(166) = {4.3473690E-01,y0,5.651426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7" calcext:value-type="float">
            <text:p>167</text:p>
          </table:table-cell>
          <table:table-cell table:style-name="ce7" office:value-type="float" office:value="0.421782767479885" calcext:value-type="float">
            <text:p>4.217827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71082323044601" calcext:value-type="float">
            <text:p>5.7108232E-02</text:p>
          </table:table-cell>
          <table:table-cell table:style-name="ce9"/>
          <table:table-cell table:style-name="ce3" table:formula="of:=CONCATENATE(&quot;Point(&quot;;[.C71];&quot;) = {&quot;;TEXT([.D71];&quot;0.0000000E+00&quot;);&quot;,&quot;;TEXT([.E71];&quot;0.0000000E+00&quot;);&quot;,&quot;;TEXT([.F71];&quot;0.0000000E+00&quot;);&quot;,&quot;;&quot;lc};&quot;)" office:value-type="string" office:string-value="Point(167) = {4.2178277E-01,y0,5.7108232E-02,lc};" calcext:value-type="string">
            <text:p>Point(167) = {4.2178277E-01,y0,5.710823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8" calcext:value-type="float">
            <text:p>168</text:p>
          </table:table-cell>
          <table:table-cell table:style-name="ce7" office:value-type="float" office:value="0.408882237253926" calcext:value-type="float">
            <text:p>4.0888224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76521213117386" calcext:value-type="float">
            <text:p>5.7652121E-02</text:p>
          </table:table-cell>
          <table:table-cell table:style-name="ce9"/>
          <table:table-cell table:style-name="ce3" table:formula="of:=CONCATENATE(&quot;Point(&quot;;[.C72];&quot;) = {&quot;;TEXT([.D72];&quot;0.0000000E+00&quot;);&quot;,&quot;;TEXT([.E72];&quot;0.0000000E+00&quot;);&quot;,&quot;;TEXT([.F72];&quot;0.0000000E+00&quot;);&quot;,&quot;;&quot;lc};&quot;)" office:value-type="string" office:string-value="Point(168) = {4.0888224E-01,y0,5.7652121E-02,lc};" calcext:value-type="string">
            <text:p>Point(168) = {4.0888224E-01,y0,5.765212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69" calcext:value-type="float">
            <text:p>169</text:p>
          </table:table-cell>
          <table:table-cell table:style-name="ce7" office:value-type="float" office:value="0.39604415459112" calcext:value-type="float">
            <text:p>3.960441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81440551528807" calcext:value-type="float">
            <text:p>5.8144055E-02</text:p>
          </table:table-cell>
          <table:table-cell table:style-name="ce9"/>
          <table:table-cell table:style-name="ce3" table:formula="of:=CONCATENATE(&quot;Point(&quot;;[.C73];&quot;) = {&quot;;TEXT([.D73];&quot;0.0000000E+00&quot;);&quot;,&quot;;TEXT([.E73];&quot;0.0000000E+00&quot;);&quot;,&quot;;TEXT([.F73];&quot;0.0000000E+00&quot;);&quot;,&quot;;&quot;lc};&quot;)" office:value-type="string" office:string-value="Point(169) = {3.9604415E-01,y0,5.8144055E-02,lc};" calcext:value-type="string">
            <text:p>Point(169) = {3.9604415E-01,y0,5.814405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0" calcext:value-type="float">
            <text:p>170</text:p>
          </table:table-cell>
          <table:table-cell table:style-name="ce7" office:value-type="float" office:value="0.383277318072047" calcext:value-type="float">
            <text:p>3.832773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85822126020352" calcext:value-type="float">
            <text:p>5.8582213E-02</text:p>
          </table:table-cell>
          <table:table-cell table:style-name="ce9"/>
          <table:table-cell table:style-name="ce3" table:formula="of:=CONCATENATE(&quot;Point(&quot;;[.C74];&quot;) = {&quot;;TEXT([.D74];&quot;0.0000000E+00&quot;);&quot;,&quot;;TEXT([.E74];&quot;0.0000000E+00&quot;);&quot;,&quot;;TEXT([.F74];&quot;0.0000000E+00&quot;);&quot;,&quot;;&quot;lc};&quot;)" office:value-type="string" office:string-value="Point(170) = {3.8327732E-01,y0,5.8582213E-02,lc};" calcext:value-type="string">
            <text:p>Point(170) = {3.8327732E-01,y0,5.858221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7" office:value-type="float" office:value="0.37059047744874" calcext:value-type="float">
            <text:p>3.705904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89648326509882" calcext:value-type="float">
            <text:p>5.8964833E-02</text:p>
          </table:table-cell>
          <table:table-cell table:style-name="ce9"/>
          <table:table-cell table:style-name="ce3" table:formula="of:=CONCATENATE(&quot;Point(&quot;;[.C75];&quot;) = {&quot;;TEXT([.D75];&quot;0.0000000E+00&quot;);&quot;,&quot;;TEXT([.E75];&quot;0.0000000E+00&quot;);&quot;,&quot;;TEXT([.F75];&quot;0.0000000E+00&quot;);&quot;,&quot;;&quot;lc};&quot;)" office:value-type="string" office:string-value="Point(171) = {3.7059048E-01,y0,5.8964833E-02,lc};" calcext:value-type="string">
            <text:p>Point(171) = {3.7059048E-01,y0,5.896483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0.357992327648039" calcext:value-type="float">
            <text:p>3.579923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2902223196843" calcext:value-type="float">
            <text:p>5.9290222E-02</text:p>
          </table:table-cell>
          <table:table-cell table:style-name="ce9"/>
          <table:table-cell table:style-name="ce3" table:formula="of:=CONCATENATE(&quot;Point(&quot;;[.C76];&quot;) = {&quot;;TEXT([.D76];&quot;0.0000000E+00&quot;);&quot;,&quot;;TEXT([.E76];&quot;0.0000000E+00&quot;);&quot;,&quot;;TEXT([.F76];&quot;0.0000000E+00&quot;);&quot;,&quot;;&quot;lc};&quot;)" office:value-type="string" office:string-value="Point(172) = {3.5799233E-01,y0,5.9290222E-02,lc};" calcext:value-type="string">
            <text:p>Point(172) = {3.5799233E-01,y0,5.929022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3" calcext:value-type="float">
            <text:p>173</text:p>
          </table:table-cell>
          <table:table-cell table:style-name="ce7" office:value-type="float" office:value="0.345491502812526" calcext:value-type="float">
            <text:p>3.454915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556764468292" calcext:value-type="float">
            <text:p>5.9556764E-02</text:p>
          </table:table-cell>
          <table:table-cell table:style-name="ce9"/>
          <table:table-cell table:style-name="ce3" table:formula="of:=CONCATENATE(&quot;Point(&quot;;[.C77];&quot;) = {&quot;;TEXT([.D77];&quot;0.0000000E+00&quot;);&quot;,&quot;;TEXT([.E77];&quot;0.0000000E+00&quot;);&quot;,&quot;;TEXT([.F77];&quot;0.0000000E+00&quot;);&quot;,&quot;;&quot;lc};&quot;)" office:value-type="string" office:string-value="Point(173) = {3.4549150E-01,y0,5.9556764E-02,lc};" calcext:value-type="string">
            <text:p>Point(173) = {3.4549150E-01,y0,5.9556764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4" calcext:value-type="float">
            <text:p>174</text:p>
          </table:table-cell>
          <table:table-cell table:style-name="ce7" office:value-type="float" office:value="0.333096570383115" calcext:value-type="float">
            <text:p>3.330965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7629255385877" calcext:value-type="float">
            <text:p>5.9762926E-02</text:p>
          </table:table-cell>
          <table:table-cell table:style-name="ce9"/>
          <table:table-cell table:style-name="ce3" table:formula="of:=CONCATENATE(&quot;Point(&quot;;[.C78];&quot;) = {&quot;;TEXT([.D78];&quot;0.0000000E+00&quot;);&quot;,&quot;;TEXT([.E78];&quot;0.0000000E+00&quot;);&quot;,&quot;;TEXT([.F78];&quot;0.0000000E+00&quot;);&quot;,&quot;;&quot;lc};&quot;)" office:value-type="string" office:string-value="Point(174) = {3.3309657E-01,y0,5.9762926E-02,lc};" calcext:value-type="string">
            <text:p>Point(174) = {3.3309657E-01,y0,5.976292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5" calcext:value-type="float">
            <text:p>175</text:p>
          </table:table-cell>
          <table:table-cell table:style-name="ce7" office:value-type="float" office:value="0.32081602522735" calcext:value-type="float">
            <text:p>3.208160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9072631508117" calcext:value-type="float">
            <text:p>5.9907263E-02</text:p>
          </table:table-cell>
          <table:table-cell table:style-name="ce9"/>
          <table:table-cell table:style-name="ce3" table:formula="of:=CONCATENATE(&quot;Point(&quot;;[.C79];&quot;) = {&quot;;TEXT([.D79];&quot;0.0000000E+00&quot;);&quot;,&quot;;TEXT([.E79];&quot;0.0000000E+00&quot;);&quot;,&quot;;TEXT([.F79];&quot;0.0000000E+00&quot;);&quot;,&quot;;&quot;lc};&quot;)" office:value-type="string" office:string-value="Point(175) = {3.2081603E-01,y0,5.9907263E-02,lc};" calcext:value-type="string">
            <text:p>Point(175) = {3.2081603E-01,y0,5.990726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6" calcext:value-type="float">
            <text:p>176</text:p>
          </table:table-cell>
          <table:table-cell table:style-name="ce7" office:value-type="float" office:value="0.308658283817455" calcext:value-type="float">
            <text:p>3.086582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988433481268" calcext:value-type="float">
            <text:p>5.9988433E-02</text:p>
          </table:table-cell>
          <table:table-cell table:style-name="ce9"/>
          <table:table-cell table:style-name="ce3" table:formula="of:=CONCATENATE(&quot;Point(&quot;;[.C80];&quot;) = {&quot;;TEXT([.D80];&quot;0.0000000E+00&quot;);&quot;,&quot;;TEXT([.E80];&quot;0.0000000E+00&quot;);&quot;,&quot;;TEXT([.F80];&quot;0.0000000E+00&quot;);&quot;,&quot;;&quot;lc};&quot;)" office:value-type="string" office:string-value="Point(176) = {3.0865828E-01,y0,5.9988433E-02,lc};" calcext:value-type="string">
            <text:p>Point(176) = {3.0865828E-01,y0,5.998843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7" calcext:value-type="float">
            <text:p>177</text:p>
          </table:table-cell>
          <table:table-cell table:style-name="ce7" office:value-type="float" office:value="0.2966316784621" calcext:value-type="float">
            <text:p>2.966316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60005198345846" calcext:value-type="float">
            <text:p>6.0005198E-02</text:p>
          </table:table-cell>
          <table:table-cell table:style-name="ce9"/>
          <table:table-cell table:style-name="ce3" table:formula="of:=CONCATENATE(&quot;Point(&quot;;[.C81];&quot;) = {&quot;;TEXT([.D81];&quot;0.0000000E+00&quot;);&quot;,&quot;;TEXT([.E81];&quot;0.0000000E+00&quot;);&quot;,&quot;;TEXT([.F81];&quot;0.0000000E+00&quot;);&quot;,&quot;;&quot;lc};&quot;)" office:value-type="string" office:string-value="Point(177) = {2.9663168E-01,y0,6.0005198E-02,lc};" calcext:value-type="string">
            <text:p>Point(177) = {2.9663168E-01,y0,6.000519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8" calcext:value-type="float">
            <text:p>178</text:p>
          </table:table-cell>
          <table:table-cell table:style-name="ce7" office:value-type="float" office:value="0.284744451595852" calcext:value-type="float">
            <text:p>2.847444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9564319153178" calcext:value-type="float">
            <text:p>5.9956432E-02</text:p>
          </table:table-cell>
          <table:table-cell table:style-name="ce9"/>
          <table:table-cell table:style-name="ce3" table:formula="of:=CONCATENATE(&quot;Point(&quot;;[.C82];&quot;) = {&quot;;TEXT([.D82];&quot;0.0000000E+00&quot;);&quot;,&quot;;TEXT([.E82];&quot;0.0000000E+00&quot;);&quot;,&quot;;TEXT([.F82];&quot;0.0000000E+00&quot;);&quot;,&quot;;&quot;lc};&quot;)" office:value-type="string" office:string-value="Point(178) = {2.8474445E-01,y0,5.9956432E-02,lc};" calcext:value-type="string">
            <text:p>Point(178) = {2.8474445E-01,y0,5.995643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79" calcext:value-type="float">
            <text:p>179</text:p>
          </table:table-cell>
          <table:table-cell table:style-name="ce7" office:value-type="float" office:value="0.273004750130227" calcext:value-type="float">
            <text:p>2.730047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8411269897428" calcext:value-type="float">
            <text:p>5.9841127E-02</text:p>
          </table:table-cell>
          <table:table-cell table:style-name="ce9"/>
          <table:table-cell table:style-name="ce3" table:formula="of:=CONCATENATE(&quot;Point(&quot;;[.C83];&quot;) = {&quot;;TEXT([.D83];&quot;0.0000000E+00&quot;);&quot;,&quot;;TEXT([.E83];&quot;0.0000000E+00&quot;);&quot;,&quot;;TEXT([.F83];&quot;0.0000000E+00&quot;);&quot;,&quot;;&quot;lc};&quot;)" office:value-type="string" office:string-value="Point(179) = {2.7300475E-01,y0,5.9841127E-02,lc};" calcext:value-type="string">
            <text:p>Point(179) = {2.7300475E-01,y0,5.984112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0.261420619870196" calcext:value-type="float">
            <text:p>2.614206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6584007615625" calcext:value-type="float">
            <text:p>5.9658401E-02</text:p>
          </table:table-cell>
          <table:table-cell table:style-name="ce9"/>
          <table:table-cell table:style-name="ce3" table:formula="of:=CONCATENATE(&quot;Point(&quot;;[.C84];&quot;) = {&quot;;TEXT([.D84];&quot;0.0000000E+00&quot;);&quot;,&quot;;TEXT([.E84];&quot;0.0000000E+00&quot;);&quot;,&quot;;TEXT([.F84];&quot;0.0000000E+00&quot;);&quot;,&quot;;&quot;lc};&quot;)" office:value-type="string" office:string-value="Point(180) = {2.6142062E-01,y0,5.9658401E-02,lc};" calcext:value-type="string">
            <text:p>Point(180) = {2.6142062E-01,y0,5.965840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1" calcext:value-type="float">
            <text:p>181</text:p>
          </table:table-cell>
          <table:table-cell table:style-name="ce7" office:value-type="float" office:value="0.25" calcext:value-type="float">
            <text:p>2.500000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4075" calcext:value-type="float">
            <text:p>5.9407500E-02</text:p>
          </table:table-cell>
          <table:table-cell table:style-name="ce9"/>
          <table:table-cell table:style-name="ce3" table:formula="of:=CONCATENATE(&quot;Point(&quot;;[.C85];&quot;) = {&quot;;TEXT([.D85];&quot;0.0000000E+00&quot;);&quot;,&quot;;TEXT([.E85];&quot;0.0000000E+00&quot;);&quot;,&quot;;TEXT([.F85];&quot;0.0000000E+00&quot;);&quot;,&quot;;&quot;lc};&quot;)" office:value-type="string" office:string-value="Point(181) = {2.5000000E-01,y0,5.9407500E-02,lc};" calcext:value-type="string">
            <text:p>Point(181) = {2.5000000E-01,y0,5.940750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2" calcext:value-type="float">
            <text:p>182</text:p>
          </table:table-cell>
          <table:table-cell table:style-name="ce7" office:value-type="float" office:value="0.238750717642026" calcext:value-type="float">
            <text:p>2.387507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90878055931527" calcext:value-type="float">
            <text:p>5.9087806E-02</text:p>
          </table:table-cell>
          <table:table-cell table:style-name="ce9"/>
          <table:table-cell table:style-name="ce3" table:formula="of:=CONCATENATE(&quot;Point(&quot;;[.C86];&quot;) = {&quot;;TEXT([.D86];&quot;0.0000000E+00&quot;);&quot;,&quot;;TEXT([.E86];&quot;0.0000000E+00&quot;);&quot;,&quot;;TEXT([.F86];&quot;0.0000000E+00&quot;);&quot;,&quot;;&quot;lc};&quot;)" office:value-type="string" office:string-value="Point(182) = {2.3875072E-01,y0,5.9087806E-02,lc};" calcext:value-type="string">
            <text:p>Point(182) = {2.3875072E-01,y0,5.908780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0.227680482492486" calcext:value-type="float">
            <text:p>2.276804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8698836388671" calcext:value-type="float">
            <text:p>5.8698836E-02</text:p>
          </table:table-cell>
          <table:table-cell table:style-name="ce9"/>
          <table:table-cell table:style-name="ce3" table:formula="of:=CONCATENATE(&quot;Point(&quot;;[.C87];&quot;) = {&quot;;TEXT([.D87];&quot;0.0000000E+00&quot;);&quot;,&quot;;TEXT([.E87];&quot;0.0000000E+00&quot;);&quot;,&quot;;TEXT([.F87];&quot;0.0000000E+00&quot;);&quot;,&quot;;&quot;lc};&quot;)" office:value-type="string" office:string-value="Point(183) = {2.2768048E-01,y0,5.8698836E-02,lc};" calcext:value-type="string">
            <text:p>Point(183) = {2.2768048E-01,y0,5.869883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4" calcext:value-type="float">
            <text:p>184</text:p>
          </table:table-cell>
          <table:table-cell table:style-name="ce7" office:value-type="float" office:value="0.216796881537584" calcext:value-type="float">
            <text:p>2.167968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82402522790943" calcext:value-type="float">
            <text:p>5.8240252E-02</text:p>
          </table:table-cell>
          <table:table-cell table:style-name="ce9"/>
          <table:table-cell table:style-name="ce3" table:formula="of:=CONCATENATE(&quot;Point(&quot;;[.C88];&quot;) = {&quot;;TEXT([.D88];&quot;0.0000000E+00&quot;);&quot;,&quot;;TEXT([.E88];&quot;0.0000000E+00&quot;);&quot;,&quot;;TEXT([.F88];&quot;0.0000000E+00&quot;);&quot;,&quot;;&quot;lc};&quot;)" office:value-type="string" office:string-value="Point(184) = {2.1679688E-01,y0,5.8240252E-02,lc};" calcext:value-type="string">
            <text:p>Point(184) = {2.1679688E-01,y0,5.824025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0.206107373853763" calcext:value-type="float">
            <text:p>2.061073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77118564837423" calcext:value-type="float">
            <text:p>5.7711856E-02</text:p>
          </table:table-cell>
          <table:table-cell table:style-name="ce9"/>
          <table:table-cell table:style-name="ce3" table:formula="of:=CONCATENATE(&quot;Point(&quot;;[.C89];&quot;) = {&quot;;TEXT([.D89];&quot;0.0000000E+00&quot;);&quot;,&quot;;TEXT([.E89];&quot;0.0000000E+00&quot;);&quot;,&quot;;TEXT([.F89];&quot;0.0000000E+00&quot;);&quot;,&quot;;&quot;lc};&quot;)" office:value-type="string" office:string-value="Point(185) = {2.0610737E-01,y0,5.7711856E-02,lc};" calcext:value-type="string">
            <text:p>Point(185) = {2.0610737E-01,y0,5.771185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6" calcext:value-type="float">
            <text:p>186</text:p>
          </table:table-cell>
          <table:table-cell table:style-name="ce7" office:value-type="float" office:value="0.19561928549564" calcext:value-type="float">
            <text:p>1.956192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71135969854671" calcext:value-type="float">
            <text:p>5.7113597E-02</text:p>
          </table:table-cell>
          <table:table-cell table:style-name="ce9"/>
          <table:table-cell table:style-name="ce3" table:formula="of:=CONCATENATE(&quot;Point(&quot;;[.C90];&quot;) = {&quot;;TEXT([.D90];&quot;0.0000000E+00&quot;);&quot;,&quot;;TEXT([.E90];&quot;0.0000000E+00&quot;);&quot;,&quot;;TEXT([.F90];&quot;0.0000000E+00&quot;);&quot;,&quot;;&quot;lc};&quot;)" office:value-type="string" office:string-value="Point(186) = {1.9561929E-01,y0,5.7113597E-02,lc};" calcext:value-type="string">
            <text:p>Point(186) = {1.9561929E-01,y0,5.711359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7" calcext:value-type="float">
            <text:p>187</text:p>
          </table:table-cell>
          <table:table-cell table:style-name="ce7" office:value-type="float" office:value="0.185339804475081" calcext:value-type="float">
            <text:p>1.853398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64455670875139" calcext:value-type="float">
            <text:p>5.6445567E-02</text:p>
          </table:table-cell>
          <table:table-cell table:style-name="ce9"/>
          <table:table-cell table:style-name="ce3" table:formula="of:=CONCATENATE(&quot;Point(&quot;;[.C91];&quot;) = {&quot;;TEXT([.D91];&quot;0.0000000E+00&quot;);&quot;,&quot;;TEXT([.E91];&quot;0.0000000E+00&quot;);&quot;,&quot;;TEXT([.F91];&quot;0.0000000E+00&quot;);&quot;,&quot;;&quot;lc};&quot;)" office:value-type="string" office:string-value="Point(187) = {1.8533980E-01,y0,5.6445567E-02,lc};" calcext:value-type="string">
            <text:p>Point(187) = {1.8533980E-01,y0,5.644556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0.175275975834908" calcext:value-type="float">
            <text:p>1.752759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57080050631394" calcext:value-type="float">
            <text:p>5.5708005E-02</text:p>
          </table:table-cell>
          <table:table-cell table:style-name="ce9"/>
          <table:table-cell table:style-name="ce3" table:formula="of:=CONCATENATE(&quot;Point(&quot;;[.C92];&quot;) = {&quot;;TEXT([.D92];&quot;0.0000000E+00&quot;);&quot;,&quot;;TEXT([.E92];&quot;0.0000000E+00&quot;);&quot;,&quot;;TEXT([.F92];&quot;0.0000000E+00&quot;);&quot;,&quot;;&quot;lc};&quot;)" office:value-type="string" office:string-value="Point(188) = {1.7527598E-01,y0,5.5708005E-02,lc};" calcext:value-type="string">
            <text:p>Point(188) = {1.7527598E-01,y0,5.570800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89" calcext:value-type="float">
            <text:p>189</text:p>
          </table:table-cell>
          <table:table-cell table:style-name="ce7" office:value-type="float" office:value="0.165434696820571" calcext:value-type="float">
            <text:p>1.654347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49012928784368" calcext:value-type="float">
            <text:p>5.4901293E-02</text:p>
          </table:table-cell>
          <table:table-cell table:style-name="ce9"/>
          <table:table-cell table:style-name="ce3" table:formula="of:=CONCATENATE(&quot;Point(&quot;;[.C93];&quot;) = {&quot;;TEXT([.D93];&quot;0.0000000E+00&quot;);&quot;,&quot;;TEXT([.E93];&quot;0.0000000E+00&quot;);&quot;,&quot;;TEXT([.F93];&quot;0.0000000E+00&quot;);&quot;,&quot;;&quot;lc};&quot;)" office:value-type="string" office:string-value="Point(189) = {1.6543470E-01,y0,5.4901293E-02,lc};" calcext:value-type="string">
            <text:p>Point(189) = {1.6543470E-01,y0,5.490129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7" office:value-type="float" office:value="0.155822712153123" calcext:value-type="float">
            <text:p>1.558227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40259539769367" calcext:value-type="float">
            <text:p>5.4025954E-02</text:p>
          </table:table-cell>
          <table:table-cell table:style-name="ce9"/>
          <table:table-cell table:style-name="ce3" table:formula="of:=CONCATENATE(&quot;Point(&quot;;[.C94];&quot;) = {&quot;;TEXT([.D94];&quot;0.0000000E+00&quot;);&quot;,&quot;;TEXT([.E94];&quot;0.0000000E+00&quot;);&quot;,&quot;;TEXT([.F94];&quot;0.0000000E+00&quot;);&quot;,&quot;;&quot;lc};&quot;)" office:value-type="string" office:string-value="Point(190) = {1.5582271E-01,y0,5.4025954E-02,lc};" calcext:value-type="string">
            <text:p>Point(190) = {1.5582271E-01,y0,5.4025954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1" calcext:value-type="float">
            <text:p>191</text:p>
          </table:table-cell>
          <table:table-cell table:style-name="ce7" office:value-type="float" office:value="0.146446609406726" calcext:value-type="float">
            <text:p>1.464466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30826501229085" calcext:value-type="float">
            <text:p>5.3082650E-02</text:p>
          </table:table-cell>
          <table:table-cell table:style-name="ce9"/>
          <table:table-cell table:style-name="ce3" table:formula="of:=CONCATENATE(&quot;Point(&quot;;[.C95];&quot;) = {&quot;;TEXT([.D95];&quot;0.0000000E+00&quot;);&quot;,&quot;;TEXT([.E95];&quot;0.0000000E+00&quot;);&quot;,&quot;;TEXT([.F95];&quot;0.0000000E+00&quot;);&quot;,&quot;;&quot;lc};&quot;)" office:value-type="string" office:string-value="Point(191) = {1.4644661E-01,y0,5.3082650E-02,lc};" calcext:value-type="string">
            <text:p>Point(191) = {1.4644661E-01,y0,5.308265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2" calcext:value-type="float">
            <text:p>192</text:p>
          </table:table-cell>
          <table:table-cell table:style-name="ce7" office:value-type="float" office:value="0.137312814493856" calcext:value-type="float">
            <text:p>1.373128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20721773088123" calcext:value-type="float">
            <text:p>5.2072177E-02</text:p>
          </table:table-cell>
          <table:table-cell table:style-name="ce9"/>
          <table:table-cell table:style-name="ce3" table:formula="of:=CONCATENATE(&quot;Point(&quot;;[.C96];&quot;) = {&quot;;TEXT([.D96];&quot;0.0000000E+00&quot;);&quot;,&quot;;TEXT([.E96];&quot;0.0000000E+00&quot;);&quot;,&quot;;TEXT([.F96];&quot;0.0000000E+00&quot;);&quot;,&quot;;&quot;lc};&quot;)" office:value-type="string" office:string-value="Point(192) = {1.3731281E-01,y0,5.2072177E-02,lc};" calcext:value-type="string">
            <text:p>Point(192) = {1.3731281E-01,y0,5.207217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3" calcext:value-type="float">
            <text:p>193</text:p>
          </table:table-cell>
          <table:table-cell table:style-name="ce7" office:value-type="float" office:value="0.128427587261303" calcext:value-type="float">
            <text:p>1.284275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509954607409406" calcext:value-type="float">
            <text:p>5.0995461E-02</text:p>
          </table:table-cell>
          <table:table-cell table:style-name="ce9"/>
          <table:table-cell table:style-name="ce3" table:formula="of:=CONCATENATE(&quot;Point(&quot;;[.C97];&quot;) = {&quot;;TEXT([.D97];&quot;0.0000000E+00&quot;);&quot;,&quot;;TEXT([.E97];&quot;0.0000000E+00&quot;);&quot;,&quot;;TEXT([.F97];&quot;0.0000000E+00&quot;);&quot;,&quot;;&quot;lc};&quot;)" office:value-type="string" office:string-value="Point(193) = {1.2842759E-01,y0,5.0995461E-02,lc};" calcext:value-type="string">
            <text:p>Point(193) = {1.2842759E-01,y0,5.099546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4" calcext:value-type="float">
            <text:p>194</text:p>
          </table:table-cell>
          <table:table-cell table:style-name="ce7" office:value-type="float" office:value="0.119797017199985" calcext:value-type="float">
            <text:p>1.197970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98535489258783" calcext:value-type="float">
            <text:p>4.9853549E-02</text:p>
          </table:table-cell>
          <table:table-cell table:style-name="ce9"/>
          <table:table-cell table:style-name="ce3" table:formula="of:=CONCATENATE(&quot;Point(&quot;;[.C98];&quot;) = {&quot;;TEXT([.D98];&quot;0.0000000E+00&quot;);&quot;,&quot;;TEXT([.E98];&quot;0.0000000E+00&quot;);&quot;,&quot;;TEXT([.F98];&quot;0.0000000E+00&quot;);&quot;,&quot;;&quot;lc};&quot;)" office:value-type="string" office:string-value="Point(194) = {1.1979702E-01,y0,4.9853549E-02,lc};" calcext:value-type="string">
            <text:p>Point(194) = {1.1979702E-01,y0,4.985354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5" calcext:value-type="float">
            <text:p>195</text:p>
          </table:table-cell>
          <table:table-cell table:style-name="ce7" office:value-type="float" office:value="0.111427019271515" calcext:value-type="float">
            <text:p>1.114270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8647606888895" calcext:value-type="float">
            <text:p>4.8647607E-02</text:p>
          </table:table-cell>
          <table:table-cell table:style-name="ce9"/>
          <table:table-cell table:style-name="ce3" table:formula="of:=CONCATENATE(&quot;Point(&quot;;[.C99];&quot;) = {&quot;;TEXT([.D99];&quot;0.0000000E+00&quot;);&quot;,&quot;;TEXT([.E99];&quot;0.0000000E+00&quot;);&quot;,&quot;;TEXT([.F99];&quot;0.0000000E+00&quot;);&quot;,&quot;;&quot;lc};&quot;)" office:value-type="string" office:string-value="Point(195) = {1.1142702E-01,y0,4.8647607E-02,lc};" calcext:value-type="string">
            <text:p>Point(195) = {1.1142702E-01,y0,4.864760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6" calcext:value-type="float">
            <text:p>196</text:p>
          </table:table-cell>
          <table:table-cell table:style-name="ce7" office:value-type="float" office:value="0.103323329854382" calcext:value-type="float">
            <text:p>1.033233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73789085636924" calcext:value-type="float">
            <text:p>4.7378909E-02</text:p>
          </table:table-cell>
          <table:table-cell table:style-name="ce9"/>
          <table:table-cell table:style-name="ce3" table:formula="of:=CONCATENATE(&quot;Point(&quot;;[.C100];&quot;) = {&quot;;TEXT([.D100];&quot;0.0000000E+00&quot;);&quot;,&quot;;TEXT([.E100];&quot;0.0000000E+00&quot;);&quot;,&quot;;TEXT([.F100];&quot;0.0000000E+00&quot;);&quot;,&quot;;&quot;lc};&quot;)" office:value-type="string" office:string-value="Point(196) = {1.0332333E-01,y0,4.7378909E-02,lc};" calcext:value-type="string">
            <text:p>Point(196) = {1.0332333E-01,y0,4.737890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7" calcext:value-type="float">
            <text:p>197</text:p>
          </table:table-cell>
          <table:table-cell table:style-name="ce7" office:value-type="float" office:value="0.0954915028125263" calcext:value-type="float">
            <text:p>9.5491503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60488284009686" calcext:value-type="float">
            <text:p>4.6048828E-02</text:p>
          </table:table-cell>
          <table:table-cell table:style-name="ce9"/>
          <table:table-cell table:style-name="ce3" table:formula="of:=CONCATENATE(&quot;Point(&quot;;[.C101];&quot;) = {&quot;;TEXT([.D101];&quot;0.0000000E+00&quot;);&quot;,&quot;;TEXT([.E101];&quot;0.0000000E+00&quot;);&quot;,&quot;;TEXT([.F101];&quot;0.0000000E+00&quot;);&quot;,&quot;;&quot;lc};&quot;)" office:value-type="string" office:string-value="Point(197) = {9.5491503E-02,y0,4.6048828E-02,lc};" calcext:value-type="string">
            <text:p>Point(197) = {9.5491503E-02,y0,4.604882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8" calcext:value-type="float">
            <text:p>198</text:p>
          </table:table-cell>
          <table:table-cell table:style-name="ce7" office:value-type="float" office:value="0.0879369056889922" calcext:value-type="float">
            <text:p>8.7936906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46588322509522" calcext:value-type="float">
            <text:p>4.4658832E-02</text:p>
          </table:table-cell>
          <table:table-cell table:style-name="ce9"/>
          <table:table-cell table:style-name="ce3" table:formula="of:=CONCATENATE(&quot;Point(&quot;;[.C102];&quot;) = {&quot;;TEXT([.D102];&quot;0.0000000E+00&quot;);&quot;,&quot;;TEXT([.E102];&quot;0.0000000E+00&quot;);&quot;,&quot;;TEXT([.F102];&quot;0.0000000E+00&quot;);&quot;,&quot;;&quot;lc};&quot;)" office:value-type="string" office:string-value="Point(198) = {8.7936906E-02,y0,4.4658832E-02,lc};" calcext:value-type="string">
            <text:p>Point(198) = {8.7936906E-02,y0,4.465883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199" calcext:value-type="float">
            <text:p>199</text:p>
          </table:table-cell>
          <table:table-cell table:style-name="ce7" office:value-type="float" office:value="0.080664716027288" calcext:value-type="float">
            <text:p>8.0664716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32104675823222" calcext:value-type="float">
            <text:p>4.3210468E-02</text:p>
          </table:table-cell>
          <table:table-cell table:style-name="ce9"/>
          <table:table-cell table:style-name="ce3" table:formula="of:=CONCATENATE(&quot;Point(&quot;;[.C103];&quot;) = {&quot;;TEXT([.D103];&quot;0.0000000E+00&quot;);&quot;,&quot;;TEXT([.E103];&quot;0.0000000E+00&quot;);&quot;,&quot;;TEXT([.F103];&quot;0.0000000E+00&quot;);&quot;,&quot;;&quot;lc};&quot;)" office:value-type="string" office:string-value="Point(199) = {8.0664716E-02,y0,4.3210468E-02,lc};" calcext:value-type="string">
            <text:p>Point(199) = {8.0664716E-02,y0,4.321046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0.0736799178229539" calcext:value-type="float">
            <text:p>7.3679918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17053531066882" calcext:value-type="float">
            <text:p>4.1705353E-02</text:p>
          </table:table-cell>
          <table:table-cell table:style-name="ce9"/>
          <table:table-cell table:style-name="ce3" table:formula="of:=CONCATENATE(&quot;Point(&quot;;[.C104];&quot;) = {&quot;;TEXT([.D104];&quot;0.0000000E+00&quot;);&quot;,&quot;;TEXT([.E104];&quot;0.0000000E+00&quot;);&quot;,&quot;;TEXT([.F104];&quot;0.0000000E+00&quot;);&quot;,&quot;;&quot;lc};&quot;)" office:value-type="string" office:string-value="Point(200) = {7.3679918E-02,y0,4.1705353E-02,lc};" calcext:value-type="string">
            <text:p>Point(200) = {7.3679918E-02,y0,4.170535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1" calcext:value-type="float">
            <text:p>201</text:p>
          </table:table-cell>
          <table:table-cell table:style-name="ce7" office:value-type="float" office:value="0.0669872981077807" calcext:value-type="float">
            <text:p>6.6987298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401451678839889" calcext:value-type="float">
            <text:p>4.0145168E-02</text:p>
          </table:table-cell>
          <table:table-cell table:style-name="ce9"/>
          <table:table-cell table:style-name="ce3" table:formula="of:=CONCATENATE(&quot;Point(&quot;;[.C105];&quot;) = {&quot;;TEXT([.D105];&quot;0.0000000E+00&quot;);&quot;,&quot;;TEXT([.E105];&quot;0.0000000E+00&quot;);&quot;,&quot;;TEXT([.F105];&quot;0.0000000E+00&quot;);&quot;,&quot;;&quot;lc};&quot;)" office:value-type="string" office:string-value="Point(201) = {6.6987298E-02,y0,4.0145168E-02,lc};" calcext:value-type="string">
            <text:p>Point(201) = {6.6987298E-02,y0,4.014516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0.0605914436690173" calcext:value-type="float">
            <text:p>6.0591444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85316399897089" calcext:value-type="float">
            <text:p>3.8531640E-02</text:p>
          </table:table-cell>
          <table:table-cell table:style-name="ce9"/>
          <table:table-cell table:style-name="ce3" table:formula="of:=CONCATENATE(&quot;Point(&quot;;[.C106];&quot;) = {&quot;;TEXT([.D106];&quot;0.0000000E+00&quot;);&quot;,&quot;;TEXT([.E106];&quot;0.0000000E+00&quot;);&quot;,&quot;;TEXT([.F106];&quot;0.0000000E+00&quot;);&quot;,&quot;;&quot;lc};&quot;)" office:value-type="string" office:string-value="Point(202) = {6.0591444E-02,y0,3.8531640E-02,lc};" calcext:value-type="string">
            <text:p>Point(202) = {6.0591444E-02,y0,3.853164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3" calcext:value-type="float">
            <text:p>203</text:p>
          </table:table-cell>
          <table:table-cell table:style-name="ce7" office:value-type="float" office:value="0.0544967379058161" calcext:value-type="float">
            <text:p>5.4496738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68665348296582" calcext:value-type="float">
            <text:p>3.6866535E-02</text:p>
          </table:table-cell>
          <table:table-cell table:style-name="ce9"/>
          <table:table-cell table:style-name="ce3" table:formula="of:=CONCATENATE(&quot;Point(&quot;;[.C107];&quot;) = {&quot;;TEXT([.D107];&quot;0.0000000E+00&quot;);&quot;,&quot;;TEXT([.E107];&quot;0.0000000E+00&quot;);&quot;,&quot;;TEXT([.F107];&quot;0.0000000E+00&quot;);&quot;,&quot;;&quot;lc};&quot;)" office:value-type="string" office:string-value="Point(203) = {5.4496738E-02,y0,3.6866535E-02,lc};" calcext:value-type="string">
            <text:p>Point(203) = {5.4496738E-02,y0,3.686653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4" calcext:value-type="float">
            <text:p>204</text:p>
          </table:table-cell>
          <table:table-cell table:style-name="ce7" office:value-type="float" office:value="0.0487073578250697" calcext:value-type="float">
            <text:p>4.8707358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51516431921456" calcext:value-type="float">
            <text:p>3.5151643E-02</text:p>
          </table:table-cell>
          <table:table-cell table:style-name="ce9"/>
          <table:table-cell table:style-name="ce3" table:formula="of:=CONCATENATE(&quot;Point(&quot;;[.C108];&quot;) = {&quot;;TEXT([.D108];&quot;0.0000000E+00&quot;);&quot;,&quot;;TEXT([.E108];&quot;0.0000000E+00&quot;);&quot;,&quot;;TEXT([.F108];&quot;0.0000000E+00&quot;);&quot;,&quot;;&quot;lc};&quot;)" office:value-type="string" office:string-value="Point(204) = {4.8707358E-02,y0,3.5151643E-02,lc};" calcext:value-type="string">
            <text:p>Point(204) = {4.8707358E-02,y0,3.515164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5" calcext:value-type="float">
            <text:p>205</text:p>
          </table:table-cell>
          <table:table-cell table:style-name="ce7" office:value-type="float" office:value="0.0432272711786996" calcext:value-type="float">
            <text:p>4.3227271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33887691306702" calcext:value-type="float">
            <text:p>3.3388769E-02</text:p>
          </table:table-cell>
          <table:table-cell table:style-name="ce9"/>
          <table:table-cell table:style-name="ce3" table:formula="of:=CONCATENATE(&quot;Point(&quot;;[.C109];&quot;) = {&quot;;TEXT([.D109];&quot;0.0000000E+00&quot;);&quot;,&quot;;TEXT([.E109];&quot;0.0000000E+00&quot;);&quot;,&quot;;TEXT([.F109];&quot;0.0000000E+00&quot;);&quot;,&quot;;&quot;lc};&quot;)" office:value-type="string" office:string-value="Point(205) = {4.3227271E-02,y0,3.3388769E-02,lc};" calcext:value-type="string">
            <text:p>Point(205) = {4.3227271E-02,y0,3.338876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6" calcext:value-type="float">
            <text:p>206</text:p>
          </table:table-cell>
          <table:table-cell table:style-name="ce7" office:value-type="float" office:value="0.0380602337443566" calcext:value-type="float">
            <text:p>3.8060234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315797177727092" calcext:value-type="float">
            <text:p>3.1579718E-02</text:p>
          </table:table-cell>
          <table:table-cell table:style-name="ce9"/>
          <table:table-cell table:style-name="ce3" table:formula="of:=CONCATENATE(&quot;Point(&quot;;[.C110];&quot;) = {&quot;;TEXT([.D110];&quot;0.0000000E+00&quot;);&quot;,&quot;;TEXT([.E110];&quot;0.0000000E+00&quot;);&quot;,&quot;;TEXT([.F110];&quot;0.0000000E+00&quot;);&quot;,&quot;;&quot;lc};&quot;)" office:value-type="string" office:string-value="Point(206) = {3.8060234E-02,y0,3.1579718E-02,lc};" calcext:value-type="string">
            <text:p>Point(206) = {3.8060234E-02,y0,3.157971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7" calcext:value-type="float">
            <text:p>207</text:p>
          </table:table-cell>
          <table:table-cell table:style-name="ce7" office:value-type="float" office:value="0.0332097867513991" calcext:value-type="float">
            <text:p>3.3209787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97262831517664" calcext:value-type="float">
            <text:p>2.9726283E-02</text:p>
          </table:table-cell>
          <table:table-cell table:style-name="ce9"/>
          <table:table-cell table:style-name="ce3" table:formula="of:=CONCATENATE(&quot;Point(&quot;;[.C111];&quot;) = {&quot;;TEXT([.D111];&quot;0.0000000E+00&quot;);&quot;,&quot;;TEXT([.E111];&quot;0.0000000E+00&quot;);&quot;,&quot;;TEXT([.F111];&quot;0.0000000E+00&quot;);&quot;,&quot;;&quot;lc};&quot;)" office:value-type="string" office:string-value="Point(207) = {3.3209787E-02,y0,2.9726283E-02,lc};" calcext:value-type="string">
            <text:p>Point(207) = {3.3209787E-02,y0,2.972628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8" calcext:value-type="float">
            <text:p>208</text:p>
          </table:table-cell>
          <table:table-cell table:style-name="ce7" office:value-type="float" office:value="0.0286792544539108" calcext:value-type="float">
            <text:p>2.8679254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78302361605527" calcext:value-type="float">
            <text:p>2.7830236E-02</text:p>
          </table:table-cell>
          <table:table-cell table:style-name="ce9"/>
          <table:table-cell table:style-name="ce3" table:formula="of:=CONCATENATE(&quot;Point(&quot;;[.C112];&quot;) = {&quot;;TEXT([.D112];&quot;0.0000000E+00&quot;);&quot;,&quot;;TEXT([.E112];&quot;0.0000000E+00&quot;);&quot;,&quot;;TEXT([.F112];&quot;0.0000000E+00&quot;);&quot;,&quot;;&quot;lc};&quot;)" office:value-type="string" office:string-value="Point(208) = {2.8679254E-02,y0,2.7830236E-02,lc};" calcext:value-type="string">
            <text:p>Point(208) = {2.8679254E-02,y0,2.783023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7" office:value-type="float" office:value="0.0244717418524232" calcext:value-type="float">
            <text:p>2.4471742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58933127229656" calcext:value-type="float">
            <text:p>2.5893313E-02</text:p>
          </table:table-cell>
          <table:table-cell table:style-name="ce9"/>
          <table:table-cell table:style-name="ce3" table:formula="of:=CONCATENATE(&quot;Point(&quot;;[.C113];&quot;) = {&quot;;TEXT([.D113];&quot;0.0000000E+00&quot;);&quot;,&quot;;TEXT([.E113];&quot;0.0000000E+00&quot;);&quot;,&quot;;TEXT([.F113];&quot;0.0000000E+00&quot;);&quot;,&quot;;&quot;lc};&quot;)" office:value-type="string" office:string-value="Point(209) = {2.4471742E-02,y0,2.5893313E-02,lc};" calcext:value-type="string">
            <text:p>Point(209) = {2.4471742E-02,y0,2.589331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10" calcext:value-type="float">
            <text:p>210</text:p>
          </table:table-cell>
          <table:table-cell table:style-name="ce7" office:value-type="float" office:value="0.0205901325659035" calcext:value-type="float">
            <text:p>2.0590133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39172022814422" calcext:value-type="float">
            <text:p>2.3917202E-02</text:p>
          </table:table-cell>
          <table:table-cell table:style-name="ce9"/>
          <table:table-cell table:style-name="ce3" table:formula="of:=CONCATENATE(&quot;Point(&quot;;[.C114];&quot;) = {&quot;;TEXT([.D114];&quot;0.0000000E+00&quot;);&quot;,&quot;;TEXT([.E114];&quot;0.0000000E+00&quot;);&quot;,&quot;;TEXT([.F114];&quot;0.0000000E+00&quot;);&quot;,&quot;;&quot;lc};&quot;)" office:value-type="string" office:string-value="Point(210) = {2.0590133E-02,y0,2.3917202E-02,lc};" calcext:value-type="string">
            <text:p>Point(210) = {2.0590133E-02,y0,2.391720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11" calcext:value-type="float">
            <text:p>211</text:p>
          </table:table-cell>
          <table:table-cell table:style-name="ce7" office:value-type="float" office:value="0.0170370868554658" calcext:value-type="float">
            <text:p>1.7037087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219035366942596" calcext:value-type="float">
            <text:p>2.1903537E-02</text:p>
          </table:table-cell>
          <table:table-cell table:style-name="ce9"/>
          <table:table-cell table:style-name="ce3" table:formula="of:=CONCATENATE(&quot;Point(&quot;;[.C115];&quot;) = {&quot;;TEXT([.D115];&quot;0.0000000E+00&quot;);&quot;,&quot;;TEXT([.E115];&quot;0.0000000E+00&quot;);&quot;,&quot;;TEXT([.F115];&quot;0.0000000E+00&quot;);&quot;,&quot;;&quot;lc};&quot;)" office:value-type="string" office:string-value="Point(211) = {1.7037087E-02,y0,2.1903537E-02,lc};" calcext:value-type="string">
            <text:p>Point(211) = {1.7037087E-02,y0,2.190353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12" calcext:value-type="float">
            <text:p>212</text:p>
          </table:table-cell>
          <table:table-cell table:style-name="ce7" office:value-type="float" office:value="0.0138150398011617" calcext:value-type="float">
            <text:p>1.3815040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98538796344812" calcext:value-type="float">
            <text:p>1.9853880E-02</text:p>
          </table:table-cell>
          <table:table-cell table:style-name="ce9"/>
          <table:table-cell table:style-name="ce3" table:formula="of:=CONCATENATE(&quot;Point(&quot;;[.C116];&quot;) = {&quot;;TEXT([.D116];&quot;0.0000000E+00&quot;);&quot;,&quot;;TEXT([.E116];&quot;0.0000000E+00&quot;);&quot;,&quot;;TEXT([.F116];&quot;0.0000000E+00&quot;);&quot;,&quot;;&quot;lc};&quot;)" office:value-type="string" office:string-value="Point(212) = {1.3815040E-02,y0,1.9853880E-02,lc};" calcext:value-type="string">
            <text:p>Point(212) = {1.3815040E-02,y0,1.985388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13" calcext:value-type="float">
            <text:p>213</text:p>
          </table:table-cell>
          <table:table-cell table:style-name="ce7" office:value-type="float" office:value="0.0109261996330972" calcext:value-type="float">
            <text:p>1.0926200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77697165785102" calcext:value-type="float">
            <text:p>1.7769717E-02</text:p>
          </table:table-cell>
          <table:table-cell table:style-name="ce9"/>
          <table:table-cell table:style-name="ce3" table:formula="of:=CONCATENATE(&quot;Point(&quot;;[.C117];&quot;) = {&quot;;TEXT([.D117];&quot;0.0000000E+00&quot;);&quot;,&quot;;TEXT([.E117];&quot;0.0000000E+00&quot;);&quot;,&quot;;TEXT([.F117];&quot;0.0000000E+00&quot;);&quot;,&quot;;&quot;lc};&quot;)" office:value-type="string" office:string-value="Point(213) = {1.0926200E-02,y0,1.7769717E-02,lc};" calcext:value-type="string">
            <text:p>Point(213) = {1.0926200E-02,y0,1.776971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14" calcext:value-type="float">
            <text:p>214</text:p>
          </table:table-cell>
          <table:table-cell table:style-name="ce7" office:value-type="float" office:value="0.00837254621802269" calcext:value-type="float">
            <text:p>8.3725462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56524454676532" calcext:value-type="float">
            <text:p>1.5652445E-02</text:p>
          </table:table-cell>
          <table:table-cell table:style-name="ce9"/>
          <table:table-cell table:style-name="ce3" table:formula="of:=CONCATENATE(&quot;Point(&quot;;[.C118];&quot;) = {&quot;;TEXT([.D118];&quot;0.0000000E+00&quot;);&quot;,&quot;;TEXT([.E118];&quot;0.0000000E+00&quot;);&quot;,&quot;;TEXT([.F118];&quot;0.0000000E+00&quot;);&quot;,&quot;;&quot;lc};&quot;)" office:value-type="string" office:string-value="Point(214) = {8.3725462E-03,y0,1.5652445E-02,lc};" calcext:value-type="string">
            <text:p>Point(214) = {8.3725462E-03,y0,1.565244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15" calcext:value-type="float">
            <text:p>215</text:p>
          </table:table-cell>
          <table:table-cell table:style-name="ce7" office:value-type="float" office:value="0.00615582970243112" calcext:value-type="float">
            <text:p>6.1558297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35033681207455" calcext:value-type="float">
            <text:p>1.3503368E-02</text:p>
          </table:table-cell>
          <table:table-cell table:style-name="ce9"/>
          <table:table-cell table:style-name="ce3" table:formula="of:=CONCATENATE(&quot;Point(&quot;;[.C119];&quot;) = {&quot;;TEXT([.D119];&quot;0.0000000E+00&quot;);&quot;,&quot;;TEXT([.E119];&quot;0.0000000E+00&quot;);&quot;,&quot;;TEXT([.F119];&quot;0.0000000E+00&quot;);&quot;,&quot;;&quot;lc};&quot;)" office:value-type="string" office:string-value="Point(215) = {6.1558297E-03,y0,1.3503368E-02,lc};" calcext:value-type="string">
            <text:p>Point(215) = {6.1558297E-03,y0,1.350336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16" calcext:value-type="float">
            <text:p>216</text:p>
          </table:table-cell>
          <table:table-cell table:style-name="ce7" office:value-type="float" office:value="0.00427756931309481" calcext:value-type="float">
            <text:p>4.2775693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113236824698117" calcext:value-type="float">
            <text:p>1.1323682E-02</text:p>
          </table:table-cell>
          <table:table-cell table:style-name="ce9"/>
          <table:table-cell table:style-name="ce3" table:formula="of:=CONCATENATE(&quot;Point(&quot;;[.C120];&quot;) = {&quot;;TEXT([.D120];&quot;0.0000000E+00&quot;);&quot;,&quot;;TEXT([.E120];&quot;0.0000000E+00&quot;);&quot;,&quot;;TEXT([.F120];&quot;0.0000000E+00&quot;);&quot;,&quot;;&quot;lc};&quot;)" office:value-type="string" office:string-value="Point(216) = {4.2775693E-03,y0,1.1323682E-02,lc};" calcext:value-type="string">
            <text:p>Point(216) = {4.2775693E-03,y0,1.132368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17" calcext:value-type="float">
            <text:p>217</text:p>
          </table:table-cell>
          <table:table-cell table:style-name="ce7" office:value-type="float" office:value="0.00273905231586336" calcext:value-type="float">
            <text:p>2.7390523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911447568396653" calcext:value-type="float">
            <text:p>9.1144757E-03</text:p>
          </table:table-cell>
          <table:table-cell table:style-name="ce9"/>
          <table:table-cell table:style-name="ce3" table:formula="of:=CONCATENATE(&quot;Point(&quot;;[.C121];&quot;) = {&quot;;TEXT([.D121];&quot;0.0000000E+00&quot;);&quot;,&quot;;TEXT([.E121];&quot;0.0000000E+00&quot;);&quot;,&quot;;TEXT([.F121];&quot;0.0000000E+00&quot;);&quot;,&quot;;&quot;lc};&quot;)" office:value-type="string" office:string-value="Point(217) = {2.7390523E-03,y0,9.1144757E-03,lc};" calcext:value-type="string">
            <text:p>Point(217) = {2.7390523E-03,y0,9.1144757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218" calcext:value-type="float">
            <text:p>218</text:p>
          </table:table-cell>
          <table:table-cell table:style-name="ce7" office:value-type="float" office:value="0.00154133313343602" calcext:value-type="float">
            <text:p>1.5413331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6876718239381" calcext:value-type="float">
            <text:p>6.8767182E-03</text:p>
          </table:table-cell>
          <table:table-cell table:style-name="ce9"/>
          <table:table-cell table:style-name="ce3" table:formula="of:=CONCATENATE(&quot;Point(&quot;;[.C122];&quot;) = {&quot;;TEXT([.D122];&quot;0.0000000E+00&quot;);&quot;,&quot;;TEXT([.E122];&quot;0.0000000E+00&quot;);&quot;,&quot;;TEXT([.F122];&quot;0.0000000E+00&quot;);&quot;,&quot;;&quot;lc};&quot;)" office:value-type="string" office:string-value="Point(218) = {1.5413331E-03,y0,6.8767182E-03,lc};" calcext:value-type="string">
            <text:p>Point(218) = {1.5413331E-03,y0,6.876718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219" calcext:value-type="float">
            <text:p>219</text:p>
          </table:table-cell>
          <table:table-cell table:style-name="ce7" office:value-type="float" office:value="0.000685232622713083" calcext:value-type="float">
            <text:p>6.8523262E-04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461125898520841" calcext:value-type="float">
            <text:p>4.6112590E-03</text:p>
          </table:table-cell>
          <table:table-cell table:style-name="ce9"/>
          <table:table-cell table:style-name="ce3" table:formula="of:=CONCATENATE(&quot;Point(&quot;;[.C123];&quot;) = {&quot;;TEXT([.D123];&quot;0.0000000E+00&quot;);&quot;,&quot;;TEXT([.E123];&quot;0.0000000E+00&quot;);&quot;,&quot;;TEXT([.F123];&quot;0.0000000E+00&quot;);&quot;,&quot;;&quot;lc};&quot;)" office:value-type="string" office:string-value="Point(219) = {6.8523262E-04,y0,4.6112590E-03,lc};" calcext:value-type="string">
            <text:p>Point(219) = {6.8523262E-04,y0,4.6112590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220" calcext:value-type="float">
            <text:p>220</text:p>
          </table:table-cell>
          <table:table-cell table:style-name="ce7" office:value-type="float" office:value="0.00017133751222137" calcext:value-type="float">
            <text:p>1.7133751E-04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.00231882124695704" calcext:value-type="float">
            <text:p>2.3188212E-03</text:p>
          </table:table-cell>
          <table:table-cell table:style-name="ce9"/>
          <table:table-cell table:style-name="ce3" table:formula="of:=CONCATENATE(&quot;Point(&quot;;[.C124];&quot;) = {&quot;;TEXT([.D124];&quot;0.0000000E+00&quot;);&quot;,&quot;;TEXT([.E124];&quot;0.0000000E+00&quot;);&quot;,&quot;;TEXT([.F124];&quot;0.0000000E+00&quot;);&quot;,&quot;;&quot;lc};&quot;)" office:value-type="string" office:string-value="Point(220) = {1.7133751E-04,y0,2.3188212E-03,lc};" calcext:value-type="string">
            <text:p>Point(220) = {1.7133751E-04,y0,2.318821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221" calcext:value-type="float">
            <text:p>221</text:p>
          </table:table-cell>
          <table:table-cell table:style-name="ce7" office:value-type="float" office:value="0" calcext:value-type="float">
            <text:p>0.0000000E+00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0" calcext:value-type="float">
            <text:p>0.0000000E+00</text:p>
          </table:table-cell>
          <table:table-cell table:style-name="ce9"/>
          <table:table-cell table:style-name="ce3" table:formula="of:=CONCATENATE(&quot;Point(&quot;;[.C125];&quot;) = {&quot;;TEXT([.D125];&quot;0.0000000E+00&quot;);&quot;,&quot;;TEXT([.E125];&quot;0.0000000E+00&quot;);&quot;,&quot;;TEXT([.F125];&quot;0.0000000E+00&quot;);&quot;,&quot;;&quot;lc};&quot;)" office:value-type="string" office:string-value="Point(221) = {0.0000000E+00,y0,0.0000000E+00,lc};" calcext:value-type="string">
            <text:p>Point(221) = {0.0000000E+00,y0,0.0000000E+00,lc};</text:p>
          </table:table-cell>
        </table:table-row>
        <table:table-row table:style-name="ro1">
          <table:table-cell table:number-columns-repeated="2"/>
          <table:table-cell table:style-name="ce3" office:value-type="float" office:value="222" calcext:value-type="float">
            <text:p>222</text:p>
          </table:table-cell>
          <table:table-cell table:style-name="ce7" office:value-type="float" office:value="0.00017133751222137" calcext:value-type="float">
            <text:p>1.7133751E-04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231882124695704" calcext:value-type="float">
            <text:p>-2.3188212E-03</text:p>
          </table:table-cell>
          <table:table-cell table:style-name="ce9"/>
          <table:table-cell table:style-name="ce3" table:formula="of:=CONCATENATE(&quot;Point(&quot;;[.C126];&quot;) = {&quot;;TEXT([.D126];&quot;0.0000000E+00&quot;);&quot;,&quot;;TEXT([.E126];&quot;0.0000000E+00&quot;);&quot;,&quot;;TEXT([.F126];&quot;0.0000000E+00&quot;);&quot;,&quot;;&quot;lc};&quot;)" office:value-type="string" office:string-value="Point(222) = {1.7133751E-04,y0,-2.3188212E-03,lc};" calcext:value-type="string">
            <text:p>Point(222) = {1.7133751E-04,y0,-2.318821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0.000685232622713083" calcext:value-type="float">
            <text:p>6.8523262E-04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461125898520841" calcext:value-type="float">
            <text:p>-4.6112590E-03</text:p>
          </table:table-cell>
          <table:table-cell table:style-name="ce9"/>
          <table:table-cell table:style-name="ce3" table:formula="of:=CONCATENATE(&quot;Point(&quot;;[.C127];&quot;) = {&quot;;TEXT([.D127];&quot;0.0000000E+00&quot;);&quot;,&quot;;TEXT([.E127];&quot;0.0000000E+00&quot;);&quot;,&quot;;TEXT([.F127];&quot;0.0000000E+00&quot;);&quot;,&quot;;&quot;lc};&quot;)" office:value-type="string" office:string-value="Point(223) = {6.8523262E-04,y0,-4.6112590E-03,lc};" calcext:value-type="string">
            <text:p>Point(223) = {6.8523262E-04,y0,-4.6112590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224" calcext:value-type="float">
            <text:p>224</text:p>
          </table:table-cell>
          <table:table-cell table:style-name="ce7" office:value-type="float" office:value="0.00154133313343602" calcext:value-type="float">
            <text:p>1.5413331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6876718239381" calcext:value-type="float">
            <text:p>-6.8767182E-03</text:p>
          </table:table-cell>
          <table:table-cell table:style-name="ce9"/>
          <table:table-cell table:style-name="ce3" table:formula="of:=CONCATENATE(&quot;Point(&quot;;[.C128];&quot;) = {&quot;;TEXT([.D128];&quot;0.0000000E+00&quot;);&quot;,&quot;;TEXT([.E128];&quot;0.0000000E+00&quot;);&quot;,&quot;;TEXT([.F128];&quot;0.0000000E+00&quot;);&quot;,&quot;;&quot;lc};&quot;)" office:value-type="string" office:string-value="Point(224) = {1.5413331E-03,y0,-6.8767182E-03,lc};" calcext:value-type="string">
            <text:p>Point(224) = {1.5413331E-03,y0,-6.876718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225" calcext:value-type="float">
            <text:p>225</text:p>
          </table:table-cell>
          <table:table-cell table:style-name="ce7" office:value-type="float" office:value="0.00273905231586336" calcext:value-type="float">
            <text:p>2.7390523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911447568396653" calcext:value-type="float">
            <text:p>-9.1144757E-03</text:p>
          </table:table-cell>
          <table:table-cell table:style-name="ce9"/>
          <table:table-cell table:style-name="ce3" table:formula="of:=CONCATENATE(&quot;Point(&quot;;[.C129];&quot;) = {&quot;;TEXT([.D129];&quot;0.0000000E+00&quot;);&quot;,&quot;;TEXT([.E129];&quot;0.0000000E+00&quot;);&quot;,&quot;;TEXT([.F129];&quot;0.0000000E+00&quot;);&quot;,&quot;;&quot;lc};&quot;)" office:value-type="string" office:string-value="Point(225) = {2.7390523E-03,y0,-9.1144757E-03,lc};" calcext:value-type="string">
            <text:p>Point(225) = {2.7390523E-03,y0,-9.1144757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226" calcext:value-type="float">
            <text:p>226</text:p>
          </table:table-cell>
          <table:table-cell table:style-name="ce7" office:value-type="float" office:value="0.00427756931309481" calcext:value-type="float">
            <text:p>4.2775693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13236824698117" calcext:value-type="float">
            <text:p>-1.1323682E-02</text:p>
          </table:table-cell>
          <table:table-cell table:style-name="ce9"/>
          <table:table-cell table:style-name="ce3" table:formula="of:=CONCATENATE(&quot;Point(&quot;;[.C130];&quot;) = {&quot;;TEXT([.D130];&quot;0.0000000E+00&quot;);&quot;,&quot;;TEXT([.E130];&quot;0.0000000E+00&quot;);&quot;,&quot;;TEXT([.F130];&quot;0.0000000E+00&quot;);&quot;,&quot;;&quot;lc};&quot;)" office:value-type="string" office:string-value="Point(226) = {4.2775693E-03,y0,-1.1323682E-02,lc};" calcext:value-type="string">
            <text:p>Point(226) = {4.2775693E-03,y0,-1.132368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27" calcext:value-type="float">
            <text:p>227</text:p>
          </table:table-cell>
          <table:table-cell table:style-name="ce7" office:value-type="float" office:value="0.00615582970243112" calcext:value-type="float">
            <text:p>6.1558297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35033681207455" calcext:value-type="float">
            <text:p>-1.3503368E-02</text:p>
          </table:table-cell>
          <table:table-cell table:style-name="ce9"/>
          <table:table-cell table:style-name="ce3" table:formula="of:=CONCATENATE(&quot;Point(&quot;;[.C131];&quot;) = {&quot;;TEXT([.D131];&quot;0.0000000E+00&quot;);&quot;,&quot;;TEXT([.E131];&quot;0.0000000E+00&quot;);&quot;,&quot;;TEXT([.F131];&quot;0.0000000E+00&quot;);&quot;,&quot;;&quot;lc};&quot;)" office:value-type="string" office:string-value="Point(227) = {6.1558297E-03,y0,-1.3503368E-02,lc};" calcext:value-type="string">
            <text:p>Point(227) = {6.1558297E-03,y0,-1.350336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7" office:value-type="float" office:value="0.00837254621802269" calcext:value-type="float">
            <text:p>8.3725462E-03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56524454676532" calcext:value-type="float">
            <text:p>-1.5652445E-02</text:p>
          </table:table-cell>
          <table:table-cell table:style-name="ce9"/>
          <table:table-cell table:style-name="ce3" table:formula="of:=CONCATENATE(&quot;Point(&quot;;[.C132];&quot;) = {&quot;;TEXT([.D132];&quot;0.0000000E+00&quot;);&quot;,&quot;;TEXT([.E132];&quot;0.0000000E+00&quot;);&quot;,&quot;;TEXT([.F132];&quot;0.0000000E+00&quot;);&quot;,&quot;;&quot;lc};&quot;)" office:value-type="string" office:string-value="Point(228) = {8.3725462E-03,y0,-1.5652445E-02,lc};" calcext:value-type="string">
            <text:p>Point(228) = {8.3725462E-03,y0,-1.565244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29" calcext:value-type="float">
            <text:p>229</text:p>
          </table:table-cell>
          <table:table-cell table:style-name="ce7" office:value-type="float" office:value="0.0109261996330972" calcext:value-type="float">
            <text:p>1.0926200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77697165785102" calcext:value-type="float">
            <text:p>-1.7769717E-02</text:p>
          </table:table-cell>
          <table:table-cell table:style-name="ce9"/>
          <table:table-cell table:style-name="ce3" table:formula="of:=CONCATENATE(&quot;Point(&quot;;[.C133];&quot;) = {&quot;;TEXT([.D133];&quot;0.0000000E+00&quot;);&quot;,&quot;;TEXT([.E133];&quot;0.0000000E+00&quot;);&quot;,&quot;;TEXT([.F133];&quot;0.0000000E+00&quot;);&quot;,&quot;;&quot;lc};&quot;)" office:value-type="string" office:string-value="Point(229) = {1.0926200E-02,y0,-1.7769717E-02,lc};" calcext:value-type="string">
            <text:p>Point(229) = {1.0926200E-02,y0,-1.776971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0" calcext:value-type="float">
            <text:p>230</text:p>
          </table:table-cell>
          <table:table-cell table:style-name="ce7" office:value-type="float" office:value="0.0138150398011617" calcext:value-type="float">
            <text:p>1.3815040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98538796344812" calcext:value-type="float">
            <text:p>-1.9853880E-02</text:p>
          </table:table-cell>
          <table:table-cell table:style-name="ce9"/>
          <table:table-cell table:style-name="ce3" table:formula="of:=CONCATENATE(&quot;Point(&quot;;[.C134];&quot;) = {&quot;;TEXT([.D134];&quot;0.0000000E+00&quot;);&quot;,&quot;;TEXT([.E134];&quot;0.0000000E+00&quot;);&quot;,&quot;;TEXT([.F134];&quot;0.0000000E+00&quot;);&quot;,&quot;;&quot;lc};&quot;)" office:value-type="string" office:string-value="Point(230) = {1.3815040E-02,y0,-1.9853880E-02,lc};" calcext:value-type="string">
            <text:p>Point(230) = {1.3815040E-02,y0,-1.985388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1" calcext:value-type="float">
            <text:p>231</text:p>
          </table:table-cell>
          <table:table-cell table:style-name="ce7" office:value-type="float" office:value="0.0170370868554658" calcext:value-type="float">
            <text:p>1.7037087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19035366942596" calcext:value-type="float">
            <text:p>-2.1903537E-02</text:p>
          </table:table-cell>
          <table:table-cell table:style-name="ce9"/>
          <table:table-cell table:style-name="ce3" table:formula="of:=CONCATENATE(&quot;Point(&quot;;[.C135];&quot;) = {&quot;;TEXT([.D135];&quot;0.0000000E+00&quot;);&quot;,&quot;;TEXT([.E135];&quot;0.0000000E+00&quot;);&quot;,&quot;;TEXT([.F135];&quot;0.0000000E+00&quot;);&quot;,&quot;;&quot;lc};&quot;)" office:value-type="string" office:string-value="Point(231) = {1.7037087E-02,y0,-2.1903537E-02,lc};" calcext:value-type="string">
            <text:p>Point(231) = {1.7037087E-02,y0,-2.190353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2" calcext:value-type="float">
            <text:p>232</text:p>
          </table:table-cell>
          <table:table-cell table:style-name="ce7" office:value-type="float" office:value="0.0205901325659035" calcext:value-type="float">
            <text:p>2.0590133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39172022814422" calcext:value-type="float">
            <text:p>-2.3917202E-02</text:p>
          </table:table-cell>
          <table:table-cell table:style-name="ce3"/>
          <table:table-cell table:style-name="ce3" table:formula="of:=CONCATENATE(&quot;Point(&quot;;[.C136];&quot;) = {&quot;;TEXT([.D136];&quot;0.0000000E+00&quot;);&quot;,&quot;;TEXT([.E136];&quot;0.0000000E+00&quot;);&quot;,&quot;;TEXT([.F136];&quot;0.0000000E+00&quot;);&quot;,&quot;;&quot;lc};&quot;)" office:value-type="string" office:string-value="Point(232) = {2.0590133E-02,y0,-2.3917202E-02,lc};" calcext:value-type="string">
            <text:p>Point(232) = {2.0590133E-02,y0,-2.391720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3" calcext:value-type="float">
            <text:p>233</text:p>
          </table:table-cell>
          <table:table-cell table:style-name="ce7" office:value-type="float" office:value="0.0244717418524232" calcext:value-type="float">
            <text:p>2.4471742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58933127229656" calcext:value-type="float">
            <text:p>-2.5893313E-02</text:p>
          </table:table-cell>
          <table:table-cell table:style-name="ce3"/>
          <table:table-cell table:style-name="ce3" table:formula="of:=CONCATENATE(&quot;Point(&quot;;[.C137];&quot;) = {&quot;;TEXT([.D137];&quot;0.0000000E+00&quot;);&quot;,&quot;;TEXT([.E137];&quot;0.0000000E+00&quot;);&quot;,&quot;;TEXT([.F137];&quot;0.0000000E+00&quot;);&quot;,&quot;;&quot;lc};&quot;)" office:value-type="string" office:string-value="Point(233) = {2.4471742E-02,y0,-2.5893313E-02,lc};" calcext:value-type="string">
            <text:p>Point(233) = {2.4471742E-02,y0,-2.589331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4" calcext:value-type="float">
            <text:p>234</text:p>
          </table:table-cell>
          <table:table-cell table:style-name="ce7" office:value-type="float" office:value="0.0286792544539108" calcext:value-type="float">
            <text:p>2.8679254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78302361605527" calcext:value-type="float">
            <text:p>-2.7830236E-02</text:p>
          </table:table-cell>
          <table:table-cell table:style-name="ce3"/>
          <table:table-cell table:style-name="ce3" table:formula="of:=CONCATENATE(&quot;Point(&quot;;[.C138];&quot;) = {&quot;;TEXT([.D138];&quot;0.0000000E+00&quot;);&quot;,&quot;;TEXT([.E138];&quot;0.0000000E+00&quot;);&quot;,&quot;;TEXT([.F138];&quot;0.0000000E+00&quot;);&quot;,&quot;;&quot;lc};&quot;)" office:value-type="string" office:string-value="Point(234) = {2.8679254E-02,y0,-2.7830236E-02,lc};" calcext:value-type="string">
            <text:p>Point(234) = {2.8679254E-02,y0,-2.783023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5" calcext:value-type="float">
            <text:p>235</text:p>
          </table:table-cell>
          <table:table-cell table:style-name="ce7" office:value-type="float" office:value="0.0332097867513991" calcext:value-type="float">
            <text:p>3.3209787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97262831517664" calcext:value-type="float">
            <text:p>-2.9726283E-02</text:p>
          </table:table-cell>
          <table:table-cell table:style-name="ce3"/>
          <table:table-cell table:style-name="ce3" table:formula="of:=CONCATENATE(&quot;Point(&quot;;[.C139];&quot;) = {&quot;;TEXT([.D139];&quot;0.0000000E+00&quot;);&quot;,&quot;;TEXT([.E139];&quot;0.0000000E+00&quot;);&quot;,&quot;;TEXT([.F139];&quot;0.0000000E+00&quot;);&quot;,&quot;;&quot;lc};&quot;)" office:value-type="string" office:string-value="Point(235) = {3.3209787E-02,y0,-2.9726283E-02,lc};" calcext:value-type="string">
            <text:p>Point(235) = {3.3209787E-02,y0,-2.972628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6" calcext:value-type="float">
            <text:p>236</text:p>
          </table:table-cell>
          <table:table-cell table:style-name="ce7" office:value-type="float" office:value="0.0380602337443566" calcext:value-type="float">
            <text:p>3.8060234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15797177727092" calcext:value-type="float">
            <text:p>-3.1579718E-02</text:p>
          </table:table-cell>
          <table:table-cell table:style-name="ce3"/>
          <table:table-cell table:style-name="ce3" table:formula="of:=CONCATENATE(&quot;Point(&quot;;[.C140];&quot;) = {&quot;;TEXT([.D140];&quot;0.0000000E+00&quot;);&quot;,&quot;;TEXT([.E140];&quot;0.0000000E+00&quot;);&quot;,&quot;;TEXT([.F140];&quot;0.0000000E+00&quot;);&quot;,&quot;;&quot;lc};&quot;)" office:value-type="string" office:string-value="Point(236) = {3.8060234E-02,y0,-3.1579718E-02,lc};" calcext:value-type="string">
            <text:p>Point(236) = {3.8060234E-02,y0,-3.157971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7" calcext:value-type="float">
            <text:p>237</text:p>
          </table:table-cell>
          <table:table-cell table:style-name="ce7" office:value-type="float" office:value="0.0432272711786996" calcext:value-type="float">
            <text:p>4.3227271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33887691306702" calcext:value-type="float">
            <text:p>-3.3388769E-02</text:p>
          </table:table-cell>
          <table:table-cell table:style-name="ce3"/>
          <table:table-cell table:style-name="ce3" table:formula="of:=CONCATENATE(&quot;Point(&quot;;[.C141];&quot;) = {&quot;;TEXT([.D141];&quot;0.0000000E+00&quot;);&quot;,&quot;;TEXT([.E141];&quot;0.0000000E+00&quot;);&quot;,&quot;;TEXT([.F141];&quot;0.0000000E+00&quot;);&quot;,&quot;;&quot;lc};&quot;)" office:value-type="string" office:string-value="Point(237) = {4.3227271E-02,y0,-3.3388769E-02,lc};" calcext:value-type="string">
            <text:p>Point(237) = {4.3227271E-02,y0,-3.338876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8" calcext:value-type="float">
            <text:p>238</text:p>
          </table:table-cell>
          <table:table-cell table:style-name="ce7" office:value-type="float" office:value="0.0487073578250697" calcext:value-type="float">
            <text:p>4.8707358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51516431921456" calcext:value-type="float">
            <text:p>-3.5151643E-02</text:p>
          </table:table-cell>
          <table:table-cell table:style-name="ce3"/>
          <table:table-cell table:style-name="ce3" table:formula="of:=CONCATENATE(&quot;Point(&quot;;[.C142];&quot;) = {&quot;;TEXT([.D142];&quot;0.0000000E+00&quot;);&quot;,&quot;;TEXT([.E142];&quot;0.0000000E+00&quot;);&quot;,&quot;;TEXT([.F142];&quot;0.0000000E+00&quot;);&quot;,&quot;;&quot;lc};&quot;)" office:value-type="string" office:string-value="Point(238) = {4.8707358E-02,y0,-3.5151643E-02,lc};" calcext:value-type="string">
            <text:p>Point(238) = {4.8707358E-02,y0,-3.515164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39" calcext:value-type="float">
            <text:p>239</text:p>
          </table:table-cell>
          <table:table-cell table:style-name="ce7" office:value-type="float" office:value="0.0544967379058161" calcext:value-type="float">
            <text:p>5.4496738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68665348296582" calcext:value-type="float">
            <text:p>-3.6866535E-02</text:p>
          </table:table-cell>
          <table:table-cell table:style-name="ce3"/>
          <table:table-cell table:style-name="ce3" table:formula="of:=CONCATENATE(&quot;Point(&quot;;[.C143];&quot;) = {&quot;;TEXT([.D143];&quot;0.0000000E+00&quot;);&quot;,&quot;;TEXT([.E143];&quot;0.0000000E+00&quot;);&quot;,&quot;;TEXT([.F143];&quot;0.0000000E+00&quot;);&quot;,&quot;;&quot;lc};&quot;)" office:value-type="string" office:string-value="Point(239) = {5.4496738E-02,y0,-3.6866535E-02,lc};" calcext:value-type="string">
            <text:p>Point(239) = {5.4496738E-02,y0,-3.686653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0.0605914436690173" calcext:value-type="float">
            <text:p>6.0591444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85316399897089" calcext:value-type="float">
            <text:p>-3.8531640E-02</text:p>
          </table:table-cell>
          <table:table-cell table:style-name="ce3"/>
          <table:table-cell table:style-name="ce3" table:formula="of:=CONCATENATE(&quot;Point(&quot;;[.C144];&quot;) = {&quot;;TEXT([.D144];&quot;0.0000000E+00&quot;);&quot;,&quot;;TEXT([.E144];&quot;0.0000000E+00&quot;);&quot;,&quot;;TEXT([.F144];&quot;0.0000000E+00&quot;);&quot;,&quot;;&quot;lc};&quot;)" office:value-type="string" office:string-value="Point(240) = {6.0591444E-02,y0,-3.8531640E-02,lc};" calcext:value-type="string">
            <text:p>Point(240) = {6.0591444E-02,y0,-3.853164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1" calcext:value-type="float">
            <text:p>241</text:p>
          </table:table-cell>
          <table:table-cell table:style-name="ce7" office:value-type="float" office:value="0.0669872981077807" calcext:value-type="float">
            <text:p>6.6987298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01451678839889" calcext:value-type="float">
            <text:p>-4.0145168E-02</text:p>
          </table:table-cell>
          <table:table-cell table:style-name="ce3"/>
          <table:table-cell table:style-name="ce3" table:formula="of:=CONCATENATE(&quot;Point(&quot;;[.C145];&quot;) = {&quot;;TEXT([.D145];&quot;0.0000000E+00&quot;);&quot;,&quot;;TEXT([.E145];&quot;0.0000000E+00&quot;);&quot;,&quot;;TEXT([.F145];&quot;0.0000000E+00&quot;);&quot;,&quot;;&quot;lc};&quot;)" office:value-type="string" office:string-value="Point(241) = {6.6987298E-02,y0,-4.0145168E-02,lc};" calcext:value-type="string">
            <text:p>Point(241) = {6.6987298E-02,y0,-4.014516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2" calcext:value-type="float">
            <text:p>242</text:p>
          </table:table-cell>
          <table:table-cell table:style-name="ce7" office:value-type="float" office:value="0.0736799178229539" calcext:value-type="float">
            <text:p>7.3679918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17053531066882" calcext:value-type="float">
            <text:p>-4.1705353E-02</text:p>
          </table:table-cell>
          <table:table-cell table:style-name="ce3"/>
          <table:table-cell table:style-name="ce3" table:formula="of:=CONCATENATE(&quot;Point(&quot;;[.C146];&quot;) = {&quot;;TEXT([.D146];&quot;0.0000000E+00&quot;);&quot;,&quot;;TEXT([.E146];&quot;0.0000000E+00&quot;);&quot;,&quot;;TEXT([.F146];&quot;0.0000000E+00&quot;);&quot;,&quot;;&quot;lc};&quot;)" office:value-type="string" office:string-value="Point(242) = {7.3679918E-02,y0,-4.1705353E-02,lc};" calcext:value-type="string">
            <text:p>Point(242) = {7.3679918E-02,y0,-4.170535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3" calcext:value-type="float">
            <text:p>243</text:p>
          </table:table-cell>
          <table:table-cell table:style-name="ce7" office:value-type="float" office:value="0.080664716027288" calcext:value-type="float">
            <text:p>8.0664716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32104675823222" calcext:value-type="float">
            <text:p>-4.3210468E-02</text:p>
          </table:table-cell>
          <table:table-cell table:style-name="ce3"/>
          <table:table-cell table:style-name="ce3" table:formula="of:=CONCATENATE(&quot;Point(&quot;;[.C147];&quot;) = {&quot;;TEXT([.D147];&quot;0.0000000E+00&quot;);&quot;,&quot;;TEXT([.E147];&quot;0.0000000E+00&quot;);&quot;,&quot;;TEXT([.F147];&quot;0.0000000E+00&quot;);&quot;,&quot;;&quot;lc};&quot;)" office:value-type="string" office:string-value="Point(243) = {8.0664716E-02,y0,-4.3210468E-02,lc};" calcext:value-type="string">
            <text:p>Point(243) = {8.0664716E-02,y0,-4.321046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4" calcext:value-type="float">
            <text:p>244</text:p>
          </table:table-cell>
          <table:table-cell table:style-name="ce7" office:value-type="float" office:value="0.0879369056889922" calcext:value-type="float">
            <text:p>8.7936906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46588322509522" calcext:value-type="float">
            <text:p>-4.4658832E-02</text:p>
          </table:table-cell>
          <table:table-cell table:style-name="ce3"/>
          <table:table-cell table:style-name="ce3" table:formula="of:=CONCATENATE(&quot;Point(&quot;;[.C148];&quot;) = {&quot;;TEXT([.D148];&quot;0.0000000E+00&quot;);&quot;,&quot;;TEXT([.E148];&quot;0.0000000E+00&quot;);&quot;,&quot;;TEXT([.F148];&quot;0.0000000E+00&quot;);&quot;,&quot;;&quot;lc};&quot;)" office:value-type="string" office:string-value="Point(244) = {8.7936906E-02,y0,-4.4658832E-02,lc};" calcext:value-type="string">
            <text:p>Point(244) = {8.7936906E-02,y0,-4.465883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5" calcext:value-type="float">
            <text:p>245</text:p>
          </table:table-cell>
          <table:table-cell table:style-name="ce7" office:value-type="float" office:value="0.0954915028125263" calcext:value-type="float">
            <text:p>9.5491503E-02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60488284009686" calcext:value-type="float">
            <text:p>-4.6048828E-02</text:p>
          </table:table-cell>
          <table:table-cell table:style-name="ce3"/>
          <table:table-cell table:style-name="ce3" table:formula="of:=CONCATENATE(&quot;Point(&quot;;[.C149];&quot;) = {&quot;;TEXT([.D149];&quot;0.0000000E+00&quot;);&quot;,&quot;;TEXT([.E149];&quot;0.0000000E+00&quot;);&quot;,&quot;;TEXT([.F149];&quot;0.0000000E+00&quot;);&quot;,&quot;;&quot;lc};&quot;)" office:value-type="string" office:string-value="Point(245) = {9.5491503E-02,y0,-4.6048828E-02,lc};" calcext:value-type="string">
            <text:p>Point(245) = {9.5491503E-02,y0,-4.604882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6" calcext:value-type="float">
            <text:p>246</text:p>
          </table:table-cell>
          <table:table-cell table:style-name="ce7" office:value-type="float" office:value="0.103323329854382" calcext:value-type="float">
            <text:p>1.033233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73789085636924" calcext:value-type="float">
            <text:p>-4.7378909E-02</text:p>
          </table:table-cell>
          <table:table-cell table:style-name="ce3"/>
          <table:table-cell table:style-name="ce3" table:formula="of:=CONCATENATE(&quot;Point(&quot;;[.C150];&quot;) = {&quot;;TEXT([.D150];&quot;0.0000000E+00&quot;);&quot;,&quot;;TEXT([.E150];&quot;0.0000000E+00&quot;);&quot;,&quot;;TEXT([.F150];&quot;0.0000000E+00&quot;);&quot;,&quot;;&quot;lc};&quot;)" office:value-type="string" office:string-value="Point(246) = {1.0332333E-01,y0,-4.7378909E-02,lc};" calcext:value-type="string">
            <text:p>Point(246) = {1.0332333E-01,y0,-4.737890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7" office:value-type="float" office:value="0.111427019271515" calcext:value-type="float">
            <text:p>1.114270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8647606888895" calcext:value-type="float">
            <text:p>-4.8647607E-02</text:p>
          </table:table-cell>
          <table:table-cell table:style-name="ce3"/>
          <table:table-cell table:style-name="ce3" table:formula="of:=CONCATENATE(&quot;Point(&quot;;[.C151];&quot;) = {&quot;;TEXT([.D151];&quot;0.0000000E+00&quot;);&quot;,&quot;;TEXT([.E151];&quot;0.0000000E+00&quot;);&quot;,&quot;;TEXT([.F151];&quot;0.0000000E+00&quot;);&quot;,&quot;;&quot;lc};&quot;)" office:value-type="string" office:string-value="Point(247) = {1.1142702E-01,y0,-4.8647607E-02,lc};" calcext:value-type="string">
            <text:p>Point(247) = {1.1142702E-01,y0,-4.864760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8" calcext:value-type="float">
            <text:p>248</text:p>
          </table:table-cell>
          <table:table-cell table:style-name="ce7" office:value-type="float" office:value="0.119797017199985" calcext:value-type="float">
            <text:p>1.197970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98535489258783" calcext:value-type="float">
            <text:p>-4.9853549E-02</text:p>
          </table:table-cell>
          <table:table-cell table:style-name="ce3"/>
          <table:table-cell table:style-name="ce3" table:formula="of:=CONCATENATE(&quot;Point(&quot;;[.C152];&quot;) = {&quot;;TEXT([.D152];&quot;0.0000000E+00&quot;);&quot;,&quot;;TEXT([.E152];&quot;0.0000000E+00&quot;);&quot;,&quot;;TEXT([.F152];&quot;0.0000000E+00&quot;);&quot;,&quot;;&quot;lc};&quot;)" office:value-type="string" office:string-value="Point(248) = {1.1979702E-01,y0,-4.9853549E-02,lc};" calcext:value-type="string">
            <text:p>Point(248) = {1.1979702E-01,y0,-4.985354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49" calcext:value-type="float">
            <text:p>249</text:p>
          </table:table-cell>
          <table:table-cell table:style-name="ce7" office:value-type="float" office:value="0.128427587261303" calcext:value-type="float">
            <text:p>1.284275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09954607409406" calcext:value-type="float">
            <text:p>-5.0995461E-02</text:p>
          </table:table-cell>
          <table:table-cell table:style-name="ce3"/>
          <table:table-cell table:style-name="ce3" table:formula="of:=CONCATENATE(&quot;Point(&quot;;[.C153];&quot;) = {&quot;;TEXT([.D153];&quot;0.0000000E+00&quot;);&quot;,&quot;;TEXT([.E153];&quot;0.0000000E+00&quot;);&quot;,&quot;;TEXT([.F153];&quot;0.0000000E+00&quot;);&quot;,&quot;;&quot;lc};&quot;)" office:value-type="string" office:string-value="Point(249) = {1.2842759E-01,y0,-5.0995461E-02,lc};" calcext:value-type="string">
            <text:p>Point(249) = {1.2842759E-01,y0,-5.099546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0" calcext:value-type="float">
            <text:p>250</text:p>
          </table:table-cell>
          <table:table-cell table:style-name="ce7" office:value-type="float" office:value="0.137312814493856" calcext:value-type="float">
            <text:p>1.373128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20721773088123" calcext:value-type="float">
            <text:p>-5.2072177E-02</text:p>
          </table:table-cell>
          <table:table-cell table:style-name="ce3"/>
          <table:table-cell table:style-name="ce3" table:formula="of:=CONCATENATE(&quot;Point(&quot;;[.C154];&quot;) = {&quot;;TEXT([.D154];&quot;0.0000000E+00&quot;);&quot;,&quot;;TEXT([.E154];&quot;0.0000000E+00&quot;);&quot;,&quot;;TEXT([.F154];&quot;0.0000000E+00&quot;);&quot;,&quot;;&quot;lc};&quot;)" office:value-type="string" office:string-value="Point(250) = {1.3731281E-01,y0,-5.2072177E-02,lc};" calcext:value-type="string">
            <text:p>Point(250) = {1.3731281E-01,y0,-5.207217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1" calcext:value-type="float">
            <text:p>251</text:p>
          </table:table-cell>
          <table:table-cell table:style-name="ce7" office:value-type="float" office:value="0.146446609406726" calcext:value-type="float">
            <text:p>1.464466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30826501229085" calcext:value-type="float">
            <text:p>-5.3082650E-02</text:p>
          </table:table-cell>
          <table:table-cell table:style-name="ce3"/>
          <table:table-cell table:style-name="ce3" table:formula="of:=CONCATENATE(&quot;Point(&quot;;[.C155];&quot;) = {&quot;;TEXT([.D155];&quot;0.0000000E+00&quot;);&quot;,&quot;;TEXT([.E155];&quot;0.0000000E+00&quot;);&quot;,&quot;;TEXT([.F155];&quot;0.0000000E+00&quot;);&quot;,&quot;;&quot;lc};&quot;)" office:value-type="string" office:string-value="Point(251) = {1.4644661E-01,y0,-5.3082650E-02,lc};" calcext:value-type="string">
            <text:p>Point(251) = {1.4644661E-01,y0,-5.308265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2" calcext:value-type="float">
            <text:p>252</text:p>
          </table:table-cell>
          <table:table-cell table:style-name="ce7" office:value-type="float" office:value="0.155822712153123" calcext:value-type="float">
            <text:p>1.558227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40259539769367" calcext:value-type="float">
            <text:p>-5.4025954E-02</text:p>
          </table:table-cell>
          <table:table-cell table:style-name="ce3"/>
          <table:table-cell table:style-name="ce3" table:formula="of:=CONCATENATE(&quot;Point(&quot;;[.C156];&quot;) = {&quot;;TEXT([.D156];&quot;0.0000000E+00&quot;);&quot;,&quot;;TEXT([.E156];&quot;0.0000000E+00&quot;);&quot;,&quot;;TEXT([.F156];&quot;0.0000000E+00&quot;);&quot;,&quot;;&quot;lc};&quot;)" office:value-type="string" office:string-value="Point(252) = {1.5582271E-01,y0,-5.4025954E-02,lc};" calcext:value-type="string">
            <text:p>Point(252) = {1.5582271E-01,y0,-5.4025954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3" calcext:value-type="float">
            <text:p>253</text:p>
          </table:table-cell>
          <table:table-cell table:style-name="ce7" office:value-type="float" office:value="0.165434696820571" calcext:value-type="float">
            <text:p>1.654347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49012928784368" calcext:value-type="float">
            <text:p>-5.4901293E-02</text:p>
          </table:table-cell>
          <table:table-cell table:style-name="ce3"/>
          <table:table-cell table:style-name="ce3" table:formula="of:=CONCATENATE(&quot;Point(&quot;;[.C157];&quot;) = {&quot;;TEXT([.D157];&quot;0.0000000E+00&quot;);&quot;,&quot;;TEXT([.E157];&quot;0.0000000E+00&quot;);&quot;,&quot;;TEXT([.F157];&quot;0.0000000E+00&quot;);&quot;,&quot;;&quot;lc};&quot;)" office:value-type="string" office:string-value="Point(253) = {1.6543470E-01,y0,-5.4901293E-02,lc};" calcext:value-type="string">
            <text:p>Point(253) = {1.6543470E-01,y0,-5.490129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4" calcext:value-type="float">
            <text:p>254</text:p>
          </table:table-cell>
          <table:table-cell table:style-name="ce7" office:value-type="float" office:value="0.175275975834908" calcext:value-type="float">
            <text:p>1.752759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57080050631394" calcext:value-type="float">
            <text:p>-5.5708005E-02</text:p>
          </table:table-cell>
          <table:table-cell table:style-name="ce3"/>
          <table:table-cell table:style-name="ce3" table:formula="of:=CONCATENATE(&quot;Point(&quot;;[.C158];&quot;) = {&quot;;TEXT([.D158];&quot;0.0000000E+00&quot;);&quot;,&quot;;TEXT([.E158];&quot;0.0000000E+00&quot;);&quot;,&quot;;TEXT([.F158];&quot;0.0000000E+00&quot;);&quot;,&quot;;&quot;lc};&quot;)" office:value-type="string" office:string-value="Point(254) = {1.7527598E-01,y0,-5.5708005E-02,lc};" calcext:value-type="string">
            <text:p>Point(254) = {1.7527598E-01,y0,-5.570800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5" calcext:value-type="float">
            <text:p>255</text:p>
          </table:table-cell>
          <table:table-cell table:style-name="ce7" office:value-type="float" office:value="0.185339804475081" calcext:value-type="float">
            <text:p>1.853398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64455670875139" calcext:value-type="float">
            <text:p>-5.6445567E-02</text:p>
          </table:table-cell>
          <table:table-cell table:style-name="ce3"/>
          <table:table-cell table:style-name="ce3" table:formula="of:=CONCATENATE(&quot;Point(&quot;;[.C159];&quot;) = {&quot;;TEXT([.D159];&quot;0.0000000E+00&quot;);&quot;,&quot;;TEXT([.E159];&quot;0.0000000E+00&quot;);&quot;,&quot;;TEXT([.F159];&quot;0.0000000E+00&quot;);&quot;,&quot;;&quot;lc};&quot;)" office:value-type="string" office:string-value="Point(255) = {1.8533980E-01,y0,-5.6445567E-02,lc};" calcext:value-type="string">
            <text:p>Point(255) = {1.8533980E-01,y0,-5.644556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6" calcext:value-type="float">
            <text:p>256</text:p>
          </table:table-cell>
          <table:table-cell table:style-name="ce7" office:value-type="float" office:value="0.19561928549564" calcext:value-type="float">
            <text:p>1.956192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71135969854671" calcext:value-type="float">
            <text:p>-5.7113597E-02</text:p>
          </table:table-cell>
          <table:table-cell table:style-name="ce3"/>
          <table:table-cell table:style-name="ce3" table:formula="of:=CONCATENATE(&quot;Point(&quot;;[.C160];&quot;) = {&quot;;TEXT([.D160];&quot;0.0000000E+00&quot;);&quot;,&quot;;TEXT([.E160];&quot;0.0000000E+00&quot;);&quot;,&quot;;TEXT([.F160];&quot;0.0000000E+00&quot;);&quot;,&quot;;&quot;lc};&quot;)" office:value-type="string" office:string-value="Point(256) = {1.9561929E-01,y0,-5.7113597E-02,lc};" calcext:value-type="string">
            <text:p>Point(256) = {1.9561929E-01,y0,-5.711359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7" calcext:value-type="float">
            <text:p>257</text:p>
          </table:table-cell>
          <table:table-cell table:style-name="ce7" office:value-type="float" office:value="0.206107373853763" calcext:value-type="float">
            <text:p>2.061073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77118564837423" calcext:value-type="float">
            <text:p>-5.7711856E-02</text:p>
          </table:table-cell>
          <table:table-cell table:style-name="ce3"/>
          <table:table-cell table:style-name="ce3" table:formula="of:=CONCATENATE(&quot;Point(&quot;;[.C161];&quot;) = {&quot;;TEXT([.D161];&quot;0.0000000E+00&quot;);&quot;,&quot;;TEXT([.E161];&quot;0.0000000E+00&quot;);&quot;,&quot;;TEXT([.F161];&quot;0.0000000E+00&quot;);&quot;,&quot;;&quot;lc};&quot;)" office:value-type="string" office:string-value="Point(257) = {2.0610737E-01,y0,-5.7711856E-02,lc};" calcext:value-type="string">
            <text:p>Point(257) = {2.0610737E-01,y0,-5.771185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8" calcext:value-type="float">
            <text:p>258</text:p>
          </table:table-cell>
          <table:table-cell table:style-name="ce7" office:value-type="float" office:value="0.216796881537584" calcext:value-type="float">
            <text:p>2.167968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82402522790943" calcext:value-type="float">
            <text:p>-5.8240252E-02</text:p>
          </table:table-cell>
          <table:table-cell table:style-name="ce3"/>
          <table:table-cell table:style-name="ce3" table:formula="of:=CONCATENATE(&quot;Point(&quot;;[.C162];&quot;) = {&quot;;TEXT([.D162];&quot;0.0000000E+00&quot;);&quot;,&quot;;TEXT([.E162];&quot;0.0000000E+00&quot;);&quot;,&quot;;TEXT([.F162];&quot;0.0000000E+00&quot;);&quot;,&quot;;&quot;lc};&quot;)" office:value-type="string" office:string-value="Point(258) = {2.1679688E-01,y0,-5.8240252E-02,lc};" calcext:value-type="string">
            <text:p>Point(258) = {2.1679688E-01,y0,-5.824025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59" calcext:value-type="float">
            <text:p>259</text:p>
          </table:table-cell>
          <table:table-cell table:style-name="ce7" office:value-type="float" office:value="0.227680482492486" calcext:value-type="float">
            <text:p>2.276804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8698836388671" calcext:value-type="float">
            <text:p>-5.8698836E-02</text:p>
          </table:table-cell>
          <table:table-cell table:style-name="ce3"/>
          <table:table-cell table:style-name="ce3" table:formula="of:=CONCATENATE(&quot;Point(&quot;;[.C163];&quot;) = {&quot;;TEXT([.D163];&quot;0.0000000E+00&quot;);&quot;,&quot;;TEXT([.E163];&quot;0.0000000E+00&quot;);&quot;,&quot;;TEXT([.F163];&quot;0.0000000E+00&quot;);&quot;,&quot;;&quot;lc};&quot;)" office:value-type="string" office:string-value="Point(259) = {2.2768048E-01,y0,-5.8698836E-02,lc};" calcext:value-type="string">
            <text:p>Point(259) = {2.2768048E-01,y0,-5.869883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0" calcext:value-type="float">
            <text:p>260</text:p>
          </table:table-cell>
          <table:table-cell table:style-name="ce7" office:value-type="float" office:value="0.238750717642026" calcext:value-type="float">
            <text:p>2.387507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0878055931527" calcext:value-type="float">
            <text:p>-5.9087806E-02</text:p>
          </table:table-cell>
          <table:table-cell table:style-name="ce3"/>
          <table:table-cell table:style-name="ce3" table:formula="of:=CONCATENATE(&quot;Point(&quot;;[.C164];&quot;) = {&quot;;TEXT([.D164];&quot;0.0000000E+00&quot;);&quot;,&quot;;TEXT([.E164];&quot;0.0000000E+00&quot;);&quot;,&quot;;TEXT([.F164];&quot;0.0000000E+00&quot;);&quot;,&quot;;&quot;lc};&quot;)" office:value-type="string" office:string-value="Point(260) = {2.3875072E-01,y0,-5.9087806E-02,lc};" calcext:value-type="string">
            <text:p>Point(260) = {2.3875072E-01,y0,-5.908780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1" calcext:value-type="float">
            <text:p>261</text:p>
          </table:table-cell>
          <table:table-cell table:style-name="ce7" office:value-type="float" office:value="0.25" calcext:value-type="float">
            <text:p>2.500000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4075" calcext:value-type="float">
            <text:p>-5.9407500E-02</text:p>
          </table:table-cell>
          <table:table-cell table:style-name="ce3"/>
          <table:table-cell table:style-name="ce3" table:formula="of:=CONCATENATE(&quot;Point(&quot;;[.C165];&quot;) = {&quot;;TEXT([.D165];&quot;0.0000000E+00&quot;);&quot;,&quot;;TEXT([.E165];&quot;0.0000000E+00&quot;);&quot;,&quot;;TEXT([.F165];&quot;0.0000000E+00&quot;);&quot;,&quot;;&quot;lc};&quot;)" office:value-type="string" office:string-value="Point(261) = {2.5000000E-01,y0,-5.9407500E-02,lc};" calcext:value-type="string">
            <text:p>Point(261) = {2.5000000E-01,y0,-5.940750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2" calcext:value-type="float">
            <text:p>262</text:p>
          </table:table-cell>
          <table:table-cell table:style-name="ce7" office:value-type="float" office:value="0.261420619870196" calcext:value-type="float">
            <text:p>2.614206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6584007615625" calcext:value-type="float">
            <text:p>-5.9658401E-02</text:p>
          </table:table-cell>
          <table:table-cell table:style-name="ce3"/>
          <table:table-cell table:style-name="ce3" table:formula="of:=CONCATENATE(&quot;Point(&quot;;[.C166];&quot;) = {&quot;;TEXT([.D166];&quot;0.0000000E+00&quot;);&quot;,&quot;;TEXT([.E166];&quot;0.0000000E+00&quot;);&quot;,&quot;;TEXT([.F166];&quot;0.0000000E+00&quot;);&quot;,&quot;;&quot;lc};&quot;)" office:value-type="string" office:string-value="Point(262) = {2.6142062E-01,y0,-5.9658401E-02,lc};" calcext:value-type="string">
            <text:p>Point(262) = {2.6142062E-01,y0,-5.965840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3" calcext:value-type="float">
            <text:p>263</text:p>
          </table:table-cell>
          <table:table-cell table:style-name="ce7" office:value-type="float" office:value="0.273004750130227" calcext:value-type="float">
            <text:p>2.730047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8411269897428" calcext:value-type="float">
            <text:p>-5.9841127E-02</text:p>
          </table:table-cell>
          <table:table-cell table:style-name="ce3"/>
          <table:table-cell table:style-name="ce3" table:formula="of:=CONCATENATE(&quot;Point(&quot;;[.C167];&quot;) = {&quot;;TEXT([.D167];&quot;0.0000000E+00&quot;);&quot;,&quot;;TEXT([.E167];&quot;0.0000000E+00&quot;);&quot;,&quot;;TEXT([.F167];&quot;0.0000000E+00&quot;);&quot;,&quot;;&quot;lc};&quot;)" office:value-type="string" office:string-value="Point(263) = {2.7300475E-01,y0,-5.9841127E-02,lc};" calcext:value-type="string">
            <text:p>Point(263) = {2.7300475E-01,y0,-5.984112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4" calcext:value-type="float">
            <text:p>264</text:p>
          </table:table-cell>
          <table:table-cell table:style-name="ce7" office:value-type="float" office:value="0.284744451595852" calcext:value-type="float">
            <text:p>2.847444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9564319153178" calcext:value-type="float">
            <text:p>-5.9956432E-02</text:p>
          </table:table-cell>
          <table:table-cell table:style-name="ce3"/>
          <table:table-cell table:style-name="ce3" table:formula="of:=CONCATENATE(&quot;Point(&quot;;[.C168];&quot;) = {&quot;;TEXT([.D168];&quot;0.0000000E+00&quot;);&quot;,&quot;;TEXT([.E168];&quot;0.0000000E+00&quot;);&quot;,&quot;;TEXT([.F168];&quot;0.0000000E+00&quot;);&quot;,&quot;;&quot;lc};&quot;)" office:value-type="string" office:string-value="Point(264) = {2.8474445E-01,y0,-5.9956432E-02,lc};" calcext:value-type="string">
            <text:p>Point(264) = {2.8474445E-01,y0,-5.995643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5" calcext:value-type="float">
            <text:p>265</text:p>
          </table:table-cell>
          <table:table-cell table:style-name="ce7" office:value-type="float" office:value="0.2966316784621" calcext:value-type="float">
            <text:p>2.966316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60005198345846" calcext:value-type="float">
            <text:p>-6.0005198E-02</text:p>
          </table:table-cell>
          <table:table-cell table:style-name="ce3"/>
          <table:table-cell table:style-name="ce3" table:formula="of:=CONCATENATE(&quot;Point(&quot;;[.C169];&quot;) = {&quot;;TEXT([.D169];&quot;0.0000000E+00&quot;);&quot;,&quot;;TEXT([.E169];&quot;0.0000000E+00&quot;);&quot;,&quot;;TEXT([.F169];&quot;0.0000000E+00&quot;);&quot;,&quot;;&quot;lc};&quot;)" office:value-type="string" office:string-value="Point(265) = {2.9663168E-01,y0,-6.0005198E-02,lc};" calcext:value-type="string">
            <text:p>Point(265) = {2.9663168E-01,y0,-6.000519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7" office:value-type="float" office:value="0.308658283817455" calcext:value-type="float">
            <text:p>3.086582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988433481268" calcext:value-type="float">
            <text:p>-5.9988433E-02</text:p>
          </table:table-cell>
          <table:table-cell table:style-name="ce3"/>
          <table:table-cell table:style-name="ce3" table:formula="of:=CONCATENATE(&quot;Point(&quot;;[.C170];&quot;) = {&quot;;TEXT([.D170];&quot;0.0000000E+00&quot;);&quot;,&quot;;TEXT([.E170];&quot;0.0000000E+00&quot;);&quot;,&quot;;TEXT([.F170];&quot;0.0000000E+00&quot;);&quot;,&quot;;&quot;lc};&quot;)" office:value-type="string" office:string-value="Point(266) = {3.0865828E-01,y0,-5.9988433E-02,lc};" calcext:value-type="string">
            <text:p>Point(266) = {3.0865828E-01,y0,-5.998843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7" calcext:value-type="float">
            <text:p>267</text:p>
          </table:table-cell>
          <table:table-cell table:style-name="ce7" office:value-type="float" office:value="0.32081602522735" calcext:value-type="float">
            <text:p>3.208160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9072631508117" calcext:value-type="float">
            <text:p>-5.9907263E-02</text:p>
          </table:table-cell>
          <table:table-cell table:style-name="ce3"/>
          <table:table-cell table:style-name="ce3" table:formula="of:=CONCATENATE(&quot;Point(&quot;;[.C171];&quot;) = {&quot;;TEXT([.D171];&quot;0.0000000E+00&quot;);&quot;,&quot;;TEXT([.E171];&quot;0.0000000E+00&quot;);&quot;,&quot;;TEXT([.F171];&quot;0.0000000E+00&quot;);&quot;,&quot;;&quot;lc};&quot;)" office:value-type="string" office:string-value="Point(267) = {3.2081603E-01,y0,-5.9907263E-02,lc};" calcext:value-type="string">
            <text:p>Point(267) = {3.2081603E-01,y0,-5.990726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8" calcext:value-type="float">
            <text:p>268</text:p>
          </table:table-cell>
          <table:table-cell table:style-name="ce7" office:value-type="float" office:value="0.333096570383115" calcext:value-type="float">
            <text:p>3.330965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7629255385877" calcext:value-type="float">
            <text:p>-5.9762926E-02</text:p>
          </table:table-cell>
          <table:table-cell table:style-name="ce3"/>
          <table:table-cell table:style-name="ce3" table:formula="of:=CONCATENATE(&quot;Point(&quot;;[.C172];&quot;) = {&quot;;TEXT([.D172];&quot;0.0000000E+00&quot;);&quot;,&quot;;TEXT([.E172];&quot;0.0000000E+00&quot;);&quot;,&quot;;TEXT([.F172];&quot;0.0000000E+00&quot;);&quot;,&quot;;&quot;lc};&quot;)" office:value-type="string" office:string-value="Point(268) = {3.3309657E-01,y0,-5.9762926E-02,lc};" calcext:value-type="string">
            <text:p>Point(268) = {3.3309657E-01,y0,-5.976292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69" calcext:value-type="float">
            <text:p>269</text:p>
          </table:table-cell>
          <table:table-cell table:style-name="ce7" office:value-type="float" office:value="0.345491502812526" calcext:value-type="float">
            <text:p>3.454915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556764468292" calcext:value-type="float">
            <text:p>-5.9556764E-02</text:p>
          </table:table-cell>
          <table:table-cell table:style-name="ce3"/>
          <table:table-cell table:style-name="ce3" table:formula="of:=CONCATENATE(&quot;Point(&quot;;[.C173];&quot;) = {&quot;;TEXT([.D173];&quot;0.0000000E+00&quot;);&quot;,&quot;;TEXT([.E173];&quot;0.0000000E+00&quot;);&quot;,&quot;;TEXT([.F173];&quot;0.0000000E+00&quot;);&quot;,&quot;;&quot;lc};&quot;)" office:value-type="string" office:string-value="Point(269) = {3.4549150E-01,y0,-5.9556764E-02,lc};" calcext:value-type="string">
            <text:p>Point(269) = {3.4549150E-01,y0,-5.9556764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0" calcext:value-type="float">
            <text:p>270</text:p>
          </table:table-cell>
          <table:table-cell table:style-name="ce7" office:value-type="float" office:value="0.357992327648039" calcext:value-type="float">
            <text:p>3.579923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92902223196843" calcext:value-type="float">
            <text:p>-5.9290222E-02</text:p>
          </table:table-cell>
          <table:table-cell table:style-name="ce3"/>
          <table:table-cell table:style-name="ce3" table:formula="of:=CONCATENATE(&quot;Point(&quot;;[.C174];&quot;) = {&quot;;TEXT([.D174];&quot;0.0000000E+00&quot;);&quot;,&quot;;TEXT([.E174];&quot;0.0000000E+00&quot;);&quot;,&quot;;TEXT([.F174];&quot;0.0000000E+00&quot;);&quot;,&quot;;&quot;lc};&quot;)" office:value-type="string" office:string-value="Point(270) = {3.5799233E-01,y0,-5.9290222E-02,lc};" calcext:value-type="string">
            <text:p>Point(270) = {3.5799233E-01,y0,-5.929022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1" calcext:value-type="float">
            <text:p>271</text:p>
          </table:table-cell>
          <table:table-cell table:style-name="ce7" office:value-type="float" office:value="0.37059047744874" calcext:value-type="float">
            <text:p>3.705904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89648326509882" calcext:value-type="float">
            <text:p>-5.8964833E-02</text:p>
          </table:table-cell>
          <table:table-cell table:style-name="ce3"/>
          <table:table-cell table:style-name="ce3" table:formula="of:=CONCATENATE(&quot;Point(&quot;;[.C175];&quot;) = {&quot;;TEXT([.D175];&quot;0.0000000E+00&quot;);&quot;,&quot;;TEXT([.E175];&quot;0.0000000E+00&quot;);&quot;,&quot;;TEXT([.F175];&quot;0.0000000E+00&quot;);&quot;,&quot;;&quot;lc};&quot;)" office:value-type="string" office:string-value="Point(271) = {3.7059048E-01,y0,-5.8964833E-02,lc};" calcext:value-type="string">
            <text:p>Point(271) = {3.7059048E-01,y0,-5.896483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2" calcext:value-type="float">
            <text:p>272</text:p>
          </table:table-cell>
          <table:table-cell table:style-name="ce7" office:value-type="float" office:value="0.383277318072047" calcext:value-type="float">
            <text:p>3.832773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85822126020352" calcext:value-type="float">
            <text:p>-5.8582213E-02</text:p>
          </table:table-cell>
          <table:table-cell table:style-name="ce3"/>
          <table:table-cell table:style-name="ce3" table:formula="of:=CONCATENATE(&quot;Point(&quot;;[.C176];&quot;) = {&quot;;TEXT([.D176];&quot;0.0000000E+00&quot;);&quot;,&quot;;TEXT([.E176];&quot;0.0000000E+00&quot;);&quot;,&quot;;TEXT([.F176];&quot;0.0000000E+00&quot;);&quot;,&quot;;&quot;lc};&quot;)" office:value-type="string" office:string-value="Point(272) = {3.8327732E-01,y0,-5.8582213E-02,lc};" calcext:value-type="string">
            <text:p>Point(272) = {3.8327732E-01,y0,-5.858221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3" calcext:value-type="float">
            <text:p>273</text:p>
          </table:table-cell>
          <table:table-cell table:style-name="ce7" office:value-type="float" office:value="0.39604415459112" calcext:value-type="float">
            <text:p>3.960441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81440551528807" calcext:value-type="float">
            <text:p>-5.8144055E-02</text:p>
          </table:table-cell>
          <table:table-cell table:style-name="ce3"/>
          <table:table-cell table:style-name="ce3" table:formula="of:=CONCATENATE(&quot;Point(&quot;;[.C177];&quot;) = {&quot;;TEXT([.D177];&quot;0.0000000E+00&quot;);&quot;,&quot;;TEXT([.E177];&quot;0.0000000E+00&quot;);&quot;,&quot;;TEXT([.F177];&quot;0.0000000E+00&quot;);&quot;,&quot;;&quot;lc};&quot;)" office:value-type="string" office:string-value="Point(273) = {3.9604415E-01,y0,-5.8144055E-02,lc};" calcext:value-type="string">
            <text:p>Point(273) = {3.9604415E-01,y0,-5.814405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4" calcext:value-type="float">
            <text:p>274</text:p>
          </table:table-cell>
          <table:table-cell table:style-name="ce7" office:value-type="float" office:value="0.408882237253926" calcext:value-type="float">
            <text:p>4.0888224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76521213117386" calcext:value-type="float">
            <text:p>-5.7652121E-02</text:p>
          </table:table-cell>
          <table:table-cell table:style-name="ce3"/>
          <table:table-cell table:style-name="ce3" table:formula="of:=CONCATENATE(&quot;Point(&quot;;[.C178];&quot;) = {&quot;;TEXT([.D178];&quot;0.0000000E+00&quot;);&quot;,&quot;;TEXT([.E178];&quot;0.0000000E+00&quot;);&quot;,&quot;;TEXT([.F178];&quot;0.0000000E+00&quot;);&quot;,&quot;;&quot;lc};&quot;)" office:value-type="string" office:string-value="Point(274) = {4.0888224E-01,y0,-5.7652121E-02,lc};" calcext:value-type="string">
            <text:p>Point(274) = {4.0888224E-01,y0,-5.765212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5" calcext:value-type="float">
            <text:p>275</text:p>
          </table:table-cell>
          <table:table-cell table:style-name="ce7" office:value-type="float" office:value="0.421782767479885" calcext:value-type="float">
            <text:p>4.217827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71082323044601" calcext:value-type="float">
            <text:p>-5.7108232E-02</text:p>
          </table:table-cell>
          <table:table-cell table:style-name="ce3"/>
          <table:table-cell table:style-name="ce3" table:formula="of:=CONCATENATE(&quot;Point(&quot;;[.C179];&quot;) = {&quot;;TEXT([.D179];&quot;0.0000000E+00&quot;);&quot;,&quot;;TEXT([.E179];&quot;0.0000000E+00&quot;);&quot;,&quot;;TEXT([.F179];&quot;0.0000000E+00&quot;);&quot;,&quot;;&quot;lc};&quot;)" office:value-type="string" office:string-value="Point(275) = {4.2178277E-01,y0,-5.7108232E-02,lc};" calcext:value-type="string">
            <text:p>Point(275) = {4.2178277E-01,y0,-5.710823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6" calcext:value-type="float">
            <text:p>276</text:p>
          </table:table-cell>
          <table:table-cell table:style-name="ce7" office:value-type="float" office:value="0.434736903889974" calcext:value-type="float">
            <text:p>4.347369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65142618354297" calcext:value-type="float">
            <text:p>-5.6514262E-02</text:p>
          </table:table-cell>
          <table:table-cell table:style-name="ce3"/>
          <table:table-cell table:style-name="ce3" table:formula="of:=CONCATENATE(&quot;Point(&quot;;[.C180];&quot;) = {&quot;;TEXT([.D180];&quot;0.0000000E+00&quot;);&quot;,&quot;;TEXT([.E180];&quot;0.0000000E+00&quot;);&quot;,&quot;;TEXT([.F180];&quot;0.0000000E+00&quot;);&quot;,&quot;;&quot;lc};&quot;)" office:value-type="string" office:string-value="Point(276) = {4.3473690E-01,y0,-5.6514262E-02,lc};" calcext:value-type="string">
            <text:p>Point(276) = {4.3473690E-01,y0,-5.651426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7" calcext:value-type="float">
            <text:p>277</text:p>
          </table:table-cell>
          <table:table-cell table:style-name="ce7" office:value-type="float" office:value="0.447735768366173" calcext:value-type="float">
            <text:p>4.477357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58721284867123" calcext:value-type="float">
            <text:p>-5.5872128E-02</text:p>
          </table:table-cell>
          <table:table-cell table:style-name="ce3"/>
          <table:table-cell table:style-name="ce3" table:formula="of:=CONCATENATE(&quot;Point(&quot;;[.C181];&quot;) = {&quot;;TEXT([.D181];&quot;0.0000000E+00&quot;);&quot;,&quot;;TEXT([.E181];&quot;0.0000000E+00&quot;);&quot;,&quot;;TEXT([.F181];&quot;0.0000000E+00&quot;);&quot;,&quot;;&quot;lc};&quot;)" office:value-type="string" office:string-value="Point(277) = {4.4773577E-01,y0,-5.5872128E-02,lc};" calcext:value-type="string">
            <text:p>Point(277) = {4.4773577E-01,y0,-5.587212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8" calcext:value-type="float">
            <text:p>278</text:p>
          </table:table-cell>
          <table:table-cell table:style-name="ce7" office:value-type="float" office:value="0.460770452136078" calcext:value-type="float">
            <text:p>4.607704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51837883186037" calcext:value-type="float">
            <text:p>-5.5183788E-02</text:p>
          </table:table-cell>
          <table:table-cell table:style-name="ce3"/>
          <table:table-cell table:style-name="ce3" table:formula="of:=CONCATENATE(&quot;Point(&quot;;[.C182];&quot;) = {&quot;;TEXT([.D182];&quot;0.0000000E+00&quot;);&quot;,&quot;;TEXT([.E182];&quot;0.0000000E+00&quot;);&quot;,&quot;;TEXT([.F182];&quot;0.0000000E+00&quot;);&quot;,&quot;;&quot;lc};&quot;)" office:value-type="string" office:string-value="Point(278) = {4.6077045E-01,y0,-5.5183788E-02,lc};" calcext:value-type="string">
            <text:p>Point(278) = {4.6077045E-01,y0,-5.518378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79" calcext:value-type="float">
            <text:p>279</text:p>
          </table:table-cell>
          <table:table-cell table:style-name="ce7" office:value-type="float" office:value="0.473832021878528" calcext:value-type="float">
            <text:p>4.738320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44512277304519" calcext:value-type="float">
            <text:p>-5.4451228E-02</text:p>
          </table:table-cell>
          <table:table-cell table:style-name="ce3"/>
          <table:table-cell table:style-name="ce3" table:formula="of:=CONCATENATE(&quot;Point(&quot;;[.C183];&quot;) = {&quot;;TEXT([.D183];&quot;0.0000000E+00&quot;);&quot;,&quot;;TEXT([.E183];&quot;0.0000000E+00&quot;);&quot;,&quot;;TEXT([.F183];&quot;0.0000000E+00&quot;);&quot;,&quot;;&quot;lc};&quot;)" office:value-type="string" office:string-value="Point(279) = {4.7383202E-01,y0,-5.4451228E-02,lc};" calcext:value-type="string">
            <text:p>Point(279) = {4.7383202E-01,y0,-5.445122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0" calcext:value-type="float">
            <text:p>280</text:p>
          </table:table-cell>
          <table:table-cell table:style-name="ce7" office:value-type="float" office:value="0.486911525846063" calcext:value-type="float">
            <text:p>4.869115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36764566357969" calcext:value-type="float">
            <text:p>-5.3676457E-02</text:p>
          </table:table-cell>
          <table:table-cell table:style-name="ce3"/>
          <table:table-cell table:style-name="ce3" table:formula="of:=CONCATENATE(&quot;Point(&quot;;[.C184];&quot;) = {&quot;;TEXT([.D184];&quot;0.0000000E+00&quot;);&quot;,&quot;;TEXT([.E184];&quot;0.0000000E+00&quot;);&quot;,&quot;;TEXT([.F184];&quot;0.0000000E+00&quot;);&quot;,&quot;;&quot;lc};&quot;)" office:value-type="string" office:string-value="Point(280) = {4.8691153E-01,y0,-5.3676457E-02,lc};" calcext:value-type="string">
            <text:p>Point(280) = {4.8691153E-01,y0,-5.367645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1" calcext:value-type="float">
            <text:p>281</text:p>
          </table:table-cell>
          <table:table-cell table:style-name="ce7" office:value-type="float" office:value="0.5" calcext:value-type="float">
            <text:p>5.000000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28615020005716" calcext:value-type="float">
            <text:p>-5.2861502E-02</text:p>
          </table:table-cell>
          <table:table-cell table:style-name="ce3"/>
          <table:table-cell table:style-name="ce3" table:formula="of:=CONCATENATE(&quot;Point(&quot;;[.C185];&quot;) = {&quot;;TEXT([.D185];&quot;0.0000000E+00&quot;);&quot;,&quot;;TEXT([.E185];&quot;0.0000000E+00&quot;);&quot;,&quot;;TEXT([.F185];&quot;0.0000000E+00&quot;);&quot;,&quot;;&quot;lc};&quot;)" office:value-type="string" office:string-value="Point(281) = {5.0000000E-01,y0,-5.2861502E-02,lc};" calcext:value-type="string">
            <text:p>Point(281) = {5.0000000E-01,y0,-5.286150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2" calcext:value-type="float">
            <text:p>282</text:p>
          </table:table-cell>
          <table:table-cell table:style-name="ce7" office:value-type="float" office:value="0.513088474153937" calcext:value-type="float">
            <text:p>5.130884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20084017873851" calcext:value-type="float">
            <text:p>-5.2008402E-02</text:p>
          </table:table-cell>
          <table:table-cell table:style-name="ce3"/>
          <table:table-cell table:style-name="ce3" table:formula="of:=CONCATENATE(&quot;Point(&quot;;[.C186];&quot;) = {&quot;;TEXT([.D186];&quot;0.0000000E+00&quot;);&quot;,&quot;;TEXT([.E186];&quot;0.0000000E+00&quot;);&quot;,&quot;;TEXT([.F186];&quot;0.0000000E+00&quot;);&quot;,&quot;;&quot;lc};&quot;)" office:value-type="string" office:string-value="Point(282) = {5.1308847E-01,y0,-5.2008402E-02,lc};" calcext:value-type="string">
            <text:p>Point(282) = {5.1308847E-01,y0,-5.200840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3" calcext:value-type="float">
            <text:p>283</text:p>
          </table:table-cell>
          <table:table-cell table:style-name="ce7" office:value-type="float" office:value="0.526167978121472" calcext:value-type="float">
            <text:p>5.261679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11191993428425" calcext:value-type="float">
            <text:p>-5.1119199E-02</text:p>
          </table:table-cell>
          <table:table-cell table:style-name="ce3"/>
          <table:table-cell table:style-name="ce3" table:formula="of:=CONCATENATE(&quot;Point(&quot;;[.C187];&quot;) = {&quot;;TEXT([.D187];&quot;0.0000000E+00&quot;);&quot;,&quot;;TEXT([.E187];&quot;0.0000000E+00&quot;);&quot;,&quot;;TEXT([.F187];&quot;0.0000000E+00&quot;);&quot;,&quot;;&quot;lc};&quot;)" office:value-type="string" office:string-value="Point(283) = {5.2616798E-01,y0,-5.1119199E-02,lc};" calcext:value-type="string">
            <text:p>Point(283) = {5.2616798E-01,y0,-5.111919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4" calcext:value-type="float">
            <text:p>284</text:p>
          </table:table-cell>
          <table:table-cell table:style-name="ce7" office:value-type="float" office:value="0.539229547863922" calcext:value-type="float">
            <text:p>5.392295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501959382585087" calcext:value-type="float">
            <text:p>-5.0195938E-02</text:p>
          </table:table-cell>
          <table:table-cell table:style-name="ce3"/>
          <table:table-cell table:style-name="ce3" table:formula="of:=CONCATENATE(&quot;Point(&quot;;[.C188];&quot;) = {&quot;;TEXT([.D188];&quot;0.0000000E+00&quot;);&quot;,&quot;;TEXT([.E188];&quot;0.0000000E+00&quot;);&quot;,&quot;;TEXT([.F188];&quot;0.0000000E+00&quot;);&quot;,&quot;;&quot;lc};&quot;)" office:value-type="string" office:string-value="Point(284) = {5.3922955E-01,y0,-5.0195938E-02,lc};" calcext:value-type="string">
            <text:p>Point(284) = {5.3922955E-01,y0,-5.019593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7" office:value-type="float" office:value="0.552264231633827" calcext:value-type="float">
            <text:p>5.522642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92406577295794" calcext:value-type="float">
            <text:p>-4.9240658E-02</text:p>
          </table:table-cell>
          <table:table-cell table:style-name="ce3"/>
          <table:table-cell table:style-name="ce3" table:formula="of:=CONCATENATE(&quot;Point(&quot;;[.C189];&quot;) = {&quot;;TEXT([.D189];&quot;0.0000000E+00&quot;);&quot;,&quot;;TEXT([.E189];&quot;0.0000000E+00&quot;);&quot;,&quot;;TEXT([.F189];&quot;0.0000000E+00&quot;);&quot;,&quot;;&quot;lc};&quot;)" office:value-type="string" office:string-value="Point(285) = {5.5226423E-01,y0,-4.9240658E-02,lc};" calcext:value-type="string">
            <text:p>Point(285) = {5.5226423E-01,y0,-4.924065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6" calcext:value-type="float">
            <text:p>286</text:p>
          </table:table-cell>
          <table:table-cell table:style-name="ce7" office:value-type="float" office:value="0.565263096110026" calcext:value-type="float">
            <text:p>5.652631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82553884286467" calcext:value-type="float">
            <text:p>-4.8255388E-02</text:p>
          </table:table-cell>
          <table:table-cell table:style-name="ce3"/>
          <table:table-cell table:style-name="ce3" table:formula="of:=CONCATENATE(&quot;Point(&quot;;[.C190];&quot;) = {&quot;;TEXT([.D190];&quot;0.0000000E+00&quot;);&quot;,&quot;;TEXT([.E190];&quot;0.0000000E+00&quot;);&quot;,&quot;;TEXT([.F190];&quot;0.0000000E+00&quot;);&quot;,&quot;;&quot;lc};&quot;)" office:value-type="string" office:string-value="Point(286) = {5.6526310E-01,y0,-4.8255388E-02,lc};" calcext:value-type="string">
            <text:p>Point(286) = {5.6526310E-01,y0,-4.825538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7" calcext:value-type="float">
            <text:p>287</text:p>
          </table:table-cell>
          <table:table-cell table:style-name="ce7" office:value-type="float" office:value="0.578217232520115" calcext:value-type="float">
            <text:p>5.782172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72421489052245" calcext:value-type="float">
            <text:p>-4.7242149E-02</text:p>
          </table:table-cell>
          <table:table-cell table:style-name="ce3"/>
          <table:table-cell table:style-name="ce3" table:formula="of:=CONCATENATE(&quot;Point(&quot;;[.C191];&quot;) = {&quot;;TEXT([.D191];&quot;0.0000000E+00&quot;);&quot;,&quot;;TEXT([.E191];&quot;0.0000000E+00&quot;);&quot;,&quot;;TEXT([.F191];&quot;0.0000000E+00&quot;);&quot;,&quot;;&quot;lc};&quot;)" office:value-type="string" office:string-value="Point(287) = {5.7821723E-01,y0,-4.7242149E-02,lc};" calcext:value-type="string">
            <text:p>Point(287) = {5.7821723E-01,y0,-4.724214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8" calcext:value-type="float">
            <text:p>288</text:p>
          </table:table-cell>
          <table:table-cell table:style-name="ce7" office:value-type="float" office:value="0.591117762746074" calcext:value-type="float">
            <text:p>5.911177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6202942514998" calcext:value-type="float">
            <text:p>-4.6202943E-02</text:p>
          </table:table-cell>
          <table:table-cell table:style-name="ce3"/>
          <table:table-cell table:style-name="ce3" table:formula="of:=CONCATENATE(&quot;Point(&quot;;[.C192];&quot;) = {&quot;;TEXT([.D192];&quot;0.0000000E+00&quot;);&quot;,&quot;;TEXT([.E192];&quot;0.0000000E+00&quot;);&quot;,&quot;;TEXT([.F192];&quot;0.0000000E+00&quot;);&quot;,&quot;;&quot;lc};&quot;)" office:value-type="string" office:string-value="Point(288) = {5.9111776E-01,y0,-4.6202943E-02,lc};" calcext:value-type="string">
            <text:p>Point(288) = {5.9111776E-01,y0,-4.620294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89" calcext:value-type="float">
            <text:p>289</text:p>
          </table:table-cell>
          <table:table-cell table:style-name="ce7" office:value-type="float" office:value="0.60395584540888" calcext:value-type="float">
            <text:p>6.039558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51397548761643" calcext:value-type="float">
            <text:p>-4.5139755E-02</text:p>
          </table:table-cell>
          <table:table-cell table:style-name="ce3"/>
          <table:table-cell table:style-name="ce3" table:formula="of:=CONCATENATE(&quot;Point(&quot;;[.C193];&quot;) = {&quot;;TEXT([.D193];&quot;0.0000000E+00&quot;);&quot;,&quot;;TEXT([.E193];&quot;0.0000000E+00&quot;);&quot;,&quot;;TEXT([.F193];&quot;0.0000000E+00&quot;);&quot;,&quot;;&quot;lc};&quot;)" office:value-type="string" office:string-value="Point(289) = {6.0395585E-01,y0,-4.5139755E-02,lc};" calcext:value-type="string">
            <text:p>Point(289) = {6.0395585E-01,y0,-4.513975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0" calcext:value-type="float">
            <text:p>290</text:p>
          </table:table-cell>
          <table:table-cell table:style-name="ce7" office:value-type="float" office:value="0.616722681927953" calcext:value-type="float">
            <text:p>6.167226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40545518438032" calcext:value-type="float">
            <text:p>-4.4054552E-02</text:p>
          </table:table-cell>
          <table:table-cell table:style-name="ce3"/>
          <table:table-cell table:style-name="ce3" table:formula="of:=CONCATENATE(&quot;Point(&quot;;[.C194];&quot;) = {&quot;;TEXT([.D194];&quot;0.0000000E+00&quot;);&quot;,&quot;;TEXT([.E194];&quot;0.0000000E+00&quot;);&quot;,&quot;;TEXT([.F194];&quot;0.0000000E+00&quot;);&quot;,&quot;;&quot;lc};&quot;)" office:value-type="string" office:string-value="Point(290) = {6.1672268E-01,y0,-4.4054552E-02,lc};" calcext:value-type="string">
            <text:p>Point(290) = {6.1672268E-01,y0,-4.405455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1" calcext:value-type="float">
            <text:p>291</text:p>
          </table:table-cell>
          <table:table-cell table:style-name="ce7" office:value-type="float" office:value="0.62940952255126" calcext:value-type="float">
            <text:p>6.294095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2949277987034" calcext:value-type="float">
            <text:p>-4.2949278E-02</text:p>
          </table:table-cell>
          <table:table-cell table:style-name="ce3"/>
          <table:table-cell table:style-name="ce3" table:formula="of:=CONCATENATE(&quot;Point(&quot;;[.C195];&quot;) = {&quot;;TEXT([.D195];&quot;0.0000000E+00&quot;);&quot;,&quot;;TEXT([.E195];&quot;0.0000000E+00&quot;);&quot;,&quot;;TEXT([.F195];&quot;0.0000000E+00&quot;);&quot;,&quot;;&quot;lc};&quot;)" office:value-type="string" office:string-value="Point(291) = {6.2940952E-01,y0,-4.2949278E-02,lc};" calcext:value-type="string">
            <text:p>Point(291) = {6.2940952E-01,y0,-4.294927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2" calcext:value-type="float">
            <text:p>292</text:p>
          </table:table-cell>
          <table:table-cell table:style-name="ce7" office:value-type="float" office:value="0.642007672351961" calcext:value-type="float">
            <text:p>6.420076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18258555478396" calcext:value-type="float">
            <text:p>-4.1825856E-02</text:p>
          </table:table-cell>
          <table:table-cell table:style-name="ce3"/>
          <table:table-cell table:style-name="ce3" table:formula="of:=CONCATENATE(&quot;Point(&quot;;[.C196];&quot;) = {&quot;;TEXT([.D196];&quot;0.0000000E+00&quot;);&quot;,&quot;;TEXT([.E196];&quot;0.0000000E+00&quot;);&quot;,&quot;;TEXT([.F196];&quot;0.0000000E+00&quot;);&quot;,&quot;;&quot;lc};&quot;)" office:value-type="string" office:string-value="Point(292) = {6.4200767E-01,y0,-4.1825856E-02,lc};" calcext:value-type="string">
            <text:p>Point(292) = {6.4200767E-01,y0,-4.182585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3" calcext:value-type="float">
            <text:p>293</text:p>
          </table:table-cell>
          <table:table-cell table:style-name="ce7" office:value-type="float" office:value="0.654508497187474" calcext:value-type="float">
            <text:p>6.545085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406861838549376" calcext:value-type="float">
            <text:p>-4.0686184E-02</text:p>
          </table:table-cell>
          <table:table-cell table:style-name="ce3"/>
          <table:table-cell table:style-name="ce3" table:formula="of:=CONCATENATE(&quot;Point(&quot;;[.C197];&quot;) = {&quot;;TEXT([.D197];&quot;0.0000000E+00&quot;);&quot;,&quot;;TEXT([.E197];&quot;0.0000000E+00&quot;);&quot;,&quot;;TEXT([.F197];&quot;0.0000000E+00&quot;);&quot;,&quot;;&quot;lc};&quot;)" office:value-type="string" office:string-value="Point(293) = {6.5450850E-01,y0,-4.0686184E-02,lc};" calcext:value-type="string">
            <text:p>Point(293) = {6.5450850E-01,y0,-4.0686184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4" calcext:value-type="float">
            <text:p>294</text:p>
          </table:table-cell>
          <table:table-cell table:style-name="ce7" office:value-type="float" office:value="0.666903429616885" calcext:value-type="float">
            <text:p>6.669034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9532139161004" calcext:value-type="float">
            <text:p>-3.9532139E-02</text:p>
          </table:table-cell>
          <table:table-cell table:style-name="ce3"/>
          <table:table-cell table:style-name="ce3" table:formula="of:=CONCATENATE(&quot;Point(&quot;;[.C198];&quot;) = {&quot;;TEXT([.D198];&quot;0.0000000E+00&quot;);&quot;,&quot;;TEXT([.E198];&quot;0.0000000E+00&quot;);&quot;,&quot;;TEXT([.F198];&quot;0.0000000E+00&quot;);&quot;,&quot;;&quot;lc};&quot;)" office:value-type="string" office:string-value="Point(294) = {6.6690343E-01,y0,-3.9532139E-02,lc};" calcext:value-type="string">
            <text:p>Point(294) = {6.6690343E-01,y0,-3.953213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5" calcext:value-type="float">
            <text:p>295</text:p>
          </table:table-cell>
          <table:table-cell table:style-name="ce7" office:value-type="float" office:value="0.67918397477265" calcext:value-type="float">
            <text:p>6.791839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83655748669655" calcext:value-type="float">
            <text:p>-3.8365575E-02</text:p>
          </table:table-cell>
          <table:table-cell table:style-name="ce3"/>
          <table:table-cell table:style-name="ce3" table:formula="of:=CONCATENATE(&quot;Point(&quot;;[.C199];&quot;) = {&quot;;TEXT([.D199];&quot;0.0000000E+00&quot;);&quot;,&quot;;TEXT([.E199];&quot;0.0000000E+00&quot;);&quot;,&quot;;TEXT([.F199];&quot;0.0000000E+00&quot;);&quot;,&quot;;&quot;lc};&quot;)" office:value-type="string" office:string-value="Point(295) = {6.7918397E-01,y0,-3.8365575E-02,lc};" calcext:value-type="string">
            <text:p>Point(295) = {6.7918397E-01,y0,-3.836557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6" calcext:value-type="float">
            <text:p>296</text:p>
          </table:table-cell>
          <table:table-cell table:style-name="ce7" office:value-type="float" office:value="0.691341716182545" calcext:value-type="float">
            <text:p>6.913417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71883220930156" calcext:value-type="float">
            <text:p>-3.7188322E-02</text:p>
          </table:table-cell>
          <table:table-cell table:style-name="ce3"/>
          <table:table-cell table:style-name="ce3" table:formula="of:=CONCATENATE(&quot;Point(&quot;;[.C200];&quot;) = {&quot;;TEXT([.D200];&quot;0.0000000E+00&quot;);&quot;,&quot;;TEXT([.E200];&quot;0.0000000E+00&quot;);&quot;,&quot;;TEXT([.F200];&quot;0.0000000E+00&quot;);&quot;,&quot;;&quot;lc};&quot;)" office:value-type="string" office:string-value="Point(296) = {6.9134172E-01,y0,-3.7188322E-02,lc};" calcext:value-type="string">
            <text:p>Point(296) = {6.9134172E-01,y0,-3.7188322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7" calcext:value-type="float">
            <text:p>297</text:p>
          </table:table-cell>
          <table:table-cell table:style-name="ce7" office:value-type="float" office:value="0.7033683215379" calcext:value-type="float">
            <text:p>7.033683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60021905525126" calcext:value-type="float">
            <text:p>-3.6002191E-02</text:p>
          </table:table-cell>
          <table:table-cell table:style-name="ce3"/>
          <table:table-cell table:style-name="ce3" table:formula="of:=CONCATENATE(&quot;Point(&quot;;[.C201];&quot;) = {&quot;;TEXT([.D201];&quot;0.0000000E+00&quot;);&quot;,&quot;;TEXT([.E201];&quot;0.0000000E+00&quot;);&quot;,&quot;;TEXT([.F201];&quot;0.0000000E+00&quot;);&quot;,&quot;;&quot;lc};&quot;)" office:value-type="string" office:string-value="Point(297) = {7.0336832E-01,y0,-3.6002191E-02,lc};" calcext:value-type="string">
            <text:p>Point(297) = {7.0336832E-01,y0,-3.600219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8" calcext:value-type="float">
            <text:p>298</text:p>
          </table:table-cell>
          <table:table-cell table:style-name="ce7" office:value-type="float" office:value="0.715255548404147" calcext:value-type="float">
            <text:p>7.152555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48089696820301" calcext:value-type="float">
            <text:p>-3.4808970E-02</text:p>
          </table:table-cell>
          <table:table-cell table:style-name="ce3"/>
          <table:table-cell table:style-name="ce3" table:formula="of:=CONCATENATE(&quot;Point(&quot;;[.C202];&quot;) = {&quot;;TEXT([.D202];&quot;0.0000000E+00&quot;);&quot;,&quot;;TEXT([.E202];&quot;0.0000000E+00&quot;);&quot;,&quot;;TEXT([.F202];&quot;0.0000000E+00&quot;);&quot;,&quot;;&quot;lc};&quot;)" office:value-type="string" office:string-value="Point(298) = {7.1525555E-01,y0,-3.4808970E-02,lc};" calcext:value-type="string">
            <text:p>Point(298) = {7.1525555E-01,y0,-3.480897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299" calcext:value-type="float">
            <text:p>299</text:p>
          </table:table-cell>
          <table:table-cell table:style-name="ce7" office:value-type="float" office:value="0.726995249869773" calcext:value-type="float">
            <text:p>7.269952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36104299785611" calcext:value-type="float">
            <text:p>-3.3610430E-02</text:p>
          </table:table-cell>
          <table:table-cell table:style-name="ce3"/>
          <table:table-cell table:style-name="ce3" table:formula="of:=CONCATENATE(&quot;Point(&quot;;[.C203];&quot;) = {&quot;;TEXT([.D203];&quot;0.0000000E+00&quot;);&quot;,&quot;;TEXT([.E203];&quot;0.0000000E+00&quot;);&quot;,&quot;;TEXT([.F203];&quot;0.0000000E+00&quot;);&quot;,&quot;;&quot;lc};&quot;)" office:value-type="string" office:string-value="Point(299) = {7.2699525E-01,y0,-3.3610430E-02,lc};" calcext:value-type="string">
            <text:p>Point(299) = {7.2699525E-01,y0,-3.361043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0.738579380129804" calcext:value-type="float">
            <text:p>7.385793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24083244932621" calcext:value-type="float">
            <text:p>-3.2408324E-02</text:p>
          </table:table-cell>
          <table:table-cell table:style-name="ce3"/>
          <table:table-cell table:style-name="ce3" table:formula="of:=CONCATENATE(&quot;Point(&quot;;[.C204];&quot;) = {&quot;;TEXT([.D204];&quot;0.0000000E+00&quot;);&quot;,&quot;;TEXT([.E204];&quot;0.0000000E+00&quot;);&quot;,&quot;;TEXT([.F204];&quot;0.0000000E+00&quot;);&quot;,&quot;;&quot;lc};&quot;)" office:value-type="string" office:string-value="Point(300) = {7.3857938E-01,y0,-3.2408324E-02,lc};" calcext:value-type="string">
            <text:p>Point(300) = {7.3857938E-01,y0,-3.2408324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1" calcext:value-type="float">
            <text:p>301</text:p>
          </table:table-cell>
          <table:table-cell table:style-name="ce7" office:value-type="float" office:value="0.75" calcext:value-type="float">
            <text:p>7.500000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12043904301599" calcext:value-type="float">
            <text:p>-3.1204390E-02</text:p>
          </table:table-cell>
          <table:table-cell table:style-name="ce3"/>
          <table:table-cell table:style-name="ce3" table:formula="of:=CONCATENATE(&quot;Point(&quot;;[.C205];&quot;) = {&quot;;TEXT([.D205];&quot;0.0000000E+00&quot;);&quot;,&quot;;TEXT([.E205];&quot;0.0000000E+00&quot;);&quot;,&quot;;TEXT([.F205];&quot;0.0000000E+00&quot;);&quot;,&quot;;&quot;lc};&quot;)" office:value-type="string" office:string-value="Point(301) = {7.5000000E-01,y0,-3.1204390E-02,lc};" calcext:value-type="string">
            <text:p>Point(301) = {7.5000000E-01,y0,-3.120439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2" calcext:value-type="float">
            <text:p>302</text:p>
          </table:table-cell>
          <table:table-cell table:style-name="ce7" office:value-type="float" office:value="0.761249282357974" calcext:value-type="float">
            <text:p>7.612492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300003507979432" calcext:value-type="float">
            <text:p>-3.0000351E-02</text:p>
          </table:table-cell>
          <table:table-cell table:style-name="ce3"/>
          <table:table-cell table:style-name="ce3" table:formula="of:=CONCATENATE(&quot;Point(&quot;;[.C206];&quot;) = {&quot;;TEXT([.D206];&quot;0.0000000E+00&quot;);&quot;,&quot;;TEXT([.E206];&quot;0.0000000E+00&quot;);&quot;,&quot;;TEXT([.F206];&quot;0.0000000E+00&quot;);&quot;,&quot;;&quot;lc};&quot;)" office:value-type="string" office:string-value="Point(302) = {7.6124928E-01,y0,-3.0000351E-02,lc};" calcext:value-type="string">
            <text:p>Point(302) = {7.6124928E-01,y0,-3.000035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3" calcext:value-type="float">
            <text:p>303</text:p>
          </table:table-cell>
          <table:table-cell table:style-name="ce7" office:value-type="float" office:value="0.772319517507513" calcext:value-type="float">
            <text:p>7.723195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87979160633171" calcext:value-type="float">
            <text:p>-2.8797916E-02</text:p>
          </table:table-cell>
          <table:table-cell table:style-name="ce3"/>
          <table:table-cell table:style-name="ce3" table:formula="of:=CONCATENATE(&quot;Point(&quot;;[.C207];&quot;) = {&quot;;TEXT([.D207];&quot;0.0000000E+00&quot;);&quot;,&quot;;TEXT([.E207];&quot;0.0000000E+00&quot;);&quot;,&quot;;TEXT([.F207];&quot;0.0000000E+00&quot;);&quot;,&quot;;&quot;lc};&quot;)" office:value-type="string" office:string-value="Point(303) = {7.7231952E-01,y0,-2.8797916E-02,lc};" calcext:value-type="string">
            <text:p>Point(303) = {7.7231952E-01,y0,-2.879791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7" office:value-type="float" office:value="0.783203118462417" calcext:value-type="float">
            <text:p>7.832031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75987857553968" calcext:value-type="float">
            <text:p>-2.7598786E-02</text:p>
          </table:table-cell>
          <table:table-cell table:style-name="ce3"/>
          <table:table-cell table:style-name="ce3" table:formula="of:=CONCATENATE(&quot;Point(&quot;;[.C208];&quot;) = {&quot;;TEXT([.D208];&quot;0.0000000E+00&quot;);&quot;,&quot;;TEXT([.E208];&quot;0.0000000E+00&quot;);&quot;,&quot;;TEXT([.F208];&quot;0.0000000E+00&quot;);&quot;,&quot;;&quot;lc};&quot;)" office:value-type="string" office:string-value="Point(304) = {7.8320312E-01,y0,-2.7598786E-02,lc};" calcext:value-type="string">
            <text:p>Point(304) = {7.8320312E-01,y0,-2.759878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5" calcext:value-type="float">
            <text:p>305</text:p>
          </table:table-cell>
          <table:table-cell table:style-name="ce7" office:value-type="float" office:value="0.793892626146237" calcext:value-type="float">
            <text:p>7.938926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64046499722451" calcext:value-type="float">
            <text:p>-2.6404650E-02</text:p>
          </table:table-cell>
          <table:table-cell table:style-name="ce3"/>
          <table:table-cell table:style-name="ce3" table:formula="of:=CONCATENATE(&quot;Point(&quot;;[.C209];&quot;) = {&quot;;TEXT([.D209];&quot;0.0000000E+00&quot;);&quot;,&quot;;TEXT([.E209];&quot;0.0000000E+00&quot;);&quot;,&quot;;TEXT([.F209];&quot;0.0000000E+00&quot;);&quot;,&quot;;&quot;lc};&quot;)" office:value-type="string" office:string-value="Point(305) = {7.9389263E-01,y0,-2.6404650E-02,lc};" calcext:value-type="string">
            <text:p>Point(305) = {7.9389263E-01,y0,-2.6404650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6" calcext:value-type="float">
            <text:p>306</text:p>
          </table:table-cell>
          <table:table-cell table:style-name="ce7" office:value-type="float" office:value="0.80438071450436" calcext:value-type="float">
            <text:p>8.043807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5217190742879" calcext:value-type="float">
            <text:p>-2.5217191E-02</text:p>
          </table:table-cell>
          <table:table-cell table:style-name="ce3"/>
          <table:table-cell table:style-name="ce3" table:formula="of:=CONCATENATE(&quot;Point(&quot;;[.C210];&quot;) = {&quot;;TEXT([.D210];&quot;0.0000000E+00&quot;);&quot;,&quot;;TEXT([.E210];&quot;0.0000000E+00&quot;);&quot;,&quot;;TEXT([.F210];&quot;0.0000000E+00&quot;);&quot;,&quot;;&quot;lc};&quot;)" office:value-type="string" office:string-value="Point(306) = {8.0438071E-01,y0,-2.5217191E-02,lc};" calcext:value-type="string">
            <text:p>Point(306) = {8.0438071E-01,y0,-2.521719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7" calcext:value-type="float">
            <text:p>307</text:p>
          </table:table-cell>
          <table:table-cell table:style-name="ce7" office:value-type="float" office:value="0.814660195524919" calcext:value-type="float">
            <text:p>8.146602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40380832008678" calcext:value-type="float">
            <text:p>-2.4038083E-02</text:p>
          </table:table-cell>
          <table:table-cell table:style-name="ce3"/>
          <table:table-cell table:style-name="ce3" table:formula="of:=CONCATENATE(&quot;Point(&quot;;[.C211];&quot;) = {&quot;;TEXT([.D211];&quot;0.0000000E+00&quot;);&quot;,&quot;;TEXT([.E211];&quot;0.0000000E+00&quot;);&quot;,&quot;;TEXT([.F211];&quot;0.0000000E+00&quot;);&quot;,&quot;;&quot;lc};&quot;)" office:value-type="string" office:string-value="Point(307) = {8.1466020E-01,y0,-2.4038083E-02,lc};" calcext:value-type="string">
            <text:p>Point(307) = {8.1466020E-01,y0,-2.403808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8" calcext:value-type="float">
            <text:p>308</text:p>
          </table:table-cell>
          <table:table-cell table:style-name="ce7" office:value-type="float" office:value="0.824724024165092" calcext:value-type="float">
            <text:p>8.2472402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28689965289596" calcext:value-type="float">
            <text:p>-2.2868997E-02</text:p>
          </table:table-cell>
          <table:table-cell table:style-name="ce3"/>
          <table:table-cell table:style-name="ce3" table:formula="of:=CONCATENATE(&quot;Point(&quot;;[.C212];&quot;) = {&quot;;TEXT([.D212];&quot;0.0000000E+00&quot;);&quot;,&quot;;TEXT([.E212];&quot;0.0000000E+00&quot;);&quot;,&quot;;TEXT([.F212];&quot;0.0000000E+00&quot;);&quot;,&quot;;&quot;lc};&quot;)" office:value-type="string" office:string-value="Point(308) = {8.2472402E-01,y0,-2.2868997E-02,lc};" calcext:value-type="string">
            <text:p>Point(308) = {8.2472402E-01,y0,-2.286899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09" calcext:value-type="float">
            <text:p>309</text:p>
          </table:table-cell>
          <table:table-cell table:style-name="ce7" office:value-type="float" office:value="0.834565303179429" calcext:value-type="float">
            <text:p>8.345653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17115946379781" calcext:value-type="float">
            <text:p>-2.1711595E-02</text:p>
          </table:table-cell>
          <table:table-cell table:style-name="ce3"/>
          <table:table-cell table:style-name="ce3" table:formula="of:=CONCATENATE(&quot;Point(&quot;;[.C213];&quot;) = {&quot;;TEXT([.D213];&quot;0.0000000E+00&quot;);&quot;,&quot;;TEXT([.E213];&quot;0.0000000E+00&quot;);&quot;,&quot;;TEXT([.F213];&quot;0.0000000E+00&quot;);&quot;,&quot;;&quot;lc};&quot;)" office:value-type="string" office:string-value="Point(309) = {8.3456530E-01,y0,-2.1711595E-02,lc};" calcext:value-type="string">
            <text:p>Point(309) = {8.3456530E-01,y0,-2.171159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0" calcext:value-type="float">
            <text:p>310</text:p>
          </table:table-cell>
          <table:table-cell table:style-name="ce7" office:value-type="float" office:value="0.844177287846877" calcext:value-type="float">
            <text:p>8.441772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205675365474671" calcext:value-type="float">
            <text:p>-2.0567537E-02</text:p>
          </table:table-cell>
          <table:table-cell table:style-name="ce3"/>
          <table:table-cell table:style-name="ce3" table:formula="of:=CONCATENATE(&quot;Point(&quot;;[.C214];&quot;) = {&quot;;TEXT([.D214];&quot;0.0000000E+00&quot;);&quot;,&quot;;TEXT([.E214];&quot;0.0000000E+00&quot;);&quot;,&quot;;TEXT([.F214];&quot;0.0000000E+00&quot;);&quot;,&quot;;&quot;lc};&quot;)" office:value-type="string" office:string-value="Point(310) = {8.4417729E-01,y0,-2.0567537E-02,lc};" calcext:value-type="string">
            <text:p>Point(310) = {8.4417729E-01,y0,-2.0567537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1" calcext:value-type="float">
            <text:p>311</text:p>
          </table:table-cell>
          <table:table-cell table:style-name="ce7" office:value-type="float" office:value="0.853553390593274" calcext:value-type="float">
            <text:p>8.535533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94384764401692" calcext:value-type="float">
            <text:p>-1.9438476E-02</text:p>
          </table:table-cell>
          <table:table-cell table:style-name="ce3"/>
          <table:table-cell table:style-name="ce3" table:formula="of:=CONCATENATE(&quot;Point(&quot;;[.C215];&quot;) = {&quot;;TEXT([.D215];&quot;0.0000000E+00&quot;);&quot;,&quot;;TEXT([.E215];&quot;0.0000000E+00&quot;);&quot;,&quot;;TEXT([.F215];&quot;0.0000000E+00&quot;);&quot;,&quot;;&quot;lc};&quot;)" office:value-type="string" office:string-value="Point(311) = {8.5355339E-01,y0,-1.9438476E-02,lc};" calcext:value-type="string">
            <text:p>Point(311) = {8.5355339E-01,y0,-1.943847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2" calcext:value-type="float">
            <text:p>312</text:p>
          </table:table-cell>
          <table:table-cell table:style-name="ce7" office:value-type="float" office:value="0.862687185506144" calcext:value-type="float">
            <text:p>8.626871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83260633673618" calcext:value-type="float">
            <text:p>-1.8326063E-02</text:p>
          </table:table-cell>
          <table:table-cell table:style-name="ce3"/>
          <table:table-cell table:style-name="ce3" table:formula="of:=CONCATENATE(&quot;Point(&quot;;[.C216];&quot;) = {&quot;;TEXT([.D216];&quot;0.0000000E+00&quot;);&quot;,&quot;;TEXT([.E216];&quot;0.0000000E+00&quot;);&quot;,&quot;;TEXT([.F216];&quot;0.0000000E+00&quot;);&quot;,&quot;;&quot;lc};&quot;)" office:value-type="string" office:string-value="Point(312) = {8.6268719E-01,y0,-1.8326063E-02,lc};" calcext:value-type="string">
            <text:p>Point(312) = {8.6268719E-01,y0,-1.832606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3" calcext:value-type="float">
            <text:p>313</text:p>
          </table:table-cell>
          <table:table-cell table:style-name="ce7" office:value-type="float" office:value="0.871572412738697" calcext:value-type="float">
            <text:p>8.715724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72319405872572" calcext:value-type="float">
            <text:p>-1.7231941E-02</text:p>
          </table:table-cell>
          <table:table-cell table:style-name="ce3"/>
          <table:table-cell table:style-name="ce3" table:formula="of:=CONCATENATE(&quot;Point(&quot;;[.C217];&quot;) = {&quot;;TEXT([.D217];&quot;0.0000000E+00&quot;);&quot;,&quot;;TEXT([.E217];&quot;0.0000000E+00&quot;);&quot;,&quot;;TEXT([.F217];&quot;0.0000000E+00&quot;);&quot;,&quot;;&quot;lc};&quot;)" office:value-type="string" office:string-value="Point(313) = {8.7157241E-01,y0,-1.7231941E-02,lc};" calcext:value-type="string">
            <text:p>Point(313) = {8.7157241E-01,y0,-1.7231941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4" calcext:value-type="float">
            <text:p>314</text:p>
          </table:table-cell>
          <table:table-cell table:style-name="ce7" office:value-type="float" office:value="0.880202982800016" calcext:value-type="float">
            <text:p>8.802029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61577445240594" calcext:value-type="float">
            <text:p>-1.6157745E-02</text:p>
          </table:table-cell>
          <table:table-cell table:style-name="ce3"/>
          <table:table-cell table:style-name="ce3" table:formula="of:=CONCATENATE(&quot;Point(&quot;;[.C218];&quot;) = {&quot;;TEXT([.D218];&quot;0.0000000E+00&quot;);&quot;,&quot;;TEXT([.E218];&quot;0.0000000E+00&quot;);&quot;,&quot;;TEXT([.F218];&quot;0.0000000E+00&quot;);&quot;,&quot;;&quot;lc};&quot;)" office:value-type="string" office:string-value="Point(314) = {8.8020298E-01,y0,-1.6157745E-02,lc};" calcext:value-type="string">
            <text:p>Point(314) = {8.8020298E-01,y0,-1.615774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5" calcext:value-type="float">
            <text:p>315</text:p>
          </table:table-cell>
          <table:table-cell table:style-name="ce7" office:value-type="float" office:value="0.888572980728486" calcext:value-type="float">
            <text:p>8.885729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51051033407724" calcext:value-type="float">
            <text:p>-1.5105103E-02</text:p>
          </table:table-cell>
          <table:table-cell table:style-name="ce3"/>
          <table:table-cell table:style-name="ce3" table:formula="of:=CONCATENATE(&quot;Point(&quot;;[.C219];&quot;) = {&quot;;TEXT([.D219];&quot;0.0000000E+00&quot;);&quot;,&quot;;TEXT([.E219];&quot;0.0000000E+00&quot;);&quot;,&quot;;TEXT([.F219];&quot;0.0000000E+00&quot;);&quot;,&quot;;&quot;lc};&quot;)" office:value-type="string" office:string-value="Point(315) = {8.8857298E-01,y0,-1.5105103E-02,lc};" calcext:value-type="string">
            <text:p>Point(315) = {8.8857298E-01,y0,-1.5105103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6" calcext:value-type="float">
            <text:p>316</text:p>
          </table:table-cell>
          <table:table-cell table:style-name="ce7" office:value-type="float" office:value="0.896676670145618" calcext:value-type="float">
            <text:p>8.966766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4075635124422" calcext:value-type="float">
            <text:p>-1.4075635E-02</text:p>
          </table:table-cell>
          <table:table-cell table:style-name="ce3"/>
          <table:table-cell table:style-name="ce3" table:formula="of:=CONCATENATE(&quot;Point(&quot;;[.C220];&quot;) = {&quot;;TEXT([.D220];&quot;0.0000000E+00&quot;);&quot;,&quot;;TEXT([.E220];&quot;0.0000000E+00&quot;);&quot;,&quot;;TEXT([.F220];&quot;0.0000000E+00&quot;);&quot;,&quot;;&quot;lc};&quot;)" office:value-type="string" office:string-value="Point(316) = {8.9667667E-01,y0,-1.4075635E-02,lc};" calcext:value-type="string">
            <text:p>Point(316) = {8.9667667E-01,y0,-1.4075635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7" calcext:value-type="float">
            <text:p>317</text:p>
          </table:table-cell>
          <table:table-cell table:style-name="ce7" office:value-type="float" office:value="0.904508497187474" calcext:value-type="float">
            <text:p>9.045085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30709456879079" calcext:value-type="float">
            <text:p>-1.3070946E-02</text:p>
          </table:table-cell>
          <table:table-cell table:style-name="ce3"/>
          <table:table-cell table:style-name="ce3" table:formula="of:=CONCATENATE(&quot;Point(&quot;;[.C221];&quot;) = {&quot;;TEXT([.D221];&quot;0.0000000E+00&quot;);&quot;,&quot;;TEXT([.E221];&quot;0.0000000E+00&quot;);&quot;,&quot;;TEXT([.F221];&quot;0.0000000E+00&quot;);&quot;,&quot;;&quot;lc};&quot;)" office:value-type="string" office:string-value="Point(317) = {9.0450850E-01,y0,-1.3070946E-02,lc};" calcext:value-type="string">
            <text:p>Point(317) = {9.0450850E-01,y0,-1.307094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8" calcext:value-type="float">
            <text:p>318</text:p>
          </table:table-cell>
          <table:table-cell table:style-name="ce7" office:value-type="float" office:value="0.912063094311008" calcext:value-type="float">
            <text:p>9.1206309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20926259981795" calcext:value-type="float">
            <text:p>-1.2092626E-02</text:p>
          </table:table-cell>
          <table:table-cell table:style-name="ce3"/>
          <table:table-cell table:style-name="ce3" table:formula="of:=CONCATENATE(&quot;Point(&quot;;[.C222];&quot;) = {&quot;;TEXT([.D222];&quot;0.0000000E+00&quot;);&quot;,&quot;;TEXT([.E222];&quot;0.0000000E+00&quot;);&quot;,&quot;;TEXT([.F222];&quot;0.0000000E+00&quot;);&quot;,&quot;;&quot;lc};&quot;)" office:value-type="string" office:string-value="Point(318) = {9.1206309E-01,y0,-1.2092626E-02,lc};" calcext:value-type="string">
            <text:p>Point(318) = {9.1206309E-01,y0,-1.2092626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19" calcext:value-type="float">
            <text:p>319</text:p>
          </table:table-cell>
          <table:table-cell table:style-name="ce7" office:value-type="float" office:value="0.919335283972712" calcext:value-type="float">
            <text:p>9.193352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11422492457677" calcext:value-type="float">
            <text:p>-1.1142249E-02</text:p>
          </table:table-cell>
          <table:table-cell table:style-name="ce3"/>
          <table:table-cell table:style-name="ce3" table:formula="of:=CONCATENATE(&quot;Point(&quot;;[.C223];&quot;) = {&quot;;TEXT([.D223];&quot;0.0000000E+00&quot;);&quot;,&quot;;TEXT([.E223];&quot;0.0000000E+00&quot;);&quot;,&quot;;TEXT([.F223];&quot;0.0000000E+00&quot;);&quot;,&quot;;&quot;lc};&quot;)" office:value-type="string" office:string-value="Point(319) = {9.1933528E-01,y0,-1.1142249E-02,lc};" calcext:value-type="string">
            <text:p>Point(319) = {9.1933528E-01,y0,-1.1142249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20" calcext:value-type="float">
            <text:p>320</text:p>
          </table:table-cell>
          <table:table-cell table:style-name="ce7" office:value-type="float" office:value="0.926320082177046" calcext:value-type="float">
            <text:p>9.2632008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102213675758267" calcext:value-type="float">
            <text:p>-1.0221368E-02</text:p>
          </table:table-cell>
          <table:table-cell table:style-name="ce3"/>
          <table:table-cell table:style-name="ce3" table:formula="of:=CONCATENATE(&quot;Point(&quot;;[.C224];&quot;) = {&quot;;TEXT([.D224];&quot;0.0000000E+00&quot;);&quot;,&quot;;TEXT([.E224];&quot;0.0000000E+00&quot;);&quot;,&quot;;TEXT([.F224];&quot;0.0000000E+00&quot;);&quot;,&quot;;&quot;lc};&quot;)" office:value-type="string" office:string-value="Point(320) = {9.2632008E-01,y0,-1.0221368E-02,lc};" calcext:value-type="string">
            <text:p>Point(320) = {9.2632008E-01,y0,-1.0221368E-02,lc};</text:p>
          </table:table-cell>
        </table:table-row>
        <table:table-row table:style-name="ro1">
          <table:table-cell table:number-columns-repeated="2"/>
          <table:table-cell table:style-name="ce3" office:value-type="float" office:value="321" calcext:value-type="float">
            <text:p>321</text:p>
          </table:table-cell>
          <table:table-cell table:style-name="ce7" office:value-type="float" office:value="0.933012701892219" calcext:value-type="float">
            <text:p>9.330127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933150850570876" calcext:value-type="float">
            <text:p>-9.3315085E-03</text:p>
          </table:table-cell>
          <table:table-cell table:style-name="ce3"/>
          <table:table-cell table:style-name="ce3" table:formula="of:=CONCATENATE(&quot;Point(&quot;;[.C225];&quot;) = {&quot;;TEXT([.D225];&quot;0.0000000E+00&quot;);&quot;,&quot;;TEXT([.E225];&quot;0.0000000E+00&quot;);&quot;,&quot;;TEXT([.F225];&quot;0.0000000E+00&quot;);&quot;,&quot;;&quot;lc};&quot;)" office:value-type="string" office:string-value="Point(321) = {9.3301270E-01,y0,-9.3315085E-03,lc};" calcext:value-type="string">
            <text:p>Point(321) = {9.3301270E-01,y0,-9.3315085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22" calcext:value-type="float">
            <text:p>322</text:p>
          </table:table-cell>
          <table:table-cell table:style-name="ce7" office:value-type="float" office:value="0.939408556330983" calcext:value-type="float">
            <text:p>9.394085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847417105862204" calcext:value-type="float">
            <text:p>-8.4741711E-03</text:p>
          </table:table-cell>
          <table:table-cell table:style-name="ce3"/>
          <table:table-cell table:style-name="ce3" table:formula="of:=CONCATENATE(&quot;Point(&quot;;[.C226];&quot;) = {&quot;;TEXT([.D226];&quot;0.0000000E+00&quot;);&quot;,&quot;;TEXT([.E226];&quot;0.0000000E+00&quot;);&quot;,&quot;;TEXT([.F226];&quot;0.0000000E+00&quot;);&quot;,&quot;;&quot;lc};&quot;)" office:value-type="string" office:string-value="Point(322) = {9.3940856E-01,y0,-8.4741711E-03,lc};" calcext:value-type="string">
            <text:p>Point(322) = {9.3940856E-01,y0,-8.4741711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7" office:value-type="float" office:value="0.945503262094184" calcext:value-type="float">
            <text:p>9.455032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765082164708146" calcext:value-type="float">
            <text:p>-7.6508216E-03</text:p>
          </table:table-cell>
          <table:table-cell table:style-name="ce3"/>
          <table:table-cell table:style-name="ce3" table:formula="of:=CONCATENATE(&quot;Point(&quot;;[.C227];&quot;) = {&quot;;TEXT([.D227];&quot;0.0000000E+00&quot;);&quot;,&quot;;TEXT([.E227];&quot;0.0000000E+00&quot;);&quot;,&quot;;TEXT([.F227];&quot;0.0000000E+00&quot;);&quot;,&quot;;&quot;lc};&quot;)" office:value-type="string" office:string-value="Point(323) = {9.4550326E-01,y0,-7.6508216E-03,lc};" calcext:value-type="string">
            <text:p>Point(323) = {9.4550326E-01,y0,-7.6508216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24" calcext:value-type="float">
            <text:p>324</text:p>
          </table:table-cell>
          <table:table-cell table:style-name="ce7" office:value-type="float" office:value="0.95129264217493" calcext:value-type="float">
            <text:p>9.5129264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686288974358955" calcext:value-type="float">
            <text:p>-6.8628897E-03</text:p>
          </table:table-cell>
          <table:table-cell table:style-name="ce3"/>
          <table:table-cell table:style-name="ce3" table:formula="of:=CONCATENATE(&quot;Point(&quot;;[.C228];&quot;) = {&quot;;TEXT([.D228];&quot;0.0000000E+00&quot;);&quot;,&quot;;TEXT([.E228];&quot;0.0000000E+00&quot;);&quot;,&quot;;TEXT([.F228];&quot;0.0000000E+00&quot;);&quot;,&quot;;&quot;lc};&quot;)" office:value-type="string" office:string-value="Point(324) = {9.5129264E-01,y0,-6.8628897E-03,lc};" calcext:value-type="string">
            <text:p>Point(324) = {9.5129264E-01,y0,-6.8628897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25" calcext:value-type="float">
            <text:p>325</text:p>
          </table:table-cell>
          <table:table-cell table:style-name="ce7" office:value-type="float" office:value="0.956772728821301" calcext:value-type="float">
            <text:p>9.567727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611176337923921" calcext:value-type="float">
            <text:p>-6.1117634E-03</text:p>
          </table:table-cell>
          <table:table-cell table:style-name="ce3"/>
          <table:table-cell table:style-name="ce3" table:formula="of:=CONCATENATE(&quot;Point(&quot;;[.C229];&quot;) = {&quot;;TEXT([.D229];&quot;0.0000000E+00&quot;);&quot;,&quot;;TEXT([.E229];&quot;0.0000000E+00&quot;);&quot;,&quot;;TEXT([.F229];&quot;0.0000000E+00&quot;);&quot;,&quot;;&quot;lc};&quot;)" office:value-type="string" office:string-value="Point(325) = {9.5677273E-01,y0,-6.1117634E-03,lc};" calcext:value-type="string">
            <text:p>Point(325) = {9.5677273E-01,y0,-6.1117634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26" calcext:value-type="float">
            <text:p>326</text:p>
          </table:table-cell>
          <table:table-cell table:style-name="ce7" office:value-type="float" office:value="0.961939766255643" calcext:value-type="float">
            <text:p>9.619397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539878451367922" calcext:value-type="float">
            <text:p>-5.3987845E-03</text:p>
          </table:table-cell>
          <table:table-cell table:style-name="ce3"/>
          <table:table-cell table:style-name="ce3" table:formula="of:=CONCATENATE(&quot;Point(&quot;;[.C230];&quot;) = {&quot;;TEXT([.D230];&quot;0.0000000E+00&quot;);&quot;,&quot;;TEXT([.E230];&quot;0.0000000E+00&quot;);&quot;,&quot;;TEXT([.F230];&quot;0.0000000E+00&quot;);&quot;,&quot;;&quot;lc};&quot;)" office:value-type="string" office:string-value="Point(326) = {9.6193977E-01,y0,-5.3987845E-03,lc};" calcext:value-type="string">
            <text:p>Point(326) = {9.6193977E-01,y0,-5.3987845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27" calcext:value-type="float">
            <text:p>327</text:p>
          </table:table-cell>
          <table:table-cell table:style-name="ce7" office:value-type="float" office:value="0.966790213248601" calcext:value-type="float">
            <text:p>9.667902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472524432208854" calcext:value-type="float">
            <text:p>-4.7252443E-03</text:p>
          </table:table-cell>
          <table:table-cell table:style-name="ce3"/>
          <table:table-cell table:style-name="ce3" table:formula="of:=CONCATENATE(&quot;Point(&quot;;[.C231];&quot;) = {&quot;;TEXT([.D231];&quot;0.0000000E+00&quot;);&quot;,&quot;;TEXT([.E231];&quot;0.0000000E+00&quot;);&quot;,&quot;;TEXT([.F231];&quot;0.0000000E+00&quot;);&quot;,&quot;;&quot;lc};&quot;)" office:value-type="string" office:string-value="Point(327) = {9.6679021E-01,y0,-4.7252443E-03,lc};" calcext:value-type="string">
            <text:p>Point(327) = {9.6679021E-01,y0,-4.7252443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28" calcext:value-type="float">
            <text:p>328</text:p>
          </table:table-cell>
          <table:table-cell table:style-name="ce7" office:value-type="float" office:value="0.971320745546089" calcext:value-type="float">
            <text:p>9.713207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409237844644753" calcext:value-type="float">
            <text:p>-4.0923784E-03</text:p>
          </table:table-cell>
          <table:table-cell table:style-name="ce3"/>
          <table:table-cell table:style-name="ce3" table:formula="of:=CONCATENATE(&quot;Point(&quot;;[.C232];&quot;) = {&quot;;TEXT([.D232];&quot;0.0000000E+00&quot;);&quot;,&quot;;TEXT([.E232];&quot;0.0000000E+00&quot;);&quot;,&quot;;TEXT([.F232];&quot;0.0000000E+00&quot;);&quot;,&quot;;&quot;lc};&quot;)" office:value-type="string" office:string-value="Point(328) = {9.7132075E-01,y0,-4.0923784E-03,lc};" calcext:value-type="string">
            <text:p>Point(328) = {9.7132075E-01,y0,-4.0923784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29" calcext:value-type="float">
            <text:p>329</text:p>
          </table:table-cell>
          <table:table-cell table:style-name="ce7" office:value-type="float" office:value="0.975528258147577" calcext:value-type="float">
            <text:p>9.755282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350136225945033" calcext:value-type="float">
            <text:p>-3.5013623E-03</text:p>
          </table:table-cell>
          <table:table-cell table:style-name="ce3"/>
          <table:table-cell table:style-name="ce3" table:formula="of:=CONCATENATE(&quot;Point(&quot;;[.C233];&quot;) = {&quot;;TEXT([.D233];&quot;0.0000000E+00&quot;);&quot;,&quot;;TEXT([.E233];&quot;0.0000000E+00&quot;);&quot;,&quot;;TEXT([.F233];&quot;0.0000000E+00&quot;);&quot;,&quot;;&quot;lc};&quot;)" office:value-type="string" office:string-value="Point(329) = {9.7552826E-01,y0,-3.5013623E-03,lc};" calcext:value-type="string">
            <text:p>Point(329) = {9.7552826E-01,y0,-3.5013623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30" calcext:value-type="float">
            <text:p>330</text:p>
          </table:table-cell>
          <table:table-cell table:style-name="ce7" office:value-type="float" office:value="0.979409867434097" calcext:value-type="float">
            <text:p>9.794098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295330618986665" calcext:value-type="float">
            <text:p>-2.9533062E-03</text:p>
          </table:table-cell>
          <table:table-cell table:style-name="ce3"/>
          <table:table-cell table:style-name="ce3" table:formula="of:=CONCATENATE(&quot;Point(&quot;;[.C234];&quot;) = {&quot;;TEXT([.D234];&quot;0.0000000E+00&quot;);&quot;,&quot;;TEXT([.E234];&quot;0.0000000E+00&quot;);&quot;,&quot;;TEXT([.F234];&quot;0.0000000E+00&quot;);&quot;,&quot;;&quot;lc};&quot;)" office:value-type="string" office:string-value="Point(330) = {9.7940987E-01,y0,-2.9533062E-03,lc};" calcext:value-type="string">
            <text:p>Point(330) = {9.7940987E-01,y0,-2.953306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31" calcext:value-type="float">
            <text:p>331</text:p>
          </table:table-cell>
          <table:table-cell table:style-name="ce7" office:value-type="float" office:value="0.982962913144534" calcext:value-type="float">
            <text:p>9.8296291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24492511580229" calcext:value-type="float">
            <text:p>-2.4492512E-03</text:p>
          </table:table-cell>
          <table:table-cell table:style-name="ce3"/>
          <table:table-cell table:style-name="ce3" table:formula="of:=CONCATENATE(&quot;Point(&quot;;[.C235];&quot;) = {&quot;;TEXT([.D235];&quot;0.0000000E+00&quot;);&quot;,&quot;;TEXT([.E235];&quot;0.0000000E+00&quot;);&quot;,&quot;;TEXT([.F235];&quot;0.0000000E+00&quot;);&quot;,&quot;;&quot;lc};&quot;)" office:value-type="string" office:string-value="Point(331) = {9.8296291E-01,y0,-2.4492512E-03,lc};" calcext:value-type="string">
            <text:p>Point(331) = {9.8296291E-01,y0,-2.449251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32" calcext:value-type="float">
            <text:p>332</text:p>
          </table:table-cell>
          <table:table-cell table:style-name="ce7" office:value-type="float" office:value="0.986184960198838" calcext:value-type="float">
            <text:p>9.861849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199016416934176" calcext:value-type="float">
            <text:p>-1.9901642E-03</text:p>
          </table:table-cell>
          <table:table-cell table:style-name="ce3"/>
          <table:table-cell table:style-name="ce3" table:formula="of:=CONCATENATE(&quot;Point(&quot;;[.C236];&quot;) = {&quot;;TEXT([.D236];&quot;0.0000000E+00&quot;);&quot;,&quot;;TEXT([.E236];&quot;0.0000000E+00&quot;);&quot;,&quot;;TEXT([.F236];&quot;0.0000000E+00&quot;);&quot;,&quot;;&quot;lc};&quot;)" office:value-type="string" office:string-value="Point(332) = {9.8618496E-01,y0,-1.9901642E-03,lc};" calcext:value-type="string">
            <text:p>Point(332) = {9.8618496E-01,y0,-1.9901642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33" calcext:value-type="float">
            <text:p>333</text:p>
          </table:table-cell>
          <table:table-cell table:style-name="ce7" office:value-type="float" office:value="0.989073800366903" calcext:value-type="float">
            <text:p>9.8907380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157693411255947" calcext:value-type="float">
            <text:p>-1.5769341E-03</text:p>
          </table:table-cell>
          <table:table-cell table:style-name="ce3"/>
          <table:table-cell table:style-name="ce3" table:formula="of:=CONCATENATE(&quot;Point(&quot;;[.C237];&quot;) = {&quot;;TEXT([.D237];&quot;0.0000000E+00&quot;);&quot;,&quot;;TEXT([.E237];&quot;0.0000000E+00&quot;);&quot;,&quot;;TEXT([.F237];&quot;0.0000000E+00&quot;);&quot;,&quot;;&quot;lc};&quot;)" office:value-type="string" office:string-value="Point(333) = {9.8907380E-01,y0,-1.5769341E-03,lc};" calcext:value-type="string">
            <text:p>Point(333) = {9.8907380E-01,y0,-1.5769341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34" calcext:value-type="float">
            <text:p>334</text:p>
          </table:table-cell>
          <table:table-cell table:style-name="ce7" office:value-type="float" office:value="0.991627453781977" calcext:value-type="float">
            <text:p>9.916274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121036780735655" calcext:value-type="float">
            <text:p>-1.2103678E-03</text:p>
          </table:table-cell>
          <table:table-cell table:style-name="ce3"/>
          <table:table-cell table:style-name="ce3" table:formula="of:=CONCATENATE(&quot;Point(&quot;;[.C238];&quot;) = {&quot;;TEXT([.D238];&quot;0.0000000E+00&quot;);&quot;,&quot;;TEXT([.E238];&quot;0.0000000E+00&quot;);&quot;,&quot;;TEXT([.F238];&quot;0.0000000E+00&quot;);&quot;,&quot;;&quot;lc};&quot;)" office:value-type="string" office:string-value="Point(334) = {9.9162745E-01,y0,-1.2103678E-03,lc};" calcext:value-type="string">
            <text:p>Point(334) = {9.9162745E-01,y0,-1.2103678E-03,lc};</text:p>
          </table:table-cell>
        </table:table-row>
        <table:table-row table:style-name="ro1">
          <table:table-cell table:number-columns-repeated="2"/>
          <table:table-cell table:style-name="ce3" office:value-type="float" office:value="335" calcext:value-type="float">
            <text:p>335</text:p>
          </table:table-cell>
          <table:table-cell table:style-name="ce7" office:value-type="float" office:value="0.993844170297569" calcext:value-type="float">
            <text:p>9.938441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0891186343702668" calcext:value-type="float">
            <text:p>-8.9118634E-04</text:p>
          </table:table-cell>
          <table:table-cell table:style-name="ce3"/>
          <table:table-cell table:style-name="ce3" table:formula="of:=CONCATENATE(&quot;Point(&quot;;[.C239];&quot;) = {&quot;;TEXT([.D239];&quot;0.0000000E+00&quot;);&quot;,&quot;;TEXT([.E239];&quot;0.0000000E+00&quot;);&quot;,&quot;;TEXT([.F239];&quot;0.0000000E+00&quot;);&quot;,&quot;;&quot;lc};&quot;)" office:value-type="string" office:string-value="Point(335) = {9.9384417E-01,y0,-8.9118634E-04,lc};" calcext:value-type="string">
            <text:p>Point(335) = {9.9384417E-01,y0,-8.9118634E-04,lc};</text:p>
          </table:table-cell>
        </table:table-row>
        <table:table-row table:style-name="ro1">
          <table:table-cell table:number-columns-repeated="2"/>
          <table:table-cell table:style-name="ce3" office:value-type="float" office:value="336" calcext:value-type="float">
            <text:p>336</text:p>
          </table:table-cell>
          <table:table-cell table:style-name="ce7" office:value-type="float" office:value="0.995722430686905" calcext:value-type="float">
            <text:p>9.9572243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0620021752274463" calcext:value-type="float">
            <text:p>-6.2002175E-04</text:p>
          </table:table-cell>
          <table:table-cell table:style-name="ce3"/>
          <table:table-cell table:style-name="ce3" table:formula="of:=CONCATENATE(&quot;Point(&quot;;[.C240];&quot;) = {&quot;;TEXT([.D240];&quot;0.0000000E+00&quot;);&quot;,&quot;;TEXT([.E240];&quot;0.0000000E+00&quot;);&quot;,&quot;;TEXT([.F240];&quot;0.0000000E+00&quot;);&quot;,&quot;;&quot;lc};&quot;)" office:value-type="string" office:string-value="Point(336) = {9.9572243E-01,y0,-6.2002175E-04,lc};" calcext:value-type="string">
            <text:p>Point(336) = {9.9572243E-01,y0,-6.2002175E-04,lc};</text:p>
          </table:table-cell>
        </table:table-row>
        <table:table-row table:style-name="ro1">
          <table:table-cell table:number-columns-repeated="2"/>
          <table:table-cell table:style-name="ce3" office:value-type="float" office:value="337" calcext:value-type="float">
            <text:p>337</text:p>
          </table:table-cell>
          <table:table-cell table:style-name="ce7" office:value-type="float" office:value="0.997260947684137" calcext:value-type="float">
            <text:p>9.9726095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0397414041878869" calcext:value-type="float">
            <text:p>-3.9741404E-04</text:p>
          </table:table-cell>
          <table:table-cell table:style-name="ce3"/>
          <table:table-cell table:style-name="ce3" table:formula="of:=CONCATENATE(&quot;Point(&quot;;[.C241];&quot;) = {&quot;;TEXT([.D241];&quot;0.0000000E+00&quot;);&quot;,&quot;;TEXT([.E241];&quot;0.0000000E+00&quot;);&quot;,&quot;;TEXT([.F241];&quot;0.0000000E+00&quot;);&quot;,&quot;;&quot;lc};&quot;)" office:value-type="string" office:string-value="Point(337) = {9.9726095E-01,y0,-3.9741404E-04,lc};" calcext:value-type="string">
            <text:p>Point(337) = {9.9726095E-01,y0,-3.9741404E-04,lc};</text:p>
          </table:table-cell>
        </table:table-row>
        <table:table-row table:style-name="ro1">
          <table:table-cell table:number-columns-repeated="2"/>
          <table:table-cell table:style-name="ce3" office:value-type="float" office:value="338" calcext:value-type="float">
            <text:p>338</text:p>
          </table:table-cell>
          <table:table-cell table:style-name="ce7" office:value-type="float" office:value="0.998458666866564" calcext:value-type="float">
            <text:p>9.984586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0223808635957323" calcext:value-type="float">
            <text:p>-2.2380864E-04</text:p>
          </table:table-cell>
          <table:table-cell table:style-name="ce3"/>
          <table:table-cell table:style-name="ce3" table:formula="of:=CONCATENATE(&quot;Point(&quot;;[.C242];&quot;) = {&quot;;TEXT([.D242];&quot;0.0000000E+00&quot;);&quot;,&quot;;TEXT([.E242];&quot;0.0000000E+00&quot;);&quot;,&quot;;TEXT([.F242];&quot;0.0000000E+00&quot;);&quot;,&quot;;&quot;lc};&quot;)" office:value-type="string" office:string-value="Point(338) = {9.9845867E-01,y0,-2.2380864E-04,lc};" calcext:value-type="string">
            <text:p>Point(338) = {9.9845867E-01,y0,-2.2380864E-04,lc};</text:p>
          </table:table-cell>
        </table:table-row>
        <table:table-row table:style-name="ro1">
          <table:table-cell table:number-columns-repeated="2"/>
          <table:table-cell table:style-name="ce3" office:value-type="float" office:value="339" calcext:value-type="float">
            <text:p>339</text:p>
          </table:table-cell>
          <table:table-cell table:style-name="ce7" office:value-type="float" office:value="0.999314767377287" calcext:value-type="float">
            <text:p>9.9931477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00995542359963547" calcext:value-type="float">
            <text:p>-9.9554236E-05</text:p>
          </table:table-cell>
          <table:table-cell table:style-name="ce3"/>
          <table:table-cell table:style-name="ce3" table:formula="of:=CONCATENATE(&quot;Point(&quot;;[.C243];&quot;) = {&quot;;TEXT([.D243];&quot;0.0000000E+00&quot;);&quot;,&quot;;TEXT([.E243];&quot;0.0000000E+00&quot;);&quot;,&quot;;TEXT([.F243];&quot;0.0000000E+00&quot;);&quot;,&quot;;&quot;lc};&quot;)" office:value-type="string" office:string-value="Point(339) = {9.9931477E-01,y0,-9.9554236E-05,lc};" calcext:value-type="string">
            <text:p>Point(339) = {9.9931477E-01,y0,-9.9554236E-05,lc};</text:p>
          </table:table-cell>
        </table:table-row>
        <table:table-row table:style-name="ro1">
          <table:table-cell table:number-columns-repeated="2"/>
          <table:table-cell table:style-name="ce3" office:value-type="float" office:value="340" calcext:value-type="float">
            <text:p>340</text:p>
          </table:table-cell>
          <table:table-cell table:style-name="ce7" office:value-type="float" office:value="0.999828662487779" calcext:value-type="float">
            <text:p>9.9982866E-01</text:p>
          </table:table-cell>
          <table:table-cell table:style-name="ce8" office:value-type="string" calcext:value-type="string">
            <text:p>y0</text:p>
          </table:table-cell>
          <table:table-cell table:style-name="ce7" office:value-type="float" office:value="-0.0000249011350858169" calcext:value-type="float">
            <text:p>-2.4901135E-05</text:p>
          </table:table-cell>
          <table:table-cell table:style-name="ce3"/>
          <table:table-cell table:style-name="ce3" table:formula="of:=CONCATENATE(&quot;Point(&quot;;[.C244];&quot;) = {&quot;;TEXT([.D244];&quot;0.0000000E+00&quot;);&quot;,&quot;;TEXT([.E244];&quot;0.0000000E+00&quot;);&quot;,&quot;;TEXT([.F244];&quot;0.0000000E+00&quot;);&quot;,&quot;;&quot;lc};&quot;)" office:value-type="string" office:string-value="Point(340) = {9.9982866E-01,y0,-2.4901135E-05,lc};" calcext:value-type="string">
            <text:p>Point(340) = {9.9982866E-01,y0,-2.4901135E-05,lc};</text:p>
          </table:table-cell>
        </table:table-row>
        <table:table-row table:style-name="ro1" table:number-rows-repeated="104833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D5:Sheet1.E7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NACA0012-XY'.D5:'NACA0012-XY'.E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7" number:min-decimal-places="7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6:59:28.879840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3:59:04.583675153</meta:creation-date>
    <dc:date>2025-03-10T17:01:42.905388513</dc:date>
    <meta:editing-duration>PT32M55S</meta:editing-duration>
    <meta:editing-cycles>18</meta:editing-cycles>
    <meta:generator>LibreOffice/7.0.4.2$Linux_X86_64 LibreOffice_project/00$Build-2</meta:generator>
    <meta:document-statistic meta:table-count="3" meta:cell-count="3070" meta:object-count="0"/>
  </office:meta>
</office:document-meta>
</file>